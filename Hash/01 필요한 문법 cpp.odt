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맑은 고딕" svg:font-family="맑은 고딕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굴림체" svg:font-family="굴림체" style:font-family-generic="modern" style:font-pitch="fixed" svg:panose-1="2 11 6 9 0 1 1 1 1 1"/>
    <style:font-face style:name="돋움" svg:font-family="돋움" style:font-family-generic="swiss" style:font-pitch="variable" svg:panose-1="2 11 6 0 0 1 1 1 1 1"/>
    <style:font-face style:name="Consolas" svg:font-family="Consolas" style:font-family-generic="modern" style:font-pitch="fixed" svg:panose-1="2 11 6 9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wiss" style:font-pitch="variable" svg:panose-1="2 13 6 4 0 0 0 0 0 0"/>
    <style:font-face style:name="Lucida Sans" svg:font-family="Lucida Sans" style:font-family-generic="swiss" style:font-pitch="variable" svg:panose-1="2 11 6 2 3 5 4 2 2 4"/>
    <style:font-face style:name="굴림" svg:font-family="굴림" style:font-family-generic="swiss" style:font-pitch="variable" svg:panose-1="2 11 6 0 0 1 1 1 1 1"/>
    <style:font-face style:name="함초롬바탕" svg:font-family="함초롬바탕" style:font-family-generic="roman" style:font-pitch="variable" svg:panose-1="2 3 6 4 0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6" style:parent-style-name="기본단락글꼴" style:family="text">
      <style:text-properties style:font-name="굴림체" fo:font-size="26pt" style:font-size-asian="26pt" style:font-size-complex="28pt"/>
    </style:style>
    <style:style style:name="T7" style:parent-style-name="기본단락글꼴" style:family="text">
      <style:text-properties style:font-name="굴림체" fo:font-size="26pt" style:font-size-asian="26pt" style:font-size-complex="28pt"/>
    </style:style>
    <style:style style:name="T8" style:parent-style-name="기본단락글꼴" style:family="text">
      <style:text-properties style:font-name="굴림체" fo:font-size="26pt" style:font-size-asian="26pt" style:font-size-complex="28pt"/>
    </style:style>
    <style:style style:name="P9" style:parent-style-name="Standard" style:family="paragraph">
      <style:text-properties style:font-name="굴림체"/>
    </style:style>
    <style:style style:name="P10" style:parent-style-name="Standard" style:family="paragraph">
      <style:text-properties style:font-name="굴림체"/>
    </style:style>
    <style:style style:name="T11" style:parent-style-name="기본단락글꼴" style:family="text">
      <style:text-properties style:font-name="굴림체" fo:font-weight="bold" style:font-weight-asian="bold" style:font-weight-complex="bold" fo:font-size="14pt" style:font-size-asian="14pt" style:font-size-complex="16pt"/>
    </style:style>
    <style:style style:name="T12" style:parent-style-name="기본단락글꼴" style:family="text">
      <style:text-properties style:font-name="굴림체"/>
    </style:style>
    <style:style style:name="P13" style:parent-style-name="Standard" style:family="paragraph">
      <style:text-properties style:font-name="굴림체"/>
    </style:style>
    <style:style style:name="P14" style:parent-style-name="Standard" style:family="paragraph">
      <style:text-properties style:font-name="굴림체"/>
    </style:style>
    <style:style style:name="T15" style:parent-style-name="기본단락글꼴" style:family="text">
      <style:text-properties fo:font-weight="bold" style:font-weight-asian="bold" style:font-weight-complex="bold" fo:font-size="14pt" style:font-size-asian="14pt" style:font-size-complex="16pt"/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7.2673in"/>
        </style:tab-stops>
      </style:paragraph-properties>
    </style:style>
    <style:style style:name="P35" style:parent-style-name="Standard" style:family="paragraph">
      <style:text-properties style:font-name="굴림"/>
    </style:style>
    <style:style style:name="P36" style:parent-style-name="Standard" style:family="paragraph">
      <style:paragraph-properties fo:widows="2" fo:orphans="2" fo:margin-bottom="0.1111in" fo:line-height="107%"/>
    </style:style>
    <style:style style:name="T37" style:parent-style-name="기본단락글꼴" style:family="text">
      <style:text-properties style:font-name="맑은 고딕" style:font-name-asian="맑은 고딕" style:font-name-complex="맑은 고딕"/>
    </style:style>
    <style:style style:name="T38" style:parent-style-name="기본단락글꼴" style:family="text">
      <style:text-properties style:font-name="맑은 고딕" style:font-name-asian="맑은 고딕" style:font-name-complex="맑은 고딕"/>
    </style:style>
    <style:style style:name="T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6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6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6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7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7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7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8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1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1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TableColumn121" style:family="table-column">
      <style:table-column-properties style:column-width="7.2611in" style:use-optimal-column-width="false"/>
    </style:style>
    <style:style style:name="Table120" style:family="table">
      <style:table-properties style:width="7.2611in" fo:margin-left="0.0034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2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2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3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3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3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4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4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4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4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5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5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5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5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5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5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6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6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6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6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6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7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7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7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7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7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7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7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7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8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8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8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8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8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8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8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1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2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1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1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2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3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3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3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23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3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3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3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4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4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25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5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5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6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7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7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27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7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7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7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7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7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7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8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9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9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9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29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9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9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9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9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29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0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1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1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31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31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1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1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1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2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2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2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2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2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2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2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2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3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33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3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4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5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35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36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6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6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65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3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6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6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7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7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7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8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8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8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8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38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ableColumn386" style:family="table-column">
      <style:table-column-properties style:column-width="7.2611in" style:use-optimal-column-width="false"/>
    </style:style>
    <style:style style:name="Table385" style:family="table">
      <style:table-properties style:width="7.2611in" fo:margin-left="0.0034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9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39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9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9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3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3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39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0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0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0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0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0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0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0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1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41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1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1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1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41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2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3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3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3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3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3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3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3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3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3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4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4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4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4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4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4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4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4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5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5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5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5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5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5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5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5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5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5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6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6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6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6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6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6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6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7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72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4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7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4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7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7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479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48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8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8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8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8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87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48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8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9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9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9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93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4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95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4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4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4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99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5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0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5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03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5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05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5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0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0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1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1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1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1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1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2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2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3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3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3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53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3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3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3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3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38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5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4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4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4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4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4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4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4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4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5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5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55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5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5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55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5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5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5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5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6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6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56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6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56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6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6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6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7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58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ableColumn589" style:family="table-column">
      <style:table-column-properties style:column-width="7.2611in" style:use-optimal-column-width="false"/>
    </style:style>
    <style:style style:name="Table588" style:family="table">
      <style:table-properties style:width="7.2611in" fo:margin-left="0.0034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9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9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59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5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5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59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0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0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0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0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0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0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60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1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1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1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61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1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1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2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2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2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2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2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2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3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3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3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3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3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3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4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4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4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4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4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4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4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4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5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5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5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5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5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5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6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6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6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6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69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6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7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6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7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7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7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676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6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7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8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82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6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8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8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88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6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90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6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9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69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94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6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696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6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698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6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00" style:parent-style-name="Standard" style:family="paragraph">
      <style:paragraph-properties fo:widows="2" fo:orphans="2" style:snap-to-layout-grid="true" fo:text-align="start" style:line-height-at-least="0.1875in" fo:background-color="#FFFFCC">
        <style:background-fill draw:fill="solid" draw:fill-color="#FFFFCC"/>
      </style:paragraph-properties>
    </style:style>
    <style:style style:name="T7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0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0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0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0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0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1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1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1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1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71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1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1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20" style:parent-style-name="기본단락글꼴" style:family="text">
      <style:text-properties style:font-name-asian="굴림" style:font-name-complex="굴림" fo:color="#098658" style:letter-kerning="false" style:font-size-complex="10pt"/>
    </style:style>
    <style:style style:name="T7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2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2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2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2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2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2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3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73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4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7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4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4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75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5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5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5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5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5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5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5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5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5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6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6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6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76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764" style:parent-style-name="Standard" style:family="paragraph">
      <style:paragraph-properties fo:widows="2" fo:orphans="2" style:snap-to-layout-grid="true" fo:margin-bottom="0.1111in" fo:line-height="107%"/>
    </style:style>
    <style:style style:name="P76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6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6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7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73" style:parent-style-name="Standard" style:family="paragraph">
      <style:paragraph-properties fo:widows="2" fo:orphans="2" style:snap-to-layout-grid="true" style:line-height-at-least="0.1875in" fo:background-color="#FFFFFF">
        <style:background-fill draw:fill="solid" draw:fill-color="#FFFFFF"/>
      </style:paragraph-properties>
    </style:style>
    <style:style style:name="T77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7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7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8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8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8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8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8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9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9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9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79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7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79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7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0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0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0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0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0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0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1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81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8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2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8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2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2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3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3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3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3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3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8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3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4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4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4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4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4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4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4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4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TableColumn851" style:family="table-column">
      <style:table-column-properties style:column-width="7.2611in" style:use-optimal-column-width="false"/>
    </style:style>
    <style:style style:name="Table850" style:family="table">
      <style:table-properties style:width="7.2611in" fo:margin-left="0.0034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widows="2" fo:orphans="2" style:snap-to-layout-grid="true" fo:text-align="start" style:line-height-at-least="0.1875in"/>
    </style:style>
    <style:style style:name="T85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5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85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5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6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6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6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6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6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6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68" style:parent-style-name="Standard" style:family="paragraph">
      <style:paragraph-properties fo:widows="2" fo:orphans="2" style:snap-to-layout-grid="true" fo:text-align="start" style:line-height-at-least="0.1875in"/>
    </style:style>
    <style:style style:name="T8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7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80" style:parent-style-name="Standard" style:family="paragraph">
      <style:paragraph-properties fo:widows="2" fo:orphans="2" style:snap-to-layout-grid="true" fo:text-align="start" style:line-height-at-least="0.1875in"/>
    </style:style>
    <style:style style:name="T8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8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9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9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9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8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8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897" style:parent-style-name="Standard" style:family="paragraph">
      <style:paragraph-properties fo:widows="2" fo:orphans="2" style:snap-to-layout-grid="true" fo:text-align="start" style:line-height-at-least="0.1875in"/>
      <style:text-properties style:font-name-asian="굴림" style:font-name-complex="굴림" fo:color="#000000" style:letter-kerning="false" style:font-size-complex="10pt"/>
    </style:style>
    <style:style style:name="P898" style:parent-style-name="Standard" style:family="paragraph">
      <style:paragraph-properties fo:widows="2" fo:orphans="2" style:snap-to-layout-grid="true" fo:text-align="start" style:line-height-at-least="0.1875in"/>
    </style:style>
    <style:style style:name="T8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0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916" style:parent-style-name="Standard" style:family="paragraph">
      <style:paragraph-properties fo:widows="2" fo:orphans="2" style:snap-to-layout-grid="true" fo:text-align="start" style:line-height-at-least="0.1875in"/>
    </style:style>
    <style:style style:name="T9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930" style:parent-style-name="Standard" style:family="paragraph">
      <style:paragraph-properties fo:widows="2" fo:orphans="2" style:snap-to-layout-grid="true" fo:text-align="start" style:line-height-at-least="0.1875in"/>
      <style:text-properties style:font-name-asian="굴림" style:font-name-complex="굴림" fo:color="#000000" style:letter-kerning="false" style:font-size-complex="10pt"/>
    </style:style>
    <style:style style:name="P931" style:parent-style-name="Standard" style:family="paragraph">
      <style:paragraph-properties fo:widows="2" fo:orphans="2" style:snap-to-layout-grid="true" fo:text-align="start" style:line-height-at-least="0.1875in"/>
    </style:style>
    <style:style style:name="T9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944" style:parent-style-name="Standard" style:family="paragraph">
      <style:paragraph-properties fo:widows="2" fo:orphans="2" style:snap-to-layout-grid="true" fo:text-align="start" style:line-height-at-least="0.1875in"/>
    </style:style>
    <style:style style:name="T94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4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5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964" style:parent-style-name="Standard" style:family="paragraph">
      <style:paragraph-properties fo:widows="2" fo:orphans="2" style:snap-to-layout-grid="true" fo:text-align="start" style:line-height-at-least="0.1875in"/>
    </style:style>
    <style:style style:name="T9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992" style:parent-style-name="Standard" style:family="paragraph">
      <style:paragraph-properties fo:widows="2" fo:orphans="2" style:snap-to-layout-grid="true" fo:text-align="start" style:line-height-at-least="0.1875in"/>
      <style:text-properties style:font-name-asian="굴림" style:font-name-complex="굴림" fo:color="#000000" style:letter-kerning="false" style:font-size-complex="10pt"/>
    </style:style>
    <style:style style:name="P993" style:parent-style-name="Standard" style:family="paragraph">
      <style:paragraph-properties fo:widows="2" fo:orphans="2" style:snap-to-layout-grid="true" fo:text-align="start" style:line-height-at-least="0.1875in"/>
    </style:style>
    <style:style style:name="T9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9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0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12" style:parent-style-name="Standard" style:family="paragraph">
      <style:paragraph-properties fo:widows="2" fo:orphans="2" style:snap-to-layout-grid="true" fo:text-align="start" style:line-height-at-least="0.1875in"/>
    </style:style>
    <style:style style:name="T10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2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02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2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3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3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3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4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4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4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4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4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4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4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4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4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5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5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5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5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5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5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8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8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08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08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08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08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8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9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09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0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10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0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0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0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0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0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10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0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0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1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1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1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1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2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2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2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2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2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1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2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2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3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3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3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3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4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14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4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1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4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4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46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4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4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4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5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5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6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6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6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6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16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7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1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7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7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7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1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7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7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7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7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8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8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8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18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19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19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19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19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1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0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0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0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0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0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0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0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0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0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1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1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1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2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2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2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2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24" style:parent-style-name="Standard" style:family="paragraph">
      <style:paragraph-properties fo:widows="2" fo:orphans="2" style:snap-to-layout-grid="true" fo:text-align="start" fo:margin-bottom="0.1666in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22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27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2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2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3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3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2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3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3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3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3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3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3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4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4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4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4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4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4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47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4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4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5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2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5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5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5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5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5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5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5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6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6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26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6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2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7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7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7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7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7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7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7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7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7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8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8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8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8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9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9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9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29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29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29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2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297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9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29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0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03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0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0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0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0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0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1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31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31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1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1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2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2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2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2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2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2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2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2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2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33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3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3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4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4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4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4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34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34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47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4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4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5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5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6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6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36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36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6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6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66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67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3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6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7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7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7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37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37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375" style:parent-style-name="Standard" style:family="paragraph">
      <style:paragraph-properties fo:widows="2" fo:orphans="2" style:snap-to-layout-grid="true" fo:margin-bottom="0.1111in" fo:line-height="107%"/>
    </style:style>
    <style:style style:name="T1376" style:parent-style-name="기본단락글꼴" style:family="text">
      <style:text-properties fo:font-style="italic" style:font-style-asian="italic"/>
    </style:style>
    <style:style style:name="T1377" style:parent-style-name="기본단락글꼴" style:family="text">
      <style:text-properties fo:font-style="italic" style:font-style-asian="italic" style:font-style-complex="italic"/>
    </style:style>
    <style:style style:name="T1378" style:parent-style-name="기본단락글꼴" style:family="text">
      <style:text-properties fo:font-style="italic" style:font-style-asian="italic" style:font-style-complex="italic"/>
    </style:style>
    <style:style style:name="T1379" style:parent-style-name="기본단락글꼴" style:family="text">
      <style:text-properties fo:font-style="italic" style:font-style-asian="italic"/>
    </style:style>
    <style:style style:name="T1380" style:parent-style-name="기본단락글꼴" style:family="text">
      <style:text-properties fo:font-style="italic" style:font-style-asian="italic"/>
    </style:style>
    <style:style style:name="P138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8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8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8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8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39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39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9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3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3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39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0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0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1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141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41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2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2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2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2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2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2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43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3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3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3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3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4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43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4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43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4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5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6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7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8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49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50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51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52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T1453" style:parent-style-name="기본단락글꼴" style:family="text">
      <style:text-properties style:font-name-asian="굴림" style:font-name-complex="굴림" fo:color="#538135" style:letter-kerning="false" style:font-size-complex="10pt"/>
    </style:style>
    <style:style style:name="P1454" style:parent-style-name="Standard" style:family="paragraph">
      <style:paragraph-properties fo:widows="2" fo:orphans="2" fo:margin-bottom="0.1111in" fo:line-height="107%"/>
    </style:style>
    <style:style style:name="TableColumn1456" style:family="table-column">
      <style:table-column-properties style:column-width="7.2611in" style:use-optimal-column-width="false"/>
    </style:style>
    <style:style style:name="Table1455" style:family="table">
      <style:table-properties style:width="7.2611in" fo:margin-left="0.0034in" table:align="left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T1459" style:parent-style-name="기본단락글꼴" style:family="text">
      <style:text-properties fo:font-weight="bold" style:font-weight-asian="bold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T1462" style:parent-style-name="기본단락글꼴" style:family="text">
      <style:text-properties fo:font-weight="bold" style:font-weight-asian="bold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T1465" style:parent-style-name="기본단락글꼴" style:family="text">
      <style:text-properties fo:font-weight="bold" style:font-weight-asian="bold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T1468" style:parent-style-name="기본단락글꼴" style:family="text">
      <style:text-properties fo:font-weight="bold" style:font-weight-asian="bold"/>
    </style:style>
    <style:style style:name="T1469" style:parent-style-name="기본단락글꼴" style:family="text">
      <style:text-properties fo:font-weight="bold" style:font-weight-asian="bold" fo:color="#0000FF"/>
    </style:style>
    <style:style style:name="T1470" style:parent-style-name="기본단락글꼴" style:family="text">
      <style:text-properties fo:font-weight="bold" style:font-weight-asian="bold" fo:color="#0000FF"/>
    </style:style>
    <style:style style:name="T1471" style:parent-style-name="기본단락글꼴" style:family="text">
      <style:text-properties fo:font-weight="bold" style:font-weight-asian="bold" fo:color="#0000FF"/>
    </style:style>
    <style:style style:name="T1472" style:parent-style-name="기본단락글꼴" style:family="text">
      <style:text-properties fo:font-weight="bold" style:font-weight-asian="bold" fo:color="#FF0000"/>
    </style:style>
    <style:style style:name="T1473" style:parent-style-name="기본단락글꼴" style:family="text">
      <style:text-properties fo:font-weight="bold" style:font-weight-asian="bold" fo:color="#0000FF"/>
    </style:style>
    <style:style style:name="T1474" style:parent-style-name="기본단락글꼴" style:family="text">
      <style:text-properties fo:font-weight="bold" style:font-weight-asian="bold" fo:color="#FF0000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T1477" style:parent-style-name="기본단락글꼴" style:family="text">
      <style:text-properties fo:font-weight="bold" style:font-weight-asian="bold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T1480" style:parent-style-name="기본단락글꼴" style:family="text">
      <style:text-properties fo:font-weight="bold" style:font-weight-asian="bold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T1483" style:parent-style-name="기본단락글꼴" style:family="text">
      <style:text-properties fo:font-weight="bold" style:font-weight-asian="bold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T1486" style:parent-style-name="기본단락글꼴" style:family="text">
      <style:text-properties fo:font-weight="bold" style:font-weight-asian="bold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T1489" style:parent-style-name="기본단락글꼴" style:family="text">
      <style:text-properties fo:font-weight="bold" style:font-weight-asian="bold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T1492" style:parent-style-name="기본단락글꼴" style:family="text">
      <style:text-properties fo:font-weight="bold" style:font-weight-asian="bold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T1495" style:parent-style-name="기본단락글꼴" style:family="text">
      <style:text-properties fo:font-weight="bold" style:font-weight-asian="bold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T1498" style:parent-style-name="기본단락글꼴" style:family="text">
      <style:text-properties fo:font-weight="bold" style:font-weight-asian="bold"/>
    </style:style>
    <style:style style:name="P1499" style:parent-style-name="Standard" style:family="paragraph">
      <style:paragraph-properties fo:widows="2" fo:orphans="2" fo:margin-bottom="0.1111in" fo:line-height="107%"/>
    </style:style>
    <style:style style:name="TableColumn1501" style:family="table-column">
      <style:table-column-properties style:column-width="7.2569in" style:use-optimal-column-width="false"/>
    </style:style>
    <style:style style:name="Table1500" style:family="table">
      <style:table-properties style:width="7.2569in" fo:margin-left="0in" table:align="left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T1504" style:parent-style-name="기본단락글꼴" style:family="text">
      <style:text-properties fo:color="#7F0055"/>
    </style:style>
    <style:style style:name="T1505" style:parent-style-name="기본단락글꼴" style:family="text">
      <style:text-properties fo:color="#000000"/>
    </style:style>
    <style:style style:name="T1506" style:parent-style-name="기본단락글꼴" style:family="text">
      <style:text-properties fo:color="#7F0055"/>
    </style:style>
    <style:style style:name="T1507" style:parent-style-name="기본단락글꼴" style:family="text">
      <style:text-properties fo:color="#000000"/>
    </style:style>
    <style:style style:name="T1508" style:parent-style-name="기본단락글꼴" style:family="text">
      <style:text-properties fo:color="#7F0055"/>
    </style:style>
    <style:style style:name="T1509" style:parent-style-name="기본단락글꼴" style:family="text">
      <style:text-properties fo:color="#000000"/>
    </style:style>
    <style:style style:name="T1510" style:parent-style-name="기본단락글꼴" style:family="text">
      <style:text-properties fo:color="#7F0055"/>
    </style:style>
    <style:style style:name="T1511" style:parent-style-name="기본단락글꼴" style:family="text">
      <style:text-properties fo:color="#000000"/>
    </style:style>
    <style:style style:name="T1512" style:parent-style-name="기본단락글꼴" style:family="text">
      <style:text-properties fo:color="#7F0055"/>
    </style:style>
    <style:style style:name="T1513" style:parent-style-name="기본단락글꼴" style:family="text">
      <style:text-properties fo:color="#000000"/>
    </style:style>
    <style:style style:name="T1514" style:parent-style-name="기본단락글꼴" style:family="text">
      <style:text-properties fo:color="#000000"/>
    </style:style>
    <style:style style:name="T1515" style:parent-style-name="기본단락글꼴" style:family="text">
      <style:text-properties fo:color="#7F0055"/>
    </style:style>
    <style:style style:name="T1516" style:parent-style-name="기본단락글꼴" style:family="text">
      <style:text-properties fo:color="#000000"/>
    </style:style>
    <style:style style:name="T1517" style:parent-style-name="기본단락글꼴" style:family="text">
      <style:text-properties fo:color="#7F0055"/>
    </style:style>
    <style:style style:name="T1518" style:parent-style-name="기본단락글꼴" style:family="text">
      <style:text-properties fo:color="#000000"/>
    </style:style>
    <style:style style:name="T1519" style:parent-style-name="기본단락글꼴" style:family="text">
      <style:text-properties fo:color="#7F0055"/>
    </style:style>
    <style:style style:name="T1520" style:parent-style-name="기본단락글꼴" style:family="text">
      <style:text-properties fo:color="#000000"/>
    </style:style>
    <style:style style:name="T1521" style:parent-style-name="기본단락글꼴" style:family="text">
      <style:text-properties fo:color="#6A3E3E"/>
    </style:style>
    <style:style style:name="T1522" style:parent-style-name="기본단락글꼴" style:family="text">
      <style:text-properties fo:color="#000000"/>
    </style:style>
    <style:style style:name="T1523" style:parent-style-name="기본단락글꼴" style:family="text">
      <style:text-properties fo:color="#000000"/>
    </style:style>
    <style:style style:name="T1524" style:parent-style-name="기본단락글꼴" style:family="text">
      <style:text-properties fo:color="#6A3E3E"/>
    </style:style>
    <style:style style:name="T1525" style:parent-style-name="기본단락글꼴" style:family="text">
      <style:text-properties fo:color="#000000"/>
    </style:style>
    <style:style style:name="T1526" style:parent-style-name="기본단락글꼴" style:family="text">
      <style:text-properties fo:color="#7F0055"/>
    </style:style>
    <style:style style:name="T1527" style:parent-style-name="기본단락글꼴" style:family="text">
      <style:text-properties fo:color="#000000"/>
    </style:style>
    <style:style style:name="T1528" style:parent-style-name="기본단락글꼴" style:family="text">
      <style:text-properties fo:color="#000000"/>
    </style:style>
    <style:style style:name="T1529" style:parent-style-name="기본단락글꼴" style:family="text">
      <style:text-properties fo:color="#6A3E3E"/>
    </style:style>
    <style:style style:name="T1530" style:parent-style-name="기본단락글꼴" style:family="text">
      <style:text-properties fo:color="#000000"/>
    </style:style>
    <style:style style:name="T1531" style:parent-style-name="기본단락글꼴" style:family="text">
      <style:text-properties fo:color="#2A00FF"/>
    </style:style>
    <style:style style:name="T1532" style:parent-style-name="기본단락글꼴" style:family="text">
      <style:text-properties fo:color="#000000"/>
    </style:style>
    <style:style style:name="T1533" style:parent-style-name="기본단락글꼴" style:family="text">
      <style:text-properties fo:color="#000000"/>
    </style:style>
    <style:style style:name="T1534" style:parent-style-name="기본단락글꼴" style:family="text">
      <style:text-properties fo:color="#6A3E3E"/>
    </style:style>
    <style:style style:name="T1535" style:parent-style-name="기본단락글꼴" style:family="text">
      <style:text-properties fo:color="#000000"/>
    </style:style>
    <style:style style:name="T1536" style:parent-style-name="기본단락글꼴" style:family="text">
      <style:text-properties fo:color="#2A00FF"/>
    </style:style>
    <style:style style:name="T1537" style:parent-style-name="기본단락글꼴" style:family="text">
      <style:text-properties fo:color="#000000"/>
    </style:style>
    <style:style style:name="T1538" style:parent-style-name="기본단락글꼴" style:family="text">
      <style:text-properties fo:color="#000000"/>
    </style:style>
    <style:style style:name="T1539" style:parent-style-name="기본단락글꼴" style:family="text">
      <style:text-properties fo:color="#6A3E3E"/>
    </style:style>
    <style:style style:name="T1540" style:parent-style-name="기본단락글꼴" style:family="text">
      <style:text-properties fo:color="#000000"/>
    </style:style>
    <style:style style:name="T1541" style:parent-style-name="기본단락글꼴" style:family="text">
      <style:text-properties fo:color="#2A00FF"/>
    </style:style>
    <style:style style:name="T1542" style:parent-style-name="기본단락글꼴" style:family="text">
      <style:text-properties fo:color="#000000"/>
    </style:style>
    <style:style style:name="T1543" style:parent-style-name="기본단락글꼴" style:family="text">
      <style:text-properties fo:color="#000000"/>
    </style:style>
    <style:style style:name="T1544" style:parent-style-name="기본단락글꼴" style:family="text">
      <style:text-properties fo:color="#0000C0"/>
    </style:style>
    <style:style style:name="T1545" style:parent-style-name="기본단락글꼴" style:family="text">
      <style:text-properties fo:color="#000000"/>
    </style:style>
    <style:style style:name="T1546" style:parent-style-name="기본단락글꼴" style:family="text">
      <style:text-properties fo:color="#2A00FF"/>
    </style:style>
    <style:style style:name="T1547" style:parent-style-name="기본단락글꼴" style:family="text">
      <style:text-properties fo:color="#000000"/>
    </style:style>
    <style:style style:name="T1548" style:parent-style-name="기본단락글꼴" style:family="text">
      <style:text-properties fo:color="#6A3E3E"/>
    </style:style>
    <style:style style:name="T1549" style:parent-style-name="기본단락글꼴" style:family="text">
      <style:text-properties fo:color="#000000"/>
    </style:style>
    <style:style style:name="T1550" style:parent-style-name="기본단락글꼴" style:family="text">
      <style:text-properties fo:color="#2A00FF"/>
    </style:style>
    <style:style style:name="T1551" style:parent-style-name="기본단락글꼴" style:family="text">
      <style:text-properties fo:color="#000000"/>
    </style:style>
    <style:style style:name="T1552" style:parent-style-name="기본단락글꼴" style:family="text">
      <style:text-properties fo:color="#6A3E3E"/>
    </style:style>
    <style:style style:name="T1553" style:parent-style-name="기본단락글꼴" style:family="text">
      <style:text-properties fo:color="#000000"/>
    </style:style>
    <style:style style:name="T1554" style:parent-style-name="기본단락글꼴" style:family="text">
      <style:text-properties fo:color="#2A00FF"/>
    </style:style>
    <style:style style:name="T1555" style:parent-style-name="기본단락글꼴" style:family="text">
      <style:text-properties fo:color="#000000"/>
    </style:style>
    <style:style style:name="T1556" style:parent-style-name="기본단락글꼴" style:family="text">
      <style:text-properties fo:color="#6A3E3E"/>
    </style:style>
    <style:style style:name="T1557" style:parent-style-name="기본단락글꼴" style:family="text">
      <style:text-properties fo:color="#000000"/>
    </style:style>
    <style:style style:name="T1558" style:parent-style-name="기본단락글꼴" style:family="text">
      <style:text-properties fo:color="#2A00FF"/>
    </style:style>
    <style:style style:name="T1559" style:parent-style-name="기본단락글꼴" style:family="text">
      <style:text-properties fo:color="#000000"/>
    </style:style>
    <style:style style:name="P1560" style:parent-style-name="코드표" style:family="paragraph">
      <style:text-properties fo:color="#000000"/>
    </style:style>
    <style:style style:name="P1561" style:parent-style-name="코드표" style:family="paragraph">
      <style:text-properties fo:color="#000000"/>
    </style:style>
    <style:style style:name="TableColumn1563" style:family="table-column">
      <style:table-column-properties style:column-width="7.2611in" style:use-optimal-column-width="false"/>
    </style:style>
    <style:style style:name="Table1562" style:family="table">
      <style:table-properties style:width="7.2611in" fo:margin-left="0.0034in" table:align="left"/>
    </style:style>
    <style:style style:name="TableRow1564" style:family="table-row">
      <style:table-row-properties style:use-optimal-row-height="false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67" style:family="table-column">
      <style:table-column-properties style:column-width="7.2569in" style:use-optimal-column-width="false"/>
    </style:style>
    <style:style style:name="Table1566" style:family="table">
      <style:table-properties style:width="7.2569in" fo:margin-left="0in" table:align="left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T1570" style:parent-style-name="기본단락글꼴" style:family="text">
      <style:text-properties fo:color="#7F0055"/>
    </style:style>
    <style:style style:name="T1571" style:parent-style-name="기본단락글꼴" style:family="text">
      <style:text-properties fo:color="#000000"/>
    </style:style>
    <style:style style:name="T1572" style:parent-style-name="기본단락글꼴" style:family="text">
      <style:text-properties fo:color="#7F0055"/>
    </style:style>
    <style:style style:name="T1573" style:parent-style-name="기본단락글꼴" style:family="text">
      <style:text-properties fo:color="#000000"/>
    </style:style>
    <style:style style:name="T1574" style:parent-style-name="기본단락글꼴" style:family="text">
      <style:text-properties fo:color="#7F0055"/>
    </style:style>
    <style:style style:name="T1575" style:parent-style-name="기본단락글꼴" style:family="text">
      <style:text-properties fo:color="#000000"/>
    </style:style>
    <style:style style:name="T1576" style:parent-style-name="기본단락글꼴" style:family="text">
      <style:text-properties fo:color="#7F0055"/>
    </style:style>
    <style:style style:name="T1577" style:parent-style-name="기본단락글꼴" style:family="text">
      <style:text-properties fo:color="#000000"/>
    </style:style>
    <style:style style:name="T1578" style:parent-style-name="기본단락글꼴" style:family="text">
      <style:text-properties fo:color="#7F0055"/>
    </style:style>
    <style:style style:name="T1579" style:parent-style-name="기본단락글꼴" style:family="text">
      <style:text-properties fo:color="#000000"/>
    </style:style>
    <style:style style:name="T1580" style:parent-style-name="기본단락글꼴" style:family="text">
      <style:text-properties fo:color="#000000"/>
    </style:style>
    <style:style style:name="T1581" style:parent-style-name="기본단락글꼴" style:family="text">
      <style:text-properties fo:color="#7F0055"/>
    </style:style>
    <style:style style:name="T1582" style:parent-style-name="기본단락글꼴" style:family="text">
      <style:text-properties fo:color="#000000"/>
    </style:style>
    <style:style style:name="T1583" style:parent-style-name="기본단락글꼴" style:family="text">
      <style:text-properties fo:color="#7F0055"/>
    </style:style>
    <style:style style:name="T1584" style:parent-style-name="기본단락글꼴" style:family="text">
      <style:text-properties fo:color="#000000"/>
    </style:style>
    <style:style style:name="T1585" style:parent-style-name="기본단락글꼴" style:family="text">
      <style:text-properties fo:color="#7F0055"/>
    </style:style>
    <style:style style:name="T1586" style:parent-style-name="기본단락글꼴" style:family="text">
      <style:text-properties fo:color="#000000"/>
    </style:style>
    <style:style style:name="T1587" style:parent-style-name="기본단락글꼴" style:family="text">
      <style:text-properties fo:color="#6A3E3E"/>
    </style:style>
    <style:style style:name="T1588" style:parent-style-name="기본단락글꼴" style:family="text">
      <style:text-properties fo:color="#000000"/>
    </style:style>
    <style:style style:name="T1589" style:parent-style-name="기본단락글꼴" style:family="text">
      <style:text-properties fo:color="#000000"/>
    </style:style>
    <style:style style:name="T1590" style:parent-style-name="기본단락글꼴" style:family="text">
      <style:text-properties fo:color="#6A3E3E"/>
    </style:style>
    <style:style style:name="T1591" style:parent-style-name="기본단락글꼴" style:family="text">
      <style:text-properties fo:color="#000000"/>
    </style:style>
    <style:style style:name="T1592" style:parent-style-name="기본단락글꼴" style:family="text">
      <style:text-properties fo:color="#7F0055"/>
    </style:style>
    <style:style style:name="T1593" style:parent-style-name="기본단락글꼴" style:family="text">
      <style:text-properties fo:color="#000000"/>
    </style:style>
    <style:style style:name="T1594" style:parent-style-name="기본단락글꼴" style:family="text">
      <style:text-properties fo:color="#000000"/>
    </style:style>
    <style:style style:name="T1595" style:parent-style-name="기본단락글꼴" style:family="text">
      <style:text-properties fo:color="#6A3E3E"/>
    </style:style>
    <style:style style:name="T1596" style:parent-style-name="기본단락글꼴" style:family="text">
      <style:text-properties fo:color="#000000"/>
    </style:style>
    <style:style style:name="T1597" style:parent-style-name="기본단락글꼴" style:family="text">
      <style:text-properties fo:color="#2A00FF"/>
    </style:style>
    <style:style style:name="T1598" style:parent-style-name="기본단락글꼴" style:family="text">
      <style:text-properties fo:color="#000000"/>
    </style:style>
    <style:style style:name="T1599" style:parent-style-name="기본단락글꼴" style:family="text">
      <style:text-properties fo:color="#000000"/>
    </style:style>
    <style:style style:name="T1600" style:parent-style-name="기본단락글꼴" style:family="text">
      <style:text-properties fo:color="#6A3E3E"/>
    </style:style>
    <style:style style:name="T1601" style:parent-style-name="기본단락글꼴" style:family="text">
      <style:text-properties fo:color="#000000"/>
    </style:style>
    <style:style style:name="T1602" style:parent-style-name="기본단락글꼴" style:family="text">
      <style:text-properties fo:color="#2A00FF"/>
    </style:style>
    <style:style style:name="T1603" style:parent-style-name="기본단락글꼴" style:family="text">
      <style:text-properties fo:color="#000000"/>
    </style:style>
    <style:style style:name="T1604" style:parent-style-name="기본단락글꼴" style:family="text">
      <style:text-properties fo:color="#000000"/>
    </style:style>
    <style:style style:name="T1605" style:parent-style-name="기본단락글꼴" style:family="text">
      <style:text-properties fo:color="#6A3E3E"/>
    </style:style>
    <style:style style:name="T1606" style:parent-style-name="기본단락글꼴" style:family="text">
      <style:text-properties fo:color="#000000"/>
    </style:style>
    <style:style style:name="T1607" style:parent-style-name="기본단락글꼴" style:family="text">
      <style:text-properties fo:color="#2A00FF"/>
    </style:style>
    <style:style style:name="T1608" style:parent-style-name="기본단락글꼴" style:family="text">
      <style:text-properties fo:color="#000000"/>
    </style:style>
    <style:style style:name="T1609" style:parent-style-name="기본단락글꼴" style:family="text">
      <style:text-properties fo:color="#000000"/>
    </style:style>
    <style:style style:name="T1610" style:parent-style-name="기본단락글꼴" style:family="text">
      <style:text-properties fo:color="#0000C0"/>
    </style:style>
    <style:style style:name="T1611" style:parent-style-name="기본단락글꼴" style:family="text">
      <style:text-properties fo:color="#000000"/>
    </style:style>
    <style:style style:name="T1612" style:parent-style-name="기본단락글꼴" style:family="text">
      <style:text-properties fo:color="#2A00FF"/>
    </style:style>
    <style:style style:name="T1613" style:parent-style-name="기본단락글꼴" style:family="text">
      <style:text-properties fo:color="#000000"/>
    </style:style>
    <style:style style:name="T1614" style:parent-style-name="기본단락글꼴" style:family="text">
      <style:text-properties fo:color="#6A3E3E"/>
    </style:style>
    <style:style style:name="T1615" style:parent-style-name="기본단락글꼴" style:family="text">
      <style:text-properties fo:color="#000000"/>
    </style:style>
    <style:style style:name="T1616" style:parent-style-name="기본단락글꼴" style:family="text">
      <style:text-properties fo:color="#6A3E3E"/>
    </style:style>
    <style:style style:name="T1617" style:parent-style-name="기본단락글꼴" style:family="text">
      <style:text-properties fo:color="#000000"/>
    </style:style>
    <style:style style:name="T1618" style:parent-style-name="기본단락글꼴" style:family="text">
      <style:text-properties fo:color="#6A3E3E"/>
    </style:style>
    <style:style style:name="T1619" style:parent-style-name="기본단락글꼴" style:family="text">
      <style:text-properties fo:color="#000000"/>
    </style:style>
    <style:style style:name="T1620" style:parent-style-name="기본단락글꼴" style:family="text">
      <style:text-properties fo:color="#000000"/>
    </style:style>
    <style:style style:name="T1621" style:parent-style-name="기본단락글꼴" style:family="text">
      <style:text-properties fo:color="#6A3E3E"/>
    </style:style>
    <style:style style:name="T1622" style:parent-style-name="기본단락글꼴" style:family="text">
      <style:text-properties fo:color="#000000"/>
    </style:style>
    <style:style style:name="T1623" style:parent-style-name="기본단락글꼴" style:family="text">
      <style:text-properties fo:color="#000000"/>
    </style:style>
    <style:style style:name="T1624" style:parent-style-name="기본단락글꼴" style:family="text">
      <style:text-properties fo:color="#0000C0"/>
    </style:style>
    <style:style style:name="T1625" style:parent-style-name="기본단락글꼴" style:family="text">
      <style:text-properties fo:color="#000000"/>
    </style:style>
    <style:style style:name="T1626" style:parent-style-name="기본단락글꼴" style:family="text">
      <style:text-properties fo:color="#2A00FF"/>
    </style:style>
    <style:style style:name="T1627" style:parent-style-name="기본단락글꼴" style:family="text">
      <style:text-properties fo:color="#000000"/>
    </style:style>
    <style:style style:name="T1628" style:parent-style-name="기본단락글꼴" style:family="text">
      <style:text-properties fo:color="#6A3E3E"/>
    </style:style>
    <style:style style:name="T1629" style:parent-style-name="기본단락글꼴" style:family="text">
      <style:text-properties fo:color="#000000"/>
    </style:style>
    <style:style style:name="T1630" style:parent-style-name="기본단락글꼴" style:family="text">
      <style:text-properties fo:color="#6A3E3E"/>
    </style:style>
    <style:style style:name="T1631" style:parent-style-name="기본단락글꼴" style:family="text">
      <style:text-properties fo:color="#000000"/>
    </style:style>
    <style:style style:name="T1632" style:parent-style-name="기본단락글꼴" style:family="text">
      <style:text-properties fo:color="#6A3E3E"/>
    </style:style>
    <style:style style:name="T1633" style:parent-style-name="기본단락글꼴" style:family="text">
      <style:text-properties fo:color="#000000"/>
    </style:style>
    <style:style style:name="P1634" style:parent-style-name="코드표" style:family="paragraph">
      <style:text-properties fo:color="#000000"/>
    </style:style>
    <style:style style:name="P1635" style:parent-style-name="코드표" style:family="paragraph">
      <style:text-properties fo:color="#000000"/>
    </style:style>
    <style:style style:name="TableColumn1637" style:family="table-column">
      <style:table-column-properties style:column-width="7.2611in" style:use-optimal-column-width="false"/>
    </style:style>
    <style:style style:name="Table1636" style:family="table">
      <style:table-properties style:width="7.2611in" fo:margin-left="0.0034in" table:align="left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start"/>
    </style:style>
    <style:style style:name="T1641" style:parent-style-name="기본단락글꼴" style:family="text">
      <style:text-properties style:font-name-complex="굴림체" fo:color="#000000" style:letter-kerning="false" style:font-size-complex="10pt"/>
    </style:style>
    <style:style style:name="P1642" style:parent-style-name="Standard" style:family="paragraph">
      <style:paragraph-properties fo:text-align="start"/>
    </style:style>
    <style:style style:name="T1643" style:parent-style-name="기본단락글꼴" style:family="text">
      <style:text-properties style:font-name-complex="굴림체" fo:color="#000000" style:letter-kerning="false" style:font-size-complex="10pt"/>
    </style:style>
    <style:style style:name="P1644" style:parent-style-name="Standard" style:family="paragraph">
      <style:paragraph-properties fo:widows="2" fo:orphans="2" fo:margin-bottom="0.1111in" fo:line-height="107%"/>
    </style:style>
    <style:style style:name="TableColumn1646" style:family="table-column">
      <style:table-column-properties style:column-width="7.2569in" style:use-optimal-column-width="false"/>
    </style:style>
    <style:style style:name="Table1645" style:family="table">
      <style:table-properties style:width="7.2569in" fo:margin-left="0in" table:align="left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T1649" style:parent-style-name="기본단락글꼴" style:family="text">
      <style:text-properties fo:color="#7F0055"/>
    </style:style>
    <style:style style:name="T1650" style:parent-style-name="기본단락글꼴" style:family="text">
      <style:text-properties fo:color="#000000"/>
    </style:style>
    <style:style style:name="T1651" style:parent-style-name="기본단락글꼴" style:family="text">
      <style:text-properties fo:color="#7F0055"/>
    </style:style>
    <style:style style:name="T1652" style:parent-style-name="기본단락글꼴" style:family="text">
      <style:text-properties fo:color="#000000"/>
    </style:style>
    <style:style style:name="T1653" style:parent-style-name="기본단락글꼴" style:family="text">
      <style:text-properties fo:color="#7F0055"/>
    </style:style>
    <style:style style:name="T1654" style:parent-style-name="기본단락글꼴" style:family="text">
      <style:text-properties fo:color="#000000"/>
    </style:style>
    <style:style style:name="T1655" style:parent-style-name="기본단락글꼴" style:family="text">
      <style:text-properties fo:color="#000000"/>
    </style:style>
    <style:style style:name="T1656" style:parent-style-name="기본단락글꼴" style:family="text">
      <style:text-properties fo:color="#0000C0"/>
    </style:style>
    <style:style style:name="T1657" style:parent-style-name="기본단락글꼴" style:family="text">
      <style:text-properties fo:color="#000000"/>
    </style:style>
    <style:style style:name="T1658" style:parent-style-name="기본단락글꼴" style:family="text">
      <style:text-properties fo:color="#000000"/>
    </style:style>
    <style:style style:name="T1659" style:parent-style-name="기본단락글꼴" style:family="text">
      <style:text-properties fo:color="#7F0055"/>
    </style:style>
    <style:style style:name="T1660" style:parent-style-name="기본단락글꼴" style:family="text">
      <style:text-properties fo:color="#000000"/>
    </style:style>
    <style:style style:name="T1661" style:parent-style-name="기본단락글꼴" style:family="text">
      <style:text-properties fo:color="#0000C0"/>
    </style:style>
    <style:style style:name="T1662" style:parent-style-name="기본단락글꼴" style:family="text">
      <style:text-properties fo:color="#000000"/>
    </style:style>
    <style:style style:name="T1663" style:parent-style-name="기본단락글꼴" style:family="text">
      <style:text-properties fo:color="#000000"/>
    </style:style>
    <style:style style:name="T1664" style:parent-style-name="기본단락글꼴" style:family="text">
      <style:text-properties fo:color="#7F0055"/>
    </style:style>
    <style:style style:name="T1665" style:parent-style-name="기본단락글꼴" style:family="text">
      <style:text-properties fo:color="#000000"/>
    </style:style>
    <style:style style:name="T1666" style:parent-style-name="기본단락글꼴" style:family="text">
      <style:text-properties fo:color="#6A3E3E"/>
    </style:style>
    <style:style style:name="T1667" style:parent-style-name="기본단락글꼴" style:family="text">
      <style:text-properties fo:color="#000000"/>
    </style:style>
    <style:style style:name="T1668" style:parent-style-name="기본단락글꼴" style:family="text">
      <style:text-properties fo:color="#7F0055"/>
    </style:style>
    <style:style style:name="T1669" style:parent-style-name="기본단락글꼴" style:family="text">
      <style:text-properties fo:color="#000000"/>
    </style:style>
    <style:style style:name="T1670" style:parent-style-name="기본단락글꼴" style:family="text">
      <style:text-properties fo:color="#6A3E3E"/>
    </style:style>
    <style:style style:name="T1671" style:parent-style-name="기본단락글꼴" style:family="text">
      <style:text-properties fo:color="#000000"/>
    </style:style>
    <style:style style:name="T1672" style:parent-style-name="기본단락글꼴" style:family="text">
      <style:text-properties fo:color="#000000"/>
    </style:style>
    <style:style style:name="T1673" style:parent-style-name="기본단락글꼴" style:family="text">
      <style:text-properties fo:color="#7F0055"/>
    </style:style>
    <style:style style:name="T1674" style:parent-style-name="기본단락글꼴" style:family="text">
      <style:text-properties fo:color="#000000"/>
    </style:style>
    <style:style style:name="T1675" style:parent-style-name="기본단락글꼴" style:family="text">
      <style:text-properties fo:color="#0000C0"/>
    </style:style>
    <style:style style:name="T1676" style:parent-style-name="기본단락글꼴" style:family="text">
      <style:text-properties fo:color="#000000"/>
    </style:style>
    <style:style style:name="T1677" style:parent-style-name="기본단락글꼴" style:family="text">
      <style:text-properties fo:color="#6A3E3E"/>
    </style:style>
    <style:style style:name="T1678" style:parent-style-name="기본단락글꼴" style:family="text">
      <style:text-properties fo:color="#000000"/>
    </style:style>
    <style:style style:name="T1679" style:parent-style-name="기본단락글꼴" style:family="text">
      <style:text-properties fo:color="#000000"/>
    </style:style>
    <style:style style:name="T1680" style:parent-style-name="기본단락글꼴" style:family="text">
      <style:text-properties fo:color="#7F0055"/>
    </style:style>
    <style:style style:name="T1681" style:parent-style-name="기본단락글꼴" style:family="text">
      <style:text-properties fo:color="#000000"/>
    </style:style>
    <style:style style:name="T1682" style:parent-style-name="기본단락글꼴" style:family="text">
      <style:text-properties fo:color="#0000C0"/>
    </style:style>
    <style:style style:name="T1683" style:parent-style-name="기본단락글꼴" style:family="text">
      <style:text-properties fo:color="#000000"/>
    </style:style>
    <style:style style:name="T1684" style:parent-style-name="기본단락글꼴" style:family="text">
      <style:text-properties fo:color="#6A3E3E"/>
    </style:style>
    <style:style style:name="T1685" style:parent-style-name="기본단락글꼴" style:family="text">
      <style:text-properties fo:color="#000000"/>
    </style:style>
    <style:style style:name="P1686" style:parent-style-name="코드표" style:family="paragraph">
      <style:text-properties fo:color="#000000"/>
    </style:style>
    <style:style style:name="T1687" style:parent-style-name="기본단락글꼴" style:family="text">
      <style:text-properties fo:color="#000000"/>
    </style:style>
    <style:style style:name="T1688" style:parent-style-name="기본단락글꼴" style:family="text">
      <style:text-properties fo:color="#646464"/>
    </style:style>
    <style:style style:name="T1689" style:parent-style-name="기본단락글꼴" style:family="text">
      <style:text-properties fo:color="#000000"/>
    </style:style>
    <style:style style:name="T1690" style:parent-style-name="기본단락글꼴" style:family="text">
      <style:text-properties fo:color="#7F0055"/>
    </style:style>
    <style:style style:name="T1691" style:parent-style-name="기본단락글꼴" style:family="text">
      <style:text-properties fo:color="#000000"/>
    </style:style>
    <style:style style:name="T1692" style:parent-style-name="기본단락글꼴" style:family="text">
      <style:text-properties fo:color="#000000"/>
    </style:style>
    <style:style style:name="T1693" style:parent-style-name="기본단락글꼴" style:family="text">
      <style:text-properties fo:color="#7F0055"/>
    </style:style>
    <style:style style:name="T1694" style:parent-style-name="기본단락글꼴" style:family="text">
      <style:text-properties fo:color="#000000"/>
    </style:style>
    <style:style style:name="T1695" style:parent-style-name="기본단락글꼴" style:family="text">
      <style:text-properties fo:color="#2A00FF"/>
    </style:style>
    <style:style style:name="T1696" style:parent-style-name="기본단락글꼴" style:family="text">
      <style:text-properties fo:color="#000000"/>
    </style:style>
    <style:style style:name="T1697" style:parent-style-name="기본단락글꼴" style:family="text">
      <style:text-properties fo:color="#0000C0"/>
    </style:style>
    <style:style style:name="T1698" style:parent-style-name="기본단락글꼴" style:family="text">
      <style:text-properties fo:color="#000000"/>
    </style:style>
    <style:style style:name="T1699" style:parent-style-name="기본단락글꼴" style:family="text">
      <style:text-properties fo:color="#0000C0"/>
    </style:style>
    <style:style style:name="T1700" style:parent-style-name="기본단락글꼴" style:family="text">
      <style:text-properties fo:color="#000000"/>
    </style:style>
    <style:style style:name="P1701" style:parent-style-name="코드표" style:family="paragraph">
      <style:text-properties fo:color="#000000"/>
    </style:style>
    <style:style style:name="P1702" style:parent-style-name="코드표" style:family="paragraph">
      <style:text-properties fo:color="#000000"/>
    </style:style>
    <style:style style:name="TableColumn1704" style:family="table-column">
      <style:table-column-properties style:column-width="7.2569in" style:use-optimal-column-width="false"/>
    </style:style>
    <style:style style:name="Table1703" style:family="table">
      <style:table-properties style:width="7.2569in" fo:margin-left="0in" table:align="left"/>
    </style:style>
    <style:style style:name="TableRow1705" style:family="table-row">
      <style:table-row-properties style:use-optimal-row-height="false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T1707" style:parent-style-name="기본단락글꼴" style:family="text">
      <style:text-properties fo:color="#7F0055"/>
    </style:style>
    <style:style style:name="T1708" style:parent-style-name="기본단락글꼴" style:family="text">
      <style:text-properties fo:color="#000000"/>
    </style:style>
    <style:style style:name="T1709" style:parent-style-name="기본단락글꼴" style:family="text">
      <style:text-properties fo:color="#7F0055"/>
    </style:style>
    <style:style style:name="T1710" style:parent-style-name="기본단락글꼴" style:family="text">
      <style:text-properties fo:color="#000000"/>
    </style:style>
    <style:style style:name="T1711" style:parent-style-name="기본단락글꼴" style:family="text">
      <style:text-properties fo:color="#7F0055"/>
    </style:style>
    <style:style style:name="T1712" style:parent-style-name="기본단락글꼴" style:family="text">
      <style:text-properties fo:color="#000000"/>
    </style:style>
    <style:style style:name="T1713" style:parent-style-name="기본단락글꼴" style:family="text">
      <style:text-properties fo:color="#7F0055"/>
    </style:style>
    <style:style style:name="T1714" style:parent-style-name="기본단락글꼴" style:family="text">
      <style:text-properties fo:color="#000000"/>
    </style:style>
    <style:style style:name="T1715" style:parent-style-name="기본단락글꼴" style:family="text">
      <style:text-properties fo:color="#7F0055"/>
    </style:style>
    <style:style style:name="T1716" style:parent-style-name="기본단락글꼴" style:family="text">
      <style:text-properties fo:color="#000000"/>
    </style:style>
    <style:style style:name="T1717" style:parent-style-name="기본단락글꼴" style:family="text">
      <style:text-properties fo:color="#000000"/>
    </style:style>
    <style:style style:name="T1718" style:parent-style-name="기본단락글꼴" style:family="text">
      <style:text-properties fo:color="#7F0055"/>
    </style:style>
    <style:style style:name="T1719" style:parent-style-name="기본단락글꼴" style:family="text">
      <style:text-properties fo:color="#000000"/>
    </style:style>
    <style:style style:name="T1720" style:parent-style-name="기본단락글꼴" style:family="text">
      <style:text-properties fo:color="#7F0055"/>
    </style:style>
    <style:style style:name="T1721" style:parent-style-name="기본단락글꼴" style:family="text">
      <style:text-properties fo:color="#000000"/>
    </style:style>
    <style:style style:name="T1722" style:parent-style-name="기본단락글꼴" style:family="text">
      <style:text-properties fo:color="#7F0055"/>
    </style:style>
    <style:style style:name="T1723" style:parent-style-name="기본단락글꼴" style:family="text">
      <style:text-properties fo:color="#000000"/>
    </style:style>
    <style:style style:name="T1724" style:parent-style-name="기본단락글꼴" style:family="text">
      <style:text-properties fo:color="#6A3E3E"/>
    </style:style>
    <style:style style:name="T1725" style:parent-style-name="기본단락글꼴" style:family="text">
      <style:text-properties fo:color="#000000"/>
    </style:style>
    <style:style style:name="T1726" style:parent-style-name="기본단락글꼴" style:family="text">
      <style:text-properties fo:color="#000000"/>
    </style:style>
    <style:style style:name="T1727" style:parent-style-name="기본단락글꼴" style:family="text">
      <style:text-properties fo:color="#6A3E3E"/>
    </style:style>
    <style:style style:name="T1728" style:parent-style-name="기본단락글꼴" style:family="text">
      <style:text-properties fo:color="#000000"/>
    </style:style>
    <style:style style:name="T1729" style:parent-style-name="기본단락글꼴" style:family="text">
      <style:text-properties fo:color="#7F0055"/>
    </style:style>
    <style:style style:name="T1730" style:parent-style-name="기본단락글꼴" style:family="text">
      <style:text-properties fo:color="#000000"/>
    </style:style>
    <style:style style:name="T1731" style:parent-style-name="기본단락글꼴" style:family="text">
      <style:text-properties fo:color="#000000"/>
    </style:style>
    <style:style style:name="T1732" style:parent-style-name="기본단락글꼴" style:family="text">
      <style:text-properties fo:color="#6A3E3E"/>
    </style:style>
    <style:style style:name="T1733" style:parent-style-name="기본단락글꼴" style:family="text">
      <style:text-properties fo:color="#000000"/>
    </style:style>
    <style:style style:name="T1734" style:parent-style-name="기본단락글꼴" style:family="text">
      <style:text-properties fo:color="#7F0055"/>
    </style:style>
    <style:style style:name="T1735" style:parent-style-name="기본단락글꼴" style:family="text">
      <style:text-properties fo:color="#000000"/>
    </style:style>
    <style:style style:name="T1736" style:parent-style-name="기본단락글꼴" style:family="text">
      <style:text-properties fo:color="#2A00FF"/>
    </style:style>
    <style:style style:name="T1737" style:parent-style-name="기본단락글꼴" style:family="text">
      <style:text-properties fo:color="#2A00FF"/>
    </style:style>
    <style:style style:name="T1738" style:parent-style-name="기본단락글꼴" style:family="text">
      <style:text-properties fo:color="#2A00FF"/>
    </style:style>
    <style:style style:name="T1739" style:parent-style-name="기본단락글꼴" style:family="text">
      <style:text-properties fo:color="#000000"/>
    </style:style>
    <style:style style:name="T1740" style:parent-style-name="기본단락글꼴" style:family="text">
      <style:text-properties fo:color="#000000"/>
    </style:style>
    <style:style style:name="T1741" style:parent-style-name="기본단락글꼴" style:family="text">
      <style:text-properties fo:color="#6A3E3E"/>
    </style:style>
    <style:style style:name="T1742" style:parent-style-name="기본단락글꼴" style:family="text">
      <style:text-properties fo:color="#000000"/>
    </style:style>
    <style:style style:name="T1743" style:parent-style-name="기본단락글꼴" style:family="text">
      <style:text-properties fo:color="#7F0055"/>
    </style:style>
    <style:style style:name="T1744" style:parent-style-name="기본단락글꼴" style:family="text">
      <style:text-properties fo:color="#000000"/>
    </style:style>
    <style:style style:name="T1745" style:parent-style-name="기본단락글꼴" style:family="text">
      <style:text-properties fo:color="#2A00FF"/>
    </style:style>
    <style:style style:name="T1746" style:parent-style-name="기본단락글꼴" style:family="text">
      <style:text-properties fo:color="#2A00FF"/>
    </style:style>
    <style:style style:name="T1747" style:parent-style-name="기본단락글꼴" style:family="text">
      <style:text-properties fo:color="#2A00FF"/>
    </style:style>
    <style:style style:name="T1748" style:parent-style-name="기본단락글꼴" style:family="text">
      <style:text-properties fo:color="#000000"/>
    </style:style>
    <style:style style:name="T1749" style:parent-style-name="기본단락글꼴" style:family="text">
      <style:text-properties fo:color="#000000"/>
    </style:style>
    <style:style style:name="T1750" style:parent-style-name="기본단락글꼴" style:family="text">
      <style:text-properties fo:color="#0000C0"/>
    </style:style>
    <style:style style:name="T1751" style:parent-style-name="기본단락글꼴" style:family="text">
      <style:text-properties fo:color="#000000"/>
    </style:style>
    <style:style style:name="T1752" style:parent-style-name="기본단락글꼴" style:family="text">
      <style:text-properties fo:color="#2A00FF"/>
    </style:style>
    <style:style style:name="T1753" style:parent-style-name="기본단락글꼴" style:family="text">
      <style:text-properties fo:color="#000000"/>
    </style:style>
    <style:style style:name="T1754" style:parent-style-name="기본단락글꼴" style:family="text">
      <style:text-properties fo:color="#6A3E3E"/>
    </style:style>
    <style:style style:name="T1755" style:parent-style-name="기본단락글꼴" style:family="text">
      <style:text-properties fo:color="#000000"/>
    </style:style>
    <style:style style:name="T1756" style:parent-style-name="기본단락글꼴" style:family="text">
      <style:text-properties fo:color="#6A3E3E"/>
    </style:style>
    <style:style style:name="T1757" style:parent-style-name="기본단락글꼴" style:family="text">
      <style:text-properties fo:color="#000000"/>
    </style:style>
    <style:style style:name="T1758" style:parent-style-name="기본단락글꼴" style:family="text">
      <style:text-properties fo:color="#6A3E3E"/>
    </style:style>
    <style:style style:name="T1759" style:parent-style-name="기본단락글꼴" style:family="text">
      <style:text-properties fo:color="#000000"/>
    </style:style>
    <style:style style:name="T1760" style:parent-style-name="기본단락글꼴" style:family="text">
      <style:text-properties fo:color="#000000"/>
    </style:style>
    <style:style style:name="T1761" style:parent-style-name="기본단락글꼴" style:family="text">
      <style:text-properties fo:color="#6A3E3E"/>
    </style:style>
    <style:style style:name="T1762" style:parent-style-name="기본단락글꼴" style:family="text">
      <style:text-properties fo:color="#000000"/>
    </style:style>
    <style:style style:name="T1763" style:parent-style-name="기본단락글꼴" style:family="text">
      <style:text-properties fo:color="#000000"/>
    </style:style>
    <style:style style:name="T1764" style:parent-style-name="기본단락글꼴" style:family="text">
      <style:text-properties fo:color="#0000C0"/>
    </style:style>
    <style:style style:name="T1765" style:parent-style-name="기본단락글꼴" style:family="text">
      <style:text-properties fo:color="#000000"/>
    </style:style>
    <style:style style:name="T1766" style:parent-style-name="기본단락글꼴" style:family="text">
      <style:text-properties fo:color="#2A00FF"/>
    </style:style>
    <style:style style:name="T1767" style:parent-style-name="기본단락글꼴" style:family="text">
      <style:text-properties fo:color="#000000"/>
    </style:style>
    <style:style style:name="T1768" style:parent-style-name="기본단락글꼴" style:family="text">
      <style:text-properties fo:color="#6A3E3E"/>
    </style:style>
    <style:style style:name="T1769" style:parent-style-name="기본단락글꼴" style:family="text">
      <style:text-properties fo:color="#000000"/>
    </style:style>
    <style:style style:name="T1770" style:parent-style-name="기본단락글꼴" style:family="text">
      <style:text-properties fo:color="#6A3E3E"/>
    </style:style>
    <style:style style:name="T1771" style:parent-style-name="기본단락글꼴" style:family="text">
      <style:text-properties fo:color="#000000"/>
    </style:style>
    <style:style style:name="T1772" style:parent-style-name="기본단락글꼴" style:family="text">
      <style:text-properties fo:color="#6A3E3E"/>
    </style:style>
    <style:style style:name="T1773" style:parent-style-name="기본단락글꼴" style:family="text">
      <style:text-properties fo:color="#000000"/>
    </style:style>
    <style:style style:name="P1774" style:parent-style-name="코드표" style:family="paragraph">
      <style:text-properties fo:color="#000000"/>
    </style:style>
    <style:style style:name="P1775" style:parent-style-name="코드표" style:family="paragraph">
      <style:text-properties fo:color="#000000"/>
    </style:style>
    <style:style style:name="TableColumn1777" style:family="table-column">
      <style:table-column-properties style:column-width="7.2611in" style:use-optimal-column-width="false"/>
    </style:style>
    <style:style style:name="Table1776" style:family="table">
      <style:table-properties style:width="7.2611in" fo:margin-left="0.0034in" table:align="left"/>
    </style:style>
    <style:style style:name="TableRow1778" style:family="table-row">
      <style:table-row-properties style:use-optimal-row-height="false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Standard" style:family="paragraph">
      <style:paragraph-properties fo:text-align="start"/>
    </style:style>
    <style:style style:name="T1781" style:parent-style-name="기본단락글꼴" style:family="text">
      <style:text-properties style:font-name-complex="굴림체" fo:color="#000000" style:letter-kerning="false" style:font-size-complex="10pt"/>
    </style:style>
    <style:style style:name="T1782" style:parent-style-name="기본단락글꼴" style:family="text">
      <style:text-properties style:font-name-complex="굴림체" fo:color="#000000" style:letter-kerning="false" style:font-size-complex="10pt"/>
    </style:style>
    <style:style style:name="T1783" style:parent-style-name="기본단락글꼴" style:family="text">
      <style:text-properties style:font-name-complex="굴림체" fo:color="#000000" style:letter-kerning="false" style:font-size-complex="10pt"/>
    </style:style>
    <style:style style:name="T1784" style:parent-style-name="기본단락글꼴" style:family="text">
      <style:text-properties style:font-name-complex="굴림체" fo:color="#000000" style:letter-kerning="false" style:font-size-complex="10pt"/>
    </style:style>
    <style:style style:name="T1785" style:parent-style-name="기본단락글꼴" style:family="text">
      <style:text-properties style:font-name-complex="굴림체" fo:color="#000000" style:letter-kerning="false" style:font-size-complex="10pt"/>
    </style:style>
    <style:style style:name="P1786" style:parent-style-name="Standard" style:family="paragraph">
      <style:paragraph-properties fo:text-align="start"/>
    </style:style>
    <style:style style:name="T1787" style:parent-style-name="기본단락글꼴" style:family="text">
      <style:text-properties style:font-name-complex="굴림체" fo:color="#000000" style:letter-kerning="false" style:font-size-complex="10pt"/>
    </style:style>
    <style:style style:name="T1788" style:parent-style-name="기본단락글꼴" style:family="text">
      <style:text-properties style:font-name-complex="굴림체" fo:color="#000000" style:letter-kerning="false" style:font-size-complex="10pt"/>
    </style:style>
    <style:style style:name="T1789" style:parent-style-name="기본단락글꼴" style:family="text">
      <style:text-properties style:font-name-complex="굴림체" fo:color="#000000" style:letter-kerning="false" style:font-size-complex="10pt"/>
    </style:style>
    <style:style style:name="P1790" style:parent-style-name="Standard" style:family="paragraph">
      <style:paragraph-properties fo:widows="2" fo:orphans="2" style:snap-to-layout-grid="true" fo:margin-bottom="0.1111in" fo:line-height="107%"/>
    </style:style>
    <style:style style:name="TableColumn1792" style:family="table-column">
      <style:table-column-properties style:column-width="7.2569in" style:use-optimal-column-width="false"/>
    </style:style>
    <style:style style:name="Table1791" style:family="table">
      <style:table-properties style:width="7.2569in" fo:margin-left="0in" table:align="left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T1795" style:parent-style-name="기본단락글꼴" style:family="text">
      <style:text-properties fo:color="#7F0055"/>
    </style:style>
    <style:style style:name="T1796" style:parent-style-name="기본단락글꼴" style:family="text">
      <style:text-properties fo:color="#000000"/>
    </style:style>
    <style:style style:name="T1797" style:parent-style-name="기본단락글꼴" style:family="text">
      <style:text-properties fo:color="#7F0055"/>
    </style:style>
    <style:style style:name="T1798" style:parent-style-name="기본단락글꼴" style:family="text">
      <style:text-properties fo:color="#000000"/>
    </style:style>
    <style:style style:name="T1799" style:parent-style-name="기본단락글꼴" style:family="text">
      <style:text-properties fo:color="#7F0055"/>
    </style:style>
    <style:style style:name="T1800" style:parent-style-name="기본단락글꼴" style:family="text">
      <style:text-properties fo:color="#000000"/>
    </style:style>
    <style:style style:name="T1801" style:parent-style-name="기본단락글꼴" style:family="text">
      <style:text-properties fo:color="#7F0055"/>
    </style:style>
    <style:style style:name="T1802" style:parent-style-name="기본단락글꼴" style:family="text">
      <style:text-properties fo:color="#000000"/>
    </style:style>
    <style:style style:name="T1803" style:parent-style-name="기본단락글꼴" style:family="text">
      <style:text-properties fo:color="#7F0055"/>
    </style:style>
    <style:style style:name="T1804" style:parent-style-name="기본단락글꼴" style:family="text">
      <style:text-properties fo:color="#000000"/>
    </style:style>
    <style:style style:name="T1805" style:parent-style-name="기본단락글꼴" style:family="text">
      <style:text-properties fo:color="#000000"/>
    </style:style>
    <style:style style:name="T1806" style:parent-style-name="기본단락글꼴" style:family="text">
      <style:text-properties fo:color="#7F0055"/>
    </style:style>
    <style:style style:name="T1807" style:parent-style-name="기본단락글꼴" style:family="text">
      <style:text-properties fo:color="#000000"/>
    </style:style>
    <style:style style:name="T1808" style:parent-style-name="기본단락글꼴" style:family="text">
      <style:text-properties fo:color="#7F0055"/>
    </style:style>
    <style:style style:name="T1809" style:parent-style-name="기본단락글꼴" style:family="text">
      <style:text-properties fo:color="#000000"/>
    </style:style>
    <style:style style:name="T1810" style:parent-style-name="기본단락글꼴" style:family="text">
      <style:text-properties fo:color="#7F0055"/>
    </style:style>
    <style:style style:name="T1811" style:parent-style-name="기본단락글꼴" style:family="text">
      <style:text-properties fo:color="#000000"/>
    </style:style>
    <style:style style:name="T1812" style:parent-style-name="기본단락글꼴" style:family="text">
      <style:text-properties fo:color="#6A3E3E"/>
    </style:style>
    <style:style style:name="T1813" style:parent-style-name="기본단락글꼴" style:family="text">
      <style:text-properties fo:color="#000000"/>
    </style:style>
    <style:style style:name="T1814" style:parent-style-name="기본단락글꼴" style:family="text">
      <style:text-properties fo:color="#000000"/>
    </style:style>
    <style:style style:name="T1815" style:parent-style-name="기본단락글꼴" style:family="text">
      <style:text-properties fo:color="#6A3E3E"/>
    </style:style>
    <style:style style:name="T1816" style:parent-style-name="기본단락글꼴" style:family="text">
      <style:text-properties fo:color="#000000"/>
    </style:style>
    <style:style style:name="T1817" style:parent-style-name="기본단락글꼴" style:family="text">
      <style:text-properties fo:color="#7F0055"/>
    </style:style>
    <style:style style:name="T1818" style:parent-style-name="기본단락글꼴" style:family="text">
      <style:text-properties fo:color="#000000"/>
    </style:style>
    <style:style style:name="T1819" style:parent-style-name="기본단락글꼴" style:family="text">
      <style:text-properties fo:color="#000000"/>
    </style:style>
    <style:style style:name="T1820" style:parent-style-name="기본단락글꼴" style:family="text">
      <style:text-properties fo:color="#6A3E3E"/>
    </style:style>
    <style:style style:name="T1821" style:parent-style-name="기본단락글꼴" style:family="text">
      <style:text-properties fo:color="#000000"/>
    </style:style>
    <style:style style:name="T1822" style:parent-style-name="기본단락글꼴" style:family="text">
      <style:text-properties fo:color="#2A00FF"/>
    </style:style>
    <style:style style:name="T1823" style:parent-style-name="기본단락글꼴" style:family="text">
      <style:text-properties fo:color="#000000"/>
    </style:style>
    <style:style style:name="T1824" style:parent-style-name="기본단락글꼴" style:family="text">
      <style:text-properties fo:color="#000000"/>
    </style:style>
    <style:style style:name="T1825" style:parent-style-name="기본단락글꼴" style:family="text">
      <style:text-properties fo:color="#6A3E3E"/>
    </style:style>
    <style:style style:name="T1826" style:parent-style-name="기본단락글꼴" style:family="text">
      <style:text-properties fo:color="#000000"/>
    </style:style>
    <style:style style:name="T1827" style:parent-style-name="기본단락글꼴" style:family="text">
      <style:text-properties fo:color="#2A00FF"/>
    </style:style>
    <style:style style:name="T1828" style:parent-style-name="기본단락글꼴" style:family="text">
      <style:text-properties fo:color="#000000"/>
    </style:style>
    <style:style style:name="T1829" style:parent-style-name="기본단락글꼴" style:family="text">
      <style:text-properties fo:color="#000000"/>
    </style:style>
    <style:style style:name="T1830" style:parent-style-name="기본단락글꼴" style:family="text">
      <style:text-properties fo:color="#6A3E3E"/>
    </style:style>
    <style:style style:name="T1831" style:parent-style-name="기본단락글꼴" style:family="text">
      <style:text-properties fo:color="#000000"/>
    </style:style>
    <style:style style:name="T1832" style:parent-style-name="기본단락글꼴" style:family="text">
      <style:text-properties fo:color="#2A00FF"/>
    </style:style>
    <style:style style:name="T1833" style:parent-style-name="기본단락글꼴" style:family="text">
      <style:text-properties fo:color="#000000"/>
    </style:style>
    <style:style style:name="T1834" style:parent-style-name="기본단락글꼴" style:family="text">
      <style:text-properties fo:color="#000000"/>
    </style:style>
    <style:style style:name="T1835" style:parent-style-name="기본단락글꼴" style:family="text">
      <style:text-properties fo:color="#7F0055"/>
    </style:style>
    <style:style style:name="T1836" style:parent-style-name="기본단락글꼴" style:family="text">
      <style:text-properties fo:color="#000000"/>
    </style:style>
    <style:style style:name="T1837" style:parent-style-name="기본단락글꼴" style:family="text">
      <style:text-properties fo:color="#6A3E3E"/>
    </style:style>
    <style:style style:name="T1838" style:parent-style-name="기본단락글꼴" style:family="text">
      <style:text-properties fo:color="#000000"/>
    </style:style>
    <style:style style:name="T1839" style:parent-style-name="기본단락글꼴" style:family="text">
      <style:text-properties fo:color="#6A3E3E"/>
    </style:style>
    <style:style style:name="T1840" style:parent-style-name="기본단락글꼴" style:family="text">
      <style:text-properties fo:color="#000000"/>
    </style:style>
    <style:style style:name="T1841" style:parent-style-name="기본단락글꼴" style:family="text">
      <style:text-properties fo:color="#000000"/>
    </style:style>
    <style:style style:name="T1842" style:parent-style-name="기본단락글꼴" style:family="text">
      <style:text-properties fo:color="#0000C0"/>
    </style:style>
    <style:style style:name="T1843" style:parent-style-name="기본단락글꼴" style:family="text">
      <style:text-properties fo:color="#000000"/>
    </style:style>
    <style:style style:name="T1844" style:parent-style-name="기본단락글꼴" style:family="text">
      <style:text-properties fo:color="#2A00FF"/>
    </style:style>
    <style:style style:name="T1845" style:parent-style-name="기본단락글꼴" style:family="text">
      <style:text-properties fo:color="#000000"/>
    </style:style>
    <style:style style:name="T1846" style:parent-style-name="기본단락글꼴" style:family="text">
      <style:text-properties fo:color="#6A3E3E"/>
    </style:style>
    <style:style style:name="T1847" style:parent-style-name="기본단락글꼴" style:family="text">
      <style:text-properties fo:color="#000000"/>
    </style:style>
    <style:style style:name="T1848" style:parent-style-name="기본단락글꼴" style:family="text">
      <style:text-properties fo:color="#6A3E3E"/>
    </style:style>
    <style:style style:name="T1849" style:parent-style-name="기본단락글꼴" style:family="text">
      <style:text-properties fo:color="#000000"/>
    </style:style>
    <style:style style:name="T1850" style:parent-style-name="기본단락글꼴" style:family="text">
      <style:text-properties fo:color="#6A3E3E"/>
    </style:style>
    <style:style style:name="T1851" style:parent-style-name="기본단락글꼴" style:family="text">
      <style:text-properties fo:color="#000000"/>
    </style:style>
    <style:style style:name="T1852" style:parent-style-name="기본단락글꼴" style:family="text">
      <style:text-properties fo:color="#000000"/>
    </style:style>
    <style:style style:name="T1853" style:parent-style-name="기본단락글꼴" style:family="text">
      <style:text-properties fo:color="#0000C0"/>
    </style:style>
    <style:style style:name="T1854" style:parent-style-name="기본단락글꼴" style:family="text">
      <style:text-properties fo:color="#000000"/>
    </style:style>
    <style:style style:name="T1855" style:parent-style-name="기본단락글꼴" style:family="text">
      <style:text-properties fo:color="#000000"/>
    </style:style>
    <style:style style:name="T1856" style:parent-style-name="기본단락글꼴" style:family="text">
      <style:text-properties fo:color="#7F0055"/>
    </style:style>
    <style:style style:name="T1857" style:parent-style-name="기본단락글꼴" style:family="text">
      <style:text-properties fo:color="#000000"/>
    </style:style>
    <style:style style:name="T1858" style:parent-style-name="기본단락글꼴" style:family="text">
      <style:text-properties fo:color="#6A3E3E"/>
    </style:style>
    <style:style style:name="T1859" style:parent-style-name="기본단락글꼴" style:family="text">
      <style:text-properties fo:color="#000000"/>
    </style:style>
    <style:style style:name="T1860" style:parent-style-name="기본단락글꼴" style:family="text">
      <style:text-properties fo:color="#6A3E3E"/>
    </style:style>
    <style:style style:name="T1861" style:parent-style-name="기본단락글꼴" style:family="text">
      <style:text-properties fo:color="#000000"/>
    </style:style>
    <style:style style:name="T1862" style:parent-style-name="기본단락글꼴" style:family="text">
      <style:text-properties fo:color="#000000"/>
    </style:style>
    <style:style style:name="T1863" style:parent-style-name="기본단락글꼴" style:family="text">
      <style:text-properties fo:color="#0000C0"/>
    </style:style>
    <style:style style:name="T1864" style:parent-style-name="기본단락글꼴" style:family="text">
      <style:text-properties fo:color="#000000"/>
    </style:style>
    <style:style style:name="T1865" style:parent-style-name="기본단락글꼴" style:family="text">
      <style:text-properties fo:color="#2A00FF"/>
    </style:style>
    <style:style style:name="T1866" style:parent-style-name="기본단락글꼴" style:family="text">
      <style:text-properties fo:color="#000000"/>
    </style:style>
    <style:style style:name="T1867" style:parent-style-name="기본단락글꼴" style:family="text">
      <style:text-properties fo:color="#6A3E3E"/>
    </style:style>
    <style:style style:name="T1868" style:parent-style-name="기본단락글꼴" style:family="text">
      <style:text-properties fo:color="#000000"/>
    </style:style>
    <style:style style:name="T1869" style:parent-style-name="기본단락글꼴" style:family="text">
      <style:text-properties fo:color="#6A3E3E"/>
    </style:style>
    <style:style style:name="T1870" style:parent-style-name="기본단락글꼴" style:family="text">
      <style:text-properties fo:color="#000000"/>
    </style:style>
    <style:style style:name="T1871" style:parent-style-name="기본단락글꼴" style:family="text">
      <style:text-properties fo:color="#000000"/>
    </style:style>
    <style:style style:name="T1872" style:parent-style-name="기본단락글꼴" style:family="text">
      <style:text-properties fo:color="#0000C0"/>
    </style:style>
    <style:style style:name="T1873" style:parent-style-name="기본단락글꼴" style:family="text">
      <style:text-properties fo:color="#000000"/>
    </style:style>
    <style:style style:name="P1874" style:parent-style-name="코드표" style:family="paragraph">
      <style:text-properties fo:color="#000000"/>
    </style:style>
    <style:style style:name="P1875" style:parent-style-name="코드표" style:family="paragraph">
      <style:text-properties fo:color="#000000"/>
    </style:style>
    <style:style style:name="TableColumn1877" style:family="table-column">
      <style:table-column-properties style:column-width="7.2611in" style:use-optimal-column-width="false"/>
    </style:style>
    <style:style style:name="Table1876" style:family="table">
      <style:table-properties style:width="7.2611in" fo:margin-left="0.0034in" table:align="left"/>
    </style:style>
    <style:style style:name="TableRow1878" style:family="table-row">
      <style:table-row-properties style:use-optimal-row-height="false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start"/>
    </style:style>
    <style:style style:name="T1881" style:parent-style-name="기본단락글꼴" style:family="text">
      <style:text-properties style:font-name-complex="굴림체" fo:color="#000000" style:letter-kerning="false" style:font-size-complex="10pt"/>
    </style:style>
    <style:style style:name="P1882" style:parent-style-name="Standard" style:family="paragraph">
      <style:paragraph-properties fo:text-align="start"/>
    </style:style>
    <style:style style:name="T1883" style:parent-style-name="기본단락글꼴" style:family="text">
      <style:text-properties style:font-name-complex="굴림체" fo:color="#000000" style:letter-kerning="false" style:font-size-complex="10pt"/>
    </style:style>
    <style:style style:name="P1884" style:parent-style-name="Standard" style:family="paragraph">
      <style:paragraph-properties fo:widows="2" fo:orphans="2" style:snap-to-layout-grid="true" fo:margin-bottom="0.1111in" fo:line-height="107%"/>
    </style:style>
    <style:style style:name="TableColumn1886" style:family="table-column">
      <style:table-column-properties style:column-width="7.2611in" style:use-optimal-column-width="false"/>
    </style:style>
    <style:style style:name="Table1885" style:family="table">
      <style:table-properties style:width="7.2611in" fo:margin-left="0.0034in" table:align="left"/>
    </style:style>
    <style:style style:name="TableRow1887" style:family="table-row">
      <style:table-row-properties style:use-optimal-row-height="false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89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89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89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89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89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8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8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89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0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0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0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0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0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1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1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1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13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1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1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1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2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2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92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2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2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2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2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2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2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3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3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3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3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3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935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3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3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3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3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4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4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4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4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45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4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4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48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949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5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5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5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5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5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5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5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5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5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5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6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61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96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6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6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6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6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6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7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2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7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4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7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6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7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78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19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198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8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83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198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8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8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8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8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9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9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9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199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1994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199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9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9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1998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199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0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0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0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0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0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0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0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0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0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0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01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1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1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7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8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1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1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2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4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T2025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026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027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2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2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030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3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32" style:parent-style-name="Standard" style:family="paragraph">
      <style:paragraph-properties fo:widows="2" fo:orphans="2" style:snap-to-layout-grid="true" fo:text-align="start" style:line-height-at-least="0.1875in" fo:background-color="#FFFFFF">
        <style:background-fill draw:fill="solid" draw:fill-color="#FFFFFF"/>
      </style:paragraph-properties>
    </style:style>
    <style:style style:name="T203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34" style:parent-style-name="Standard" style:family="paragraph">
      <style:paragraph-properties fo:widows="2" fo:orphans="2" style:snap-to-layout-grid="true" fo:margin-bottom="0.1111in" fo:line-height="107%"/>
    </style:style>
    <style:style style:name="P2035" style:parent-style-name="Standard" style:family="paragraph">
      <style:paragraph-properties fo:widows="2" fo:orphans="2" fo:margin-bottom="0.1111in" fo:line-height="107%"/>
    </style:style>
    <style:style style:name="P2036" style:parent-style-name="Standard" style:family="paragraph">
      <style:paragraph-properties fo:widows="2" fo:orphans="2" fo:margin-bottom="0.1111in" fo:line-height="107%"/>
    </style:style>
    <style:style style:name="T2037" style:parent-style-name="기본단락글꼴" style:family="text">
      <style:text-properties style:font-name="맑은 고딕" style:font-name-asian="맑은 고딕" style:font-name-complex="맑은 고딕"/>
    </style:style>
    <style:style style:name="T2038" style:parent-style-name="기본단락글꼴" style:family="text">
      <style:text-properties style:font-name="맑은 고딕" style:font-name-asian="맑은 고딕" style:font-name-complex="맑은 고딕"/>
    </style:style>
    <style:style style:name="T2039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0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1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2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3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4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5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6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7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8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49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0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1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2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3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4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T2055" style:parent-style-name="기본단락글꼴" style:family="text">
      <style:text-properties style:text-underline-type="single" style:text-underline-style="solid" style:text-underline-width="auto" style:text-underline-mode="continuous"/>
    </style:style>
    <style:style style:name="P2056" style:parent-style-name="Standard" style:family="paragraph">
      <style:paragraph-properties fo:widows="2" fo:orphans="2" style:snap-to-layout-grid="true" fo:margin-bottom="0.1111in" fo:line-height="107%"/>
    </style:style>
    <style:style style:name="TableColumn2058" style:family="table-column">
      <style:table-column-properties style:column-width="7.2611in" style:use-optimal-column-width="false"/>
    </style:style>
    <style:style style:name="Table2057" style:family="table">
      <style:table-properties style:width="7.2611in" fo:margin-left="0.0034in" table:align="left"/>
    </style:style>
    <style:style style:name="TableRow2059" style:family="table-row">
      <style:table-row-properties style:use-optimal-row-height="false"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6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6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64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6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66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067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6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6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7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7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7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73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7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7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7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77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078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7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80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8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82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8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84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8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86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87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88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8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90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9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092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093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09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9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9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9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09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099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00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01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0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03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0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0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0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0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0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1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1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1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13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1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1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1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17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19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20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21" style:parent-style-name="기본단락글꼴" style:family="text">
      <style:text-properties style:font-name-asian="굴림" style:font-name-complex="굴림" fo:color="#A31515" style:letter-kerning="false" style:font-size-complex="10pt"/>
    </style:style>
    <style:style style:name="T212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23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24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25" style:parent-style-name="기본단락글꼴" style:family="text">
      <style:text-properties style:font-name-asian="굴림" style:font-name-complex="굴림" fo:color="#0000FF" style:letter-kerning="false" style:font-size-complex="10pt"/>
    </style:style>
    <style:style style:name="T212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27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  <style:text-properties style:font-name-asian="굴림" style:font-name-complex="굴림" fo:color="#000000" style:letter-kerning="false" style:font-size-complex="10pt"/>
    </style:style>
    <style:style style:name="P2128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29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30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131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32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33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134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35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36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137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3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2139" style:parent-style-name="기본단락글꼴" style:family="text">
      <style:text-properties style:font-name-asian="굴림" style:font-name-complex="굴림" fo:color="#008000" style:letter-kerning="false" style:font-size-complex="10pt"/>
    </style:style>
    <style:style style:name="P2140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41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42" style:parent-style-name="Standard" style:family="paragraph">
      <style:paragraph-properties fo:widows="2" fo:orphans="2" style:snap-to-layout-grid="true" fo:text-align="start" fo:line-height="0.1666in" fo:background-color="#FFFFFF">
        <style:background-fill draw:fill="solid" draw:fill-color="#FFFFFF"/>
      </style:paragraph-properties>
    </style:style>
    <style:style style:name="T2143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2144" style:parent-style-name="Standard" style:family="paragraph">
      <style:paragraph-properties fo:widows="2" fo:orphans="2" fo:margin-bottom="0.1111in" fo:line-height="107%"/>
    </style:style>
    <style:style style:name="TableColumn2146" style:family="table-column">
      <style:table-column-properties style:column-width="7.2611in" style:use-optimal-column-width="false"/>
    </style:style>
    <style:style style:name="Table2145" style:family="table">
      <style:table-properties style:width="7.2611in" fo:margin-left="0.0034in" table:align="left"/>
    </style:style>
    <style:style style:name="TableRow2147" style:family="table-row">
      <style:table-row-properties style:use-optimal-row-height="false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T2149" style:parent-style-name="기본단락글꼴" style:family="text">
      <style:text-properties fo:color="#000000"/>
    </style:style>
    <style:style style:name="T2150" style:parent-style-name="기본단락글꼴" style:family="text">
      <style:text-properties fo:color="#646464"/>
    </style:style>
    <style:style style:name="T2151" style:parent-style-name="기본단락글꼴" style:family="text">
      <style:text-properties fo:color="#000000"/>
    </style:style>
    <style:style style:name="T2152" style:parent-style-name="기본단락글꼴" style:family="text">
      <style:text-properties fo:color="#7F0055"/>
    </style:style>
    <style:style style:name="T2153" style:parent-style-name="기본단락글꼴" style:family="text">
      <style:text-properties fo:color="#000000"/>
    </style:style>
    <style:style style:name="T2154" style:parent-style-name="기본단락글꼴" style:family="text">
      <style:text-properties fo:color="#7F0055"/>
    </style:style>
    <style:style style:name="T2155" style:parent-style-name="기본단락글꼴" style:family="text">
      <style:text-properties fo:color="#000000"/>
    </style:style>
    <style:style style:name="T2156" style:parent-style-name="기본단락글꼴" style:family="text">
      <style:text-properties fo:color="#000000"/>
    </style:style>
    <style:style style:name="T2157" style:parent-style-name="기본단락글꼴" style:family="text">
      <style:text-properties fo:color="#7F0055"/>
    </style:style>
    <style:style style:name="T2158" style:parent-style-name="기본단락글꼴" style:family="text">
      <style:text-properties fo:color="#000000"/>
    </style:style>
    <style:style style:name="T2159" style:parent-style-name="기본단락글꼴" style:family="text">
      <style:text-properties fo:color="#0000C0"/>
    </style:style>
    <style:style style:name="T2160" style:parent-style-name="기본단락글꼴" style:family="text">
      <style:text-properties fo:color="#000000"/>
    </style:style>
    <style:style style:name="T2161" style:parent-style-name="기본단락글꼴" style:family="text">
      <style:text-properties fo:color="#0000C0"/>
    </style:style>
    <style:style style:name="T2162" style:parent-style-name="기본단락글꼴" style:family="text">
      <style:text-properties fo:color="#000000"/>
    </style:style>
    <style:style style:name="P2163" style:parent-style-name="Standard" style:family="paragraph">
      <style:text-properties fo:color="#000000"/>
    </style:style>
    <style:style style:name="TableColumn2165" style:family="table-column">
      <style:table-column-properties style:column-width="7.2611in" style:use-optimal-column-width="false"/>
    </style:style>
    <style:style style:name="Table2164" style:family="table">
      <style:table-properties style:width="7.2611in" fo:margin-left="0.0034in" table:align="left"/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T2168" style:parent-style-name="기본단락글꼴" style:family="text">
      <style:text-properties fo:color="#000000"/>
    </style:style>
    <style:style style:name="T2169" style:parent-style-name="기본단락글꼴" style:family="text">
      <style:text-properties fo:color="#646464"/>
    </style:style>
    <style:style style:name="T2170" style:parent-style-name="기본단락글꼴" style:family="text">
      <style:text-properties fo:color="#000000"/>
    </style:style>
    <style:style style:name="T2171" style:parent-style-name="기본단락글꼴" style:family="text">
      <style:text-properties fo:color="#7F0055"/>
    </style:style>
    <style:style style:name="T2172" style:parent-style-name="기본단락글꼴" style:family="text">
      <style:text-properties fo:color="#000000"/>
    </style:style>
    <style:style style:name="T2173" style:parent-style-name="기본단락글꼴" style:family="text">
      <style:text-properties fo:color="#7F0055"/>
    </style:style>
    <style:style style:name="T2174" style:parent-style-name="기본단락글꼴" style:family="text">
      <style:text-properties fo:color="#000000"/>
    </style:style>
    <style:style style:name="T2175" style:parent-style-name="기본단락글꼴" style:family="text">
      <style:text-properties fo:color="#6A3E3E"/>
    </style:style>
    <style:style style:name="T2176" style:parent-style-name="기본단락글꼴" style:family="text">
      <style:text-properties fo:color="#000000"/>
    </style:style>
    <style:style style:name="T2177" style:parent-style-name="기본단락글꼴" style:family="text">
      <style:text-properties fo:color="#000000"/>
    </style:style>
    <style:style style:name="T2178" style:parent-style-name="기본단락글꼴" style:family="text">
      <style:text-properties fo:color="#7F0055"/>
    </style:style>
    <style:style style:name="T2179" style:parent-style-name="기본단락글꼴" style:family="text">
      <style:text-properties fo:color="#000000"/>
    </style:style>
    <style:style style:name="T2180" style:parent-style-name="기본단락글꼴" style:family="text">
      <style:text-properties fo:color="#7F0055"/>
    </style:style>
    <style:style style:name="T2181" style:parent-style-name="기본단락글꼴" style:family="text">
      <style:text-properties fo:color="#000000"/>
    </style:style>
    <style:style style:name="T2182" style:parent-style-name="기본단락글꼴" style:family="text">
      <style:text-properties fo:color="#6A3E3E"/>
    </style:style>
    <style:style style:name="T2183" style:parent-style-name="기본단락글꼴" style:family="text">
      <style:text-properties fo:color="#000000"/>
    </style:style>
    <style:style style:name="T2184" style:parent-style-name="기본단락글꼴" style:family="text">
      <style:text-properties fo:color="#7F0055"/>
    </style:style>
    <style:style style:name="T2185" style:parent-style-name="기본단락글꼴" style:family="text">
      <style:text-properties fo:color="#000000"/>
    </style:style>
    <style:style style:name="T2186" style:parent-style-name="기본단락글꼴" style:family="text">
      <style:text-properties fo:color="#7F0055"/>
    </style:style>
    <style:style style:name="T2187" style:parent-style-name="기본단락글꼴" style:family="text">
      <style:text-properties fo:color="#000000"/>
    </style:style>
    <style:style style:name="T2188" style:parent-style-name="기본단락글꼴" style:family="text">
      <style:text-properties fo:color="#000000"/>
    </style:style>
    <style:style style:name="T2189" style:parent-style-name="기본단락글꼴" style:family="text">
      <style:text-properties fo:color="#7F0055"/>
    </style:style>
    <style:style style:name="T2190" style:parent-style-name="기본단락글꼴" style:family="text">
      <style:text-properties fo:color="#000000"/>
    </style:style>
    <style:style style:name="T2191" style:parent-style-name="기본단락글꼴" style:family="text">
      <style:text-properties fo:color="#6A3E3E"/>
    </style:style>
    <style:style style:name="T2192" style:parent-style-name="기본단락글꼴" style:family="text">
      <style:text-properties fo:color="#000000"/>
    </style:style>
    <style:style style:name="T2193" style:parent-style-name="기본단락글꼴" style:family="text">
      <style:text-properties fo:color="#7F0055"/>
    </style:style>
    <style:style style:name="T2194" style:parent-style-name="기본단락글꼴" style:family="text">
      <style:text-properties fo:color="#000000"/>
    </style:style>
    <style:style style:name="T2195" style:parent-style-name="기본단락글꼴" style:family="text">
      <style:text-properties fo:color="#7F0055"/>
    </style:style>
    <style:style style:name="T2196" style:parent-style-name="기본단락글꼴" style:family="text">
      <style:text-properties fo:color="#000000"/>
    </style:style>
    <style:style style:name="T2197" style:parent-style-name="기본단락글꼴" style:family="text">
      <style:text-properties fo:color="#7F0055"/>
    </style:style>
    <style:style style:name="T2198" style:parent-style-name="기본단락글꼴" style:family="text">
      <style:text-properties fo:color="#000000"/>
    </style:style>
    <style:style style:name="T2199" style:parent-style-name="기본단락글꼴" style:family="text">
      <style:text-properties fo:color="#7F0055"/>
    </style:style>
    <style:style style:name="T2200" style:parent-style-name="기본단락글꼴" style:family="text">
      <style:text-properties fo:color="#000000"/>
    </style:style>
    <style:style style:name="T2201" style:parent-style-name="기본단락글꼴" style:family="text">
      <style:text-properties fo:color="#000000"/>
    </style:style>
    <style:style style:name="T2202" style:parent-style-name="기본단락글꼴" style:family="text">
      <style:text-properties fo:color="#6A3E3E"/>
    </style:style>
    <style:style style:name="T2203" style:parent-style-name="기본단락글꼴" style:family="text">
      <style:text-properties fo:color="#000000"/>
    </style:style>
    <style:style style:name="T2204" style:parent-style-name="기본단락글꼴" style:family="text">
      <style:text-properties fo:color="#6A3E3E"/>
    </style:style>
    <style:style style:name="T2205" style:parent-style-name="기본단락글꼴" style:family="text">
      <style:text-properties fo:color="#000000"/>
    </style:style>
    <style:style style:name="T2206" style:parent-style-name="기본단락글꼴" style:family="text">
      <style:text-properties fo:color="#000000"/>
    </style:style>
    <style:style style:name="T2207" style:parent-style-name="기본단락글꼴" style:family="text">
      <style:text-properties fo:color="#7F0055"/>
    </style:style>
    <style:style style:name="T2208" style:parent-style-name="기본단락글꼴" style:family="text">
      <style:text-properties fo:color="#000000"/>
    </style:style>
    <style:style style:name="T2209" style:parent-style-name="기본단락글꼴" style:family="text">
      <style:text-properties fo:color="#7F0055"/>
    </style:style>
    <style:style style:name="T2210" style:parent-style-name="기본단락글꼴" style:family="text">
      <style:text-properties fo:color="#000000"/>
    </style:style>
    <style:style style:name="T2211" style:parent-style-name="기본단락글꼴" style:family="text">
      <style:text-properties fo:color="#0000C0"/>
    </style:style>
    <style:style style:name="T2212" style:parent-style-name="기본단락글꼴" style:family="text">
      <style:text-properties fo:color="#000000"/>
    </style:style>
    <style:style style:name="T2213" style:parent-style-name="기본단락글꼴" style:family="text">
      <style:text-properties fo:color="#6A3E3E"/>
    </style:style>
    <style:style style:name="T2214" style:parent-style-name="기본단락글꼴" style:family="text">
      <style:text-properties fo:color="#000000"/>
    </style:style>
    <style:style style:name="T2215" style:parent-style-name="기본단락글꼴" style:family="text">
      <style:text-properties fo:color="#0000C0"/>
    </style:style>
    <style:style style:name="T2216" style:parent-style-name="기본단락글꼴" style:family="text">
      <style:text-properties fo:color="#000000"/>
    </style:style>
    <style:style style:name="T2217" style:parent-style-name="기본단락글꼴" style:family="text">
      <style:text-properties fo:color="#7F0055"/>
    </style:style>
    <style:style style:name="T2218" style:parent-style-name="기본단락글꼴" style:family="text">
      <style:text-properties fo:color="#000000"/>
    </style:style>
    <style:style style:name="T2219" style:parent-style-name="기본단락글꼴" style:family="text">
      <style:text-properties fo:color="#0000C0"/>
    </style:style>
    <style:style style:name="T2220" style:parent-style-name="기본단락글꼴" style:family="text">
      <style:text-properties fo:color="#000000"/>
    </style:style>
    <style:style style:name="T2221" style:parent-style-name="기본단락글꼴" style:family="text">
      <style:text-properties fo:color="#6A3E3E"/>
    </style:style>
    <style:style style:name="T2222" style:parent-style-name="기본단락글꼴" style:family="text">
      <style:text-properties fo:color="#000000"/>
    </style:style>
    <style:style style:name="T2223" style:parent-style-name="기본단락글꼴" style:family="text">
      <style:text-properties fo:color="#0000C0"/>
    </style:style>
    <style:style style:name="T2224" style:parent-style-name="기본단락글꼴" style:family="text">
      <style:text-properties fo:color="#000000"/>
    </style:style>
    <style:style style:name="P2225" style:parent-style-name="Standard" style:family="paragraph">
      <style:text-properties fo:color="#000000"/>
    </style:style>
    <style:style style:name="TableColumn2227" style:family="table-column">
      <style:table-column-properties style:column-width="7.2611in" style:use-optimal-column-width="false"/>
    </style:style>
    <style:style style:name="Table2226" style:family="table">
      <style:table-properties style:width="7.2611in" fo:margin-left="0.0034in" table:align="left"/>
    </style:style>
    <style:style style:name="TableRow2228" style:family="table-row">
      <style:table-row-properties style:use-optimal-row-height="false"/>
    </style:style>
    <style:style style:name="TableCell2229" style:family="table-cell">
      <style:table-cell-properties fo:border="0.0069in solid #000000" style:writing-mode="lr-tb" fo:padding-top="0in" fo:padding-left="0.075in" fo:padding-bottom="0in" fo:padding-right="0.075in"/>
    </style:style>
    <style:style style:name="T2230" style:parent-style-name="기본단락글꼴" style:family="text">
      <style:text-properties fo:color="#7F0055"/>
    </style:style>
    <style:style style:name="T2231" style:parent-style-name="기본단락글꼴" style:family="text">
      <style:text-properties fo:color="#7F0055"/>
    </style:style>
    <style:style style:name="T2232" style:parent-style-name="기본단락글꼴" style:family="text">
      <style:text-properties fo:color="#7F0055"/>
    </style:style>
    <style:style style:name="T2233" style:parent-style-name="기본단락글꼴" style:family="text">
      <style:text-properties fo:color="#7F0055"/>
    </style:style>
    <style:style style:name="T2234" style:parent-style-name="기본단락글꼴" style:family="text">
      <style:text-properties fo:color="#7F0055"/>
    </style:style>
    <style:style style:name="T2235" style:parent-style-name="기본단락글꼴" style:family="text">
      <style:text-properties fo:color="#7F0055"/>
    </style:style>
    <style:style style:name="T2236" style:parent-style-name="기본단락글꼴" style:family="text">
      <style:text-properties fo:color="#0000C0"/>
    </style:style>
    <style:style style:name="T2237" style:parent-style-name="기본단락글꼴" style:family="text">
      <style:text-properties fo:color="#0000C0"/>
    </style:style>
    <style:style style:name="T2238" style:parent-style-name="기본단락글꼴" style:family="text">
      <style:text-properties fo:color="#0000C0"/>
    </style:style>
    <style:style style:name="T2239" style:parent-style-name="기본단락글꼴" style:family="text">
      <style:text-properties fo:color="#646464"/>
    </style:style>
    <style:style style:name="T2240" style:parent-style-name="기본단락글꼴" style:family="text">
      <style:text-properties fo:color="#7F0055"/>
    </style:style>
    <style:style style:name="T2241" style:parent-style-name="기본단락글꼴" style:family="text">
      <style:text-properties fo:color="#7F0055"/>
    </style:style>
    <style:style style:name="T2242" style:parent-style-name="기본단락글꼴" style:family="text">
      <style:text-properties fo:color="#7F0055"/>
    </style:style>
    <style:style style:name="T2243" style:parent-style-name="기본단락글꼴" style:family="text">
      <style:text-properties fo:color="#0000C0"/>
    </style:style>
    <style:style style:name="T2244" style:parent-style-name="기본단락글꼴" style:family="text">
      <style:text-properties fo:color="#0000C0"/>
    </style:style>
    <style:style style:name="T2245" style:parent-style-name="기본단락글꼴" style:family="text">
      <style:text-properties fo:color="#0000C0"/>
    </style:style>
    <style:style style:name="T2246" style:parent-style-name="기본단락글꼴" style:family="text">
      <style:text-properties fo:color="#646464"/>
    </style:style>
    <style:style style:name="T2247" style:parent-style-name="기본단락글꼴" style:family="text">
      <style:text-properties fo:color="#7F0055"/>
    </style:style>
    <style:style style:name="T2248" style:parent-style-name="기본단락글꼴" style:family="text">
      <style:text-properties fo:color="#7F0055"/>
    </style:style>
    <style:style style:name="T2249" style:parent-style-name="기본단락글꼴" style:family="text">
      <style:text-properties fo:color="#6A3E3E"/>
    </style:style>
    <style:style style:name="T2250" style:parent-style-name="기본단락글꼴" style:family="text">
      <style:text-properties fo:color="#7F0055"/>
    </style:style>
    <style:style style:name="T2251" style:parent-style-name="기본단락글꼴" style:family="text">
      <style:text-properties fo:color="#7F0055"/>
    </style:style>
    <style:style style:name="T2252" style:parent-style-name="기본단락글꼴" style:family="text">
      <style:text-properties fo:color="#6A3E3E"/>
    </style:style>
    <style:style style:name="T2253" style:parent-style-name="기본단락글꼴" style:family="text">
      <style:text-properties fo:color="#7F0055"/>
    </style:style>
    <style:style style:name="T2254" style:parent-style-name="기본단락글꼴" style:family="text">
      <style:text-properties fo:color="#7F0055"/>
    </style:style>
    <style:style style:name="T2255" style:parent-style-name="기본단락글꼴" style:family="text">
      <style:text-properties fo:color="#7F0055"/>
    </style:style>
    <style:style style:name="T2256" style:parent-style-name="기본단락글꼴" style:family="text">
      <style:text-properties fo:color="#6A3E3E"/>
    </style:style>
    <style:style style:name="T2257" style:parent-style-name="기본단락글꼴" style:family="text">
      <style:text-properties fo:color="#7F0055"/>
    </style:style>
    <style:style style:name="T2258" style:parent-style-name="기본단락글꼴" style:family="text">
      <style:text-properties fo:color="#7F0055"/>
    </style:style>
    <style:style style:name="T2259" style:parent-style-name="기본단락글꼴" style:family="text">
      <style:text-properties fo:color="#7F0055"/>
    </style:style>
    <style:style style:name="T2260" style:parent-style-name="기본단락글꼴" style:family="text">
      <style:text-properties fo:color="#7F0055"/>
    </style:style>
    <style:style style:name="T2261" style:parent-style-name="기본단락글꼴" style:family="text">
      <style:text-properties fo:color="#6A3E3E"/>
    </style:style>
    <style:style style:name="T2262" style:parent-style-name="기본단락글꼴" style:family="text">
      <style:text-properties fo:color="#6A3E3E"/>
    </style:style>
    <style:style style:name="T2263" style:parent-style-name="기본단락글꼴" style:family="text">
      <style:text-properties fo:color="#7F0055"/>
    </style:style>
    <style:style style:name="T2264" style:parent-style-name="기본단락글꼴" style:family="text">
      <style:text-properties fo:color="#7F0055"/>
    </style:style>
    <style:style style:name="T2265" style:parent-style-name="기본단락글꼴" style:family="text">
      <style:text-properties fo:color="#0000C0"/>
    </style:style>
    <style:style style:name="T2266" style:parent-style-name="기본단락글꼴" style:family="text">
      <style:text-properties fo:color="#6A3E3E"/>
    </style:style>
    <style:style style:name="T2267" style:parent-style-name="기본단락글꼴" style:family="text">
      <style:text-properties fo:color="#0000C0"/>
    </style:style>
    <style:style style:name="T2268" style:parent-style-name="기본단락글꼴" style:family="text">
      <style:text-properties fo:color="#7F0055"/>
    </style:style>
    <style:style style:name="T2269" style:parent-style-name="기본단락글꼴" style:family="text">
      <style:text-properties fo:color="#0000C0"/>
    </style:style>
    <style:style style:name="T2270" style:parent-style-name="기본단락글꼴" style:family="text">
      <style:text-properties fo:color="#6A3E3E"/>
    </style:style>
    <style:style style:name="T2271" style:parent-style-name="기본단락글꼴" style:family="text">
      <style:text-properties fo:color="#0000C0"/>
    </style:style>
    <style:style style:name="T2272" style:parent-style-name="기본단락글꼴" style:family="text">
      <style:text-properties fo:color="#7F0055"/>
    </style:style>
    <style:style style:name="T2273" style:parent-style-name="기본단락글꼴" style:family="text">
      <style:text-properties fo:color="#0000C0"/>
    </style:style>
    <style:style style:name="T2274" style:parent-style-name="기본단락글꼴" style:family="text">
      <style:text-properties fo:color="#6A3E3E"/>
    </style:style>
    <style:style style:name="T2275" style:parent-style-name="기본단락글꼴" style:family="text">
      <style:text-properties fo:color="#0000C0"/>
    </style:style>
    <style:style style:name="TableColumn2277" style:family="table-column">
      <style:table-column-properties style:column-width="7.2569in" style:use-optimal-column-width="false"/>
    </style:style>
    <style:style style:name="Table2276" style:family="table">
      <style:table-properties style:width="7.2569in" fo:margin-left="0in" table:align="left"/>
    </style:style>
    <style:style style:name="TableRow2278" style:family="table-row">
      <style:table-row-properties style:use-optimal-row-height="false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T2280" style:parent-style-name="기본단락글꼴" style:family="text">
      <style:text-properties fo:color="#7F0055"/>
    </style:style>
    <style:style style:name="T2281" style:parent-style-name="기본단락글꼴" style:family="text">
      <style:text-properties fo:color="#000000"/>
    </style:style>
    <style:style style:name="T2282" style:parent-style-name="기본단락글꼴" style:family="text">
      <style:text-properties fo:color="#7F0055"/>
    </style:style>
    <style:style style:name="T2283" style:parent-style-name="기본단락글꼴" style:family="text">
      <style:text-properties fo:color="#000000"/>
    </style:style>
    <style:style style:name="T2284" style:parent-style-name="기본단락글꼴" style:family="text">
      <style:text-properties fo:color="#7F0055"/>
    </style:style>
    <style:style style:name="T2285" style:parent-style-name="기본단락글꼴" style:family="text">
      <style:text-properties fo:color="#000000"/>
    </style:style>
    <style:style style:name="T2286" style:parent-style-name="기본단락글꼴" style:family="text">
      <style:text-properties fo:color="#7F0055"/>
    </style:style>
    <style:style style:name="T2287" style:parent-style-name="기본단락글꼴" style:family="text">
      <style:text-properties fo:color="#000000"/>
    </style:style>
    <style:style style:name="T2288" style:parent-style-name="기본단락글꼴" style:family="text">
      <style:text-properties fo:color="#7F0055"/>
    </style:style>
    <style:style style:name="T2289" style:parent-style-name="기본단락글꼴" style:family="text">
      <style:text-properties fo:color="#000000"/>
    </style:style>
    <style:style style:name="T2290" style:parent-style-name="기본단락글꼴" style:family="text">
      <style:text-properties fo:color="#000000"/>
    </style:style>
    <style:style style:name="T2291" style:parent-style-name="기본단락글꼴" style:family="text">
      <style:text-properties fo:color="#7F0055"/>
    </style:style>
    <style:style style:name="T2292" style:parent-style-name="기본단락글꼴" style:family="text">
      <style:text-properties fo:color="#000000"/>
    </style:style>
    <style:style style:name="T2293" style:parent-style-name="기본단락글꼴" style:family="text">
      <style:text-properties fo:color="#7F0055"/>
    </style:style>
    <style:style style:name="T2294" style:parent-style-name="기본단락글꼴" style:family="text">
      <style:text-properties fo:color="#000000"/>
    </style:style>
    <style:style style:name="T2295" style:parent-style-name="기본단락글꼴" style:family="text">
      <style:text-properties fo:color="#7F0055"/>
    </style:style>
    <style:style style:name="T2296" style:parent-style-name="기본단락글꼴" style:family="text">
      <style:text-properties fo:color="#000000"/>
    </style:style>
    <style:style style:name="T2297" style:parent-style-name="기본단락글꼴" style:family="text">
      <style:text-properties fo:color="#6A3E3E"/>
    </style:style>
    <style:style style:name="T2298" style:parent-style-name="기본단락글꼴" style:family="text">
      <style:text-properties fo:color="#000000"/>
    </style:style>
    <style:style style:name="T2299" style:parent-style-name="기본단락글꼴" style:family="text">
      <style:text-properties fo:color="#000000"/>
    </style:style>
    <style:style style:name="T2300" style:parent-style-name="기본단락글꼴" style:family="text">
      <style:text-properties fo:color="#6A3E3E"/>
    </style:style>
    <style:style style:name="T2301" style:parent-style-name="기본단락글꼴" style:family="text">
      <style:text-properties fo:color="#000000"/>
    </style:style>
    <style:style style:name="T2302" style:parent-style-name="기본단락글꼴" style:family="text">
      <style:text-properties fo:color="#7F0055"/>
    </style:style>
    <style:style style:name="T2303" style:parent-style-name="기본단락글꼴" style:family="text">
      <style:text-properties fo:color="#000000"/>
    </style:style>
    <style:style style:name="T2304" style:parent-style-name="기본단락글꼴" style:family="text">
      <style:text-properties fo:color="#000000"/>
    </style:style>
    <style:style style:name="T2305" style:parent-style-name="기본단락글꼴" style:family="text">
      <style:text-properties fo:color="#6A3E3E"/>
    </style:style>
    <style:style style:name="T2306" style:parent-style-name="기본단락글꼴" style:family="text">
      <style:text-properties fo:color="#000000"/>
    </style:style>
    <style:style style:name="T2307" style:parent-style-name="기본단락글꼴" style:family="text">
      <style:text-properties fo:color="#7F0055"/>
    </style:style>
    <style:style style:name="T2308" style:parent-style-name="기본단락글꼴" style:family="text">
      <style:text-properties fo:color="#000000"/>
    </style:style>
    <style:style style:name="T2309" style:parent-style-name="기본단락글꼴" style:family="text">
      <style:text-properties fo:color="#2A00FF"/>
    </style:style>
    <style:style style:name="T2310" style:parent-style-name="기본단락글꼴" style:family="text">
      <style:text-properties fo:color="#2A00FF"/>
    </style:style>
    <style:style style:name="T2311" style:parent-style-name="기본단락글꼴" style:family="text">
      <style:text-properties fo:color="#2A00FF"/>
    </style:style>
    <style:style style:name="T2312" style:parent-style-name="기본단락글꼴" style:family="text">
      <style:text-properties fo:color="#000000"/>
    </style:style>
    <style:style style:name="T2313" style:parent-style-name="기본단락글꼴" style:family="text">
      <style:text-properties fo:color="#000000"/>
    </style:style>
    <style:style style:name="T2314" style:parent-style-name="기본단락글꼴" style:family="text">
      <style:text-properties fo:color="#6A3E3E"/>
    </style:style>
    <style:style style:name="T2315" style:parent-style-name="기본단락글꼴" style:family="text">
      <style:text-properties fo:color="#000000"/>
    </style:style>
    <style:style style:name="T2316" style:parent-style-name="기본단락글꼴" style:family="text">
      <style:text-properties fo:color="#7F0055"/>
    </style:style>
    <style:style style:name="T2317" style:parent-style-name="기본단락글꼴" style:family="text">
      <style:text-properties fo:color="#000000"/>
    </style:style>
    <style:style style:name="T2318" style:parent-style-name="기본단락글꼴" style:family="text">
      <style:text-properties fo:color="#2A00FF"/>
    </style:style>
    <style:style style:name="T2319" style:parent-style-name="기본단락글꼴" style:family="text">
      <style:text-properties fo:color="#2A00FF"/>
    </style:style>
    <style:style style:name="T2320" style:parent-style-name="기본단락글꼴" style:family="text">
      <style:text-properties fo:color="#2A00FF"/>
    </style:style>
    <style:style style:name="T2321" style:parent-style-name="기본단락글꼴" style:family="text">
      <style:text-properties fo:color="#000000"/>
    </style:style>
    <style:style style:name="T2322" style:parent-style-name="기본단락글꼴" style:family="text">
      <style:text-properties fo:color="#000000"/>
    </style:style>
    <style:style style:name="T2323" style:parent-style-name="기본단락글꼴" style:family="text">
      <style:text-properties fo:color="#0000C0"/>
    </style:style>
    <style:style style:name="T2324" style:parent-style-name="기본단락글꼴" style:family="text">
      <style:text-properties fo:color="#000000"/>
    </style:style>
    <style:style style:name="T2325" style:parent-style-name="기본단락글꼴" style:family="text">
      <style:text-properties fo:color="#6A3E3E"/>
    </style:style>
    <style:style style:name="T2326" style:parent-style-name="기본단락글꼴" style:family="text">
      <style:text-properties fo:color="#000000"/>
    </style:style>
    <style:style style:name="T2327" style:parent-style-name="기본단락글꼴" style:family="text">
      <style:text-properties fo:color="#7F0055"/>
    </style:style>
    <style:style style:name="T2328" style:parent-style-name="기본단락글꼴" style:family="text">
      <style:text-properties fo:color="#000000"/>
    </style:style>
    <style:style style:name="T2329" style:parent-style-name="기본단락글꼴" style:family="text">
      <style:text-properties fo:color="#2A00FF"/>
    </style:style>
    <style:style style:name="T2330" style:parent-style-name="기본단락글꼴" style:family="text">
      <style:text-properties fo:color="#2A00FF"/>
    </style:style>
    <style:style style:name="T2331" style:parent-style-name="기본단락글꼴" style:family="text">
      <style:text-properties fo:color="#2A00FF"/>
    </style:style>
    <style:style style:name="T2332" style:parent-style-name="기본단락글꼴" style:family="text">
      <style:text-properties fo:color="#000000"/>
    </style:style>
    <style:style style:name="T2333" style:parent-style-name="기본단락글꼴" style:family="text">
      <style:text-properties fo:color="#000000"/>
    </style:style>
    <style:style style:name="T2334" style:parent-style-name="기본단락글꼴" style:family="text">
      <style:text-properties fo:color="#0000C0"/>
    </style:style>
    <style:style style:name="T2335" style:parent-style-name="기본단락글꼴" style:family="text">
      <style:text-properties fo:color="#000000"/>
    </style:style>
    <style:style style:name="T2336" style:parent-style-name="기본단락글꼴" style:family="text">
      <style:text-properties fo:color="#6A3E3E"/>
    </style:style>
    <style:style style:name="T2337" style:parent-style-name="기본단락글꼴" style:family="text">
      <style:text-properties fo:color="#000000"/>
    </style:style>
    <style:style style:name="T2338" style:parent-style-name="기본단락글꼴" style:family="text">
      <style:text-properties fo:color="#7F0055"/>
    </style:style>
    <style:style style:name="T2339" style:parent-style-name="기본단락글꼴" style:family="text">
      <style:text-properties fo:color="#000000"/>
    </style:style>
    <style:style style:name="T2340" style:parent-style-name="기본단락글꼴" style:family="text">
      <style:text-properties fo:color="#2A00FF"/>
    </style:style>
    <style:style style:name="T2341" style:parent-style-name="기본단락글꼴" style:family="text">
      <style:text-properties fo:color="#2A00FF"/>
    </style:style>
    <style:style style:name="T2342" style:parent-style-name="기본단락글꼴" style:family="text">
      <style:text-properties fo:color="#2A00FF"/>
    </style:style>
    <style:style style:name="T2343" style:parent-style-name="기본단락글꼴" style:family="text">
      <style:text-properties fo:color="#000000"/>
    </style:style>
    <style:style style:name="P2344" style:parent-style-name="코드표" style:family="paragraph">
      <style:text-properties fo:color="#000000"/>
    </style:style>
    <style:style style:name="P2345" style:parent-style-name="코드표" style:family="paragraph">
      <style:text-properties fo:color="#000000"/>
    </style:style>
    <style:style style:name="TableColumn2347" style:family="table-column">
      <style:table-column-properties style:column-width="7.2611in" style:use-optimal-column-width="false"/>
    </style:style>
    <style:style style:name="Table2346" style:family="table">
      <style:table-properties style:width="7.2611in" fo:margin-left="0.0034in" table:align="left"/>
    </style:style>
    <style:style style:name="TableRow2348" style:family="table-row">
      <style:table-row-properties style:use-optimal-row-height="false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text-align="start"/>
    </style:style>
    <style:style style:name="T2351" style:parent-style-name="기본단락글꼴" style:family="text">
      <style:text-properties style:font-name-complex="굴림체" style:letter-kerning="false" style:font-size-complex="10pt"/>
    </style:style>
    <style:style style:name="P2352" style:parent-style-name="Standard" style:family="paragraph">
      <style:paragraph-properties fo:text-align="start"/>
    </style:style>
    <style:style style:name="T2353" style:parent-style-name="기본단락글꼴" style:family="text">
      <style:text-properties style:font-name-complex="굴림체" style:letter-kerning="false" style:font-size-complex="10pt"/>
    </style:style>
    <style:style style:name="P2354" style:parent-style-name="Standard" style:family="paragraph">
      <style:paragraph-properties fo:widows="2" fo:orphans="2" fo:margin-bottom="0.1111in" fo:line-height="107%"/>
    </style:style>
    <style:style style:name="TableColumn2356" style:family="table-column">
      <style:table-column-properties style:column-width="7.2569in" style:use-optimal-column-width="false"/>
    </style:style>
    <style:style style:name="Table2355" style:family="table">
      <style:table-properties style:width="7.2569in" fo:margin-left="0in" table:align="left"/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T2359" style:parent-style-name="기본단락글꼴" style:family="text">
      <style:text-properties fo:color="#7F0055"/>
    </style:style>
    <style:style style:name="T2360" style:parent-style-name="기본단락글꼴" style:family="text">
      <style:text-properties fo:color="#000000"/>
    </style:style>
    <style:style style:name="T2361" style:parent-style-name="기본단락글꼴" style:family="text">
      <style:text-properties fo:color="#7F0055"/>
    </style:style>
    <style:style style:name="T2362" style:parent-style-name="기본단락글꼴" style:family="text">
      <style:text-properties fo:color="#000000"/>
    </style:style>
    <style:style style:name="T2363" style:parent-style-name="기본단락글꼴" style:family="text">
      <style:text-properties fo:color="#7F0055"/>
    </style:style>
    <style:style style:name="T2364" style:parent-style-name="기본단락글꼴" style:family="text">
      <style:text-properties fo:color="#000000"/>
    </style:style>
    <style:style style:name="T2365" style:parent-style-name="기본단락글꼴" style:family="text">
      <style:text-properties fo:color="#7F0055"/>
    </style:style>
    <style:style style:name="T2366" style:parent-style-name="기본단락글꼴" style:family="text">
      <style:text-properties fo:color="#000000"/>
    </style:style>
    <style:style style:name="T2367" style:parent-style-name="기본단락글꼴" style:family="text">
      <style:text-properties fo:color="#000000"/>
    </style:style>
    <style:style style:name="T2368" style:parent-style-name="기본단락글꼴" style:family="text">
      <style:text-properties fo:color="#0000C0"/>
    </style:style>
    <style:style style:name="T2369" style:parent-style-name="기본단락글꼴" style:family="text">
      <style:text-properties fo:color="#000000"/>
    </style:style>
    <style:style style:name="T2370" style:parent-style-name="기본단락글꼴" style:family="text">
      <style:text-properties fo:color="#000000"/>
    </style:style>
    <style:style style:name="T2371" style:parent-style-name="기본단락글꼴" style:family="text">
      <style:text-properties fo:color="#7F0055"/>
    </style:style>
    <style:style style:name="T2372" style:parent-style-name="기본단락글꼴" style:family="text">
      <style:text-properties fo:color="#000000"/>
    </style:style>
    <style:style style:name="T2373" style:parent-style-name="기본단락글꼴" style:family="text">
      <style:text-properties fo:color="#0000C0"/>
    </style:style>
    <style:style style:name="T2374" style:parent-style-name="기본단락글꼴" style:family="text">
      <style:text-properties fo:color="#000000"/>
    </style:style>
    <style:style style:name="T2375" style:parent-style-name="기본단락글꼴" style:family="text">
      <style:text-properties fo:color="#000000"/>
    </style:style>
    <style:style style:name="T2376" style:parent-style-name="기본단락글꼴" style:family="text">
      <style:text-properties fo:color="#7F0055"/>
    </style:style>
    <style:style style:name="T2377" style:parent-style-name="기본단락글꼴" style:family="text">
      <style:text-properties fo:color="#000000"/>
    </style:style>
    <style:style style:name="T2378" style:parent-style-name="기본단락글꼴" style:family="text">
      <style:text-properties fo:color="#6A3E3E"/>
    </style:style>
    <style:style style:name="T2379" style:parent-style-name="기본단락글꼴" style:family="text">
      <style:text-properties fo:color="#000000"/>
    </style:style>
    <style:style style:name="T2380" style:parent-style-name="기본단락글꼴" style:family="text">
      <style:text-properties fo:color="#7F0055"/>
    </style:style>
    <style:style style:name="T2381" style:parent-style-name="기본단락글꼴" style:family="text">
      <style:text-properties fo:color="#000000"/>
    </style:style>
    <style:style style:name="T2382" style:parent-style-name="기본단락글꼴" style:family="text">
      <style:text-properties fo:color="#6A3E3E"/>
    </style:style>
    <style:style style:name="T2383" style:parent-style-name="기본단락글꼴" style:family="text">
      <style:text-properties fo:color="#000000"/>
    </style:style>
    <style:style style:name="T2384" style:parent-style-name="기본단락글꼴" style:family="text">
      <style:text-properties fo:color="#000000"/>
    </style:style>
    <style:style style:name="T2385" style:parent-style-name="기본단락글꼴" style:family="text">
      <style:text-properties fo:color="#7F0055"/>
    </style:style>
    <style:style style:name="T2386" style:parent-style-name="기본단락글꼴" style:family="text">
      <style:text-properties fo:color="#000000"/>
    </style:style>
    <style:style style:name="T2387" style:parent-style-name="기본단락글꼴" style:family="text">
      <style:text-properties fo:color="#0000C0"/>
    </style:style>
    <style:style style:name="T2388" style:parent-style-name="기본단락글꼴" style:family="text">
      <style:text-properties fo:color="#000000"/>
    </style:style>
    <style:style style:name="T2389" style:parent-style-name="기본단락글꼴" style:family="text">
      <style:text-properties fo:color="#6A3E3E"/>
    </style:style>
    <style:style style:name="T2390" style:parent-style-name="기본단락글꼴" style:family="text">
      <style:text-properties fo:color="#000000"/>
    </style:style>
    <style:style style:name="T2391" style:parent-style-name="기본단락글꼴" style:family="text">
      <style:text-properties fo:color="#000000"/>
    </style:style>
    <style:style style:name="T2392" style:parent-style-name="기본단락글꼴" style:family="text">
      <style:text-properties fo:color="#7F0055"/>
    </style:style>
    <style:style style:name="T2393" style:parent-style-name="기본단락글꼴" style:family="text">
      <style:text-properties fo:color="#000000"/>
    </style:style>
    <style:style style:name="T2394" style:parent-style-name="기본단락글꼴" style:family="text">
      <style:text-properties fo:color="#0000C0"/>
    </style:style>
    <style:style style:name="T2395" style:parent-style-name="기본단락글꼴" style:family="text">
      <style:text-properties fo:color="#000000"/>
    </style:style>
    <style:style style:name="T2396" style:parent-style-name="기본단락글꼴" style:family="text">
      <style:text-properties fo:color="#6A3E3E"/>
    </style:style>
    <style:style style:name="T2397" style:parent-style-name="기본단락글꼴" style:family="text">
      <style:text-properties fo:color="#000000"/>
    </style:style>
    <style:style style:name="P2398" style:parent-style-name="코드표" style:family="paragraph">
      <style:text-properties fo:color="#000000"/>
    </style:style>
    <style:style style:name="T2399" style:parent-style-name="기본단락글꼴" style:family="text">
      <style:text-properties fo:color="#000000"/>
    </style:style>
    <style:style style:name="T2400" style:parent-style-name="기본단락글꼴" style:family="text">
      <style:text-properties fo:color="#646464"/>
    </style:style>
    <style:style style:name="T2401" style:parent-style-name="기본단락글꼴" style:family="text">
      <style:text-properties fo:color="#000000"/>
    </style:style>
    <style:style style:name="T2402" style:parent-style-name="기본단락글꼴" style:family="text">
      <style:text-properties fo:color="#7F0055"/>
    </style:style>
    <style:style style:name="T2403" style:parent-style-name="기본단락글꼴" style:family="text">
      <style:text-properties fo:color="#000000"/>
    </style:style>
    <style:style style:name="T2404" style:parent-style-name="기본단락글꼴" style:family="text">
      <style:text-properties fo:color="#000000"/>
    </style:style>
    <style:style style:name="T2405" style:parent-style-name="기본단락글꼴" style:family="text">
      <style:text-properties fo:color="#7F0055"/>
    </style:style>
    <style:style style:name="T2406" style:parent-style-name="기본단락글꼴" style:family="text">
      <style:text-properties fo:color="#000000"/>
    </style:style>
    <style:style style:name="T2407" style:parent-style-name="기본단락글꼴" style:family="text">
      <style:text-properties fo:color="#2A00FF"/>
    </style:style>
    <style:style style:name="T2408" style:parent-style-name="기본단락글꼴" style:family="text">
      <style:text-properties fo:color="#000000"/>
    </style:style>
    <style:style style:name="T2409" style:parent-style-name="기본단락글꼴" style:family="text">
      <style:text-properties fo:color="#0000C0"/>
    </style:style>
    <style:style style:name="T2410" style:parent-style-name="기본단락글꼴" style:family="text">
      <style:text-properties fo:color="#000000"/>
    </style:style>
    <style:style style:name="T2411" style:parent-style-name="기본단락글꼴" style:family="text">
      <style:text-properties fo:color="#0000C0"/>
    </style:style>
    <style:style style:name="T2412" style:parent-style-name="기본단락글꼴" style:family="text">
      <style:text-properties fo:color="#000000"/>
    </style:style>
    <style:style style:name="P2413" style:parent-style-name="코드표" style:family="paragraph">
      <style:text-properties fo:color="#000000"/>
    </style:style>
    <style:style style:name="T2414" style:parent-style-name="기본단락글꼴" style:family="text">
      <style:text-properties fo:color="#000000"/>
    </style:style>
    <style:style style:name="T2415" style:parent-style-name="기본단락글꼴" style:family="text">
      <style:text-properties fo:color="#646464"/>
    </style:style>
    <style:style style:name="T2416" style:parent-style-name="기본단락글꼴" style:family="text">
      <style:text-properties fo:color="#000000"/>
    </style:style>
    <style:style style:name="T2417" style:parent-style-name="기본단락글꼴" style:family="text">
      <style:text-properties fo:color="#7F0055"/>
    </style:style>
    <style:style style:name="T2418" style:parent-style-name="기본단락글꼴" style:family="text">
      <style:text-properties fo:color="#000000"/>
    </style:style>
    <style:style style:name="T2419" style:parent-style-name="기본단락글꼴" style:family="text">
      <style:text-properties fo:color="#7F0055"/>
    </style:style>
    <style:style style:name="T2420" style:parent-style-name="기본단락글꼴" style:family="text">
      <style:text-properties fo:color="#000000"/>
    </style:style>
    <style:style style:name="T2421" style:parent-style-name="기본단락글꼴" style:family="text">
      <style:text-properties fo:color="#000000"/>
    </style:style>
    <style:style style:name="T2422" style:parent-style-name="기본단락글꼴" style:family="text">
      <style:text-properties fo:color="#7F0055"/>
    </style:style>
    <style:style style:name="T2423" style:parent-style-name="기본단락글꼴" style:family="text">
      <style:text-properties fo:color="#000000"/>
    </style:style>
    <style:style style:name="T2424" style:parent-style-name="기본단락글꼴" style:family="text">
      <style:text-properties fo:color="#0000C0"/>
    </style:style>
    <style:style style:name="T2425" style:parent-style-name="기본단락글꼴" style:family="text">
      <style:text-properties fo:color="#000000"/>
    </style:style>
    <style:style style:name="T2426" style:parent-style-name="기본단락글꼴" style:family="text">
      <style:text-properties fo:color="#0000C0"/>
    </style:style>
    <style:style style:name="T2427" style:parent-style-name="기본단락글꼴" style:family="text">
      <style:text-properties fo:color="#000000"/>
    </style:style>
    <style:style style:name="P2428" style:parent-style-name="코드표" style:family="paragraph">
      <style:text-properties fo:color="#000000"/>
    </style:style>
    <style:style style:name="T2429" style:parent-style-name="기본단락글꼴" style:family="text">
      <style:text-properties fo:color="#000000"/>
    </style:style>
    <style:style style:name="T2430" style:parent-style-name="기본단락글꼴" style:family="text">
      <style:text-properties fo:color="#646464"/>
    </style:style>
    <style:style style:name="T2431" style:parent-style-name="기본단락글꼴" style:family="text">
      <style:text-properties fo:color="#000000"/>
    </style:style>
    <style:style style:name="T2432" style:parent-style-name="기본단락글꼴" style:family="text">
      <style:text-properties fo:color="#7F0055"/>
    </style:style>
    <style:style style:name="T2433" style:parent-style-name="기본단락글꼴" style:family="text">
      <style:text-properties fo:color="#000000"/>
    </style:style>
    <style:style style:name="T2434" style:parent-style-name="기본단락글꼴" style:family="text">
      <style:text-properties fo:color="#7F0055"/>
    </style:style>
    <style:style style:name="T2435" style:parent-style-name="기본단락글꼴" style:family="text">
      <style:text-properties fo:color="#000000"/>
    </style:style>
    <style:style style:name="T2436" style:parent-style-name="기본단락글꼴" style:family="text">
      <style:text-properties fo:color="#6A3E3E"/>
    </style:style>
    <style:style style:name="T2437" style:parent-style-name="기본단락글꼴" style:family="text">
      <style:text-properties fo:color="#000000"/>
    </style:style>
    <style:style style:name="T2438" style:parent-style-name="기본단락글꼴" style:family="text">
      <style:text-properties fo:color="#000000"/>
    </style:style>
    <style:style style:name="T2439" style:parent-style-name="기본단락글꼴" style:family="text">
      <style:text-properties fo:color="#7F0055"/>
    </style:style>
    <style:style style:name="T2440" style:parent-style-name="기본단락글꼴" style:family="text">
      <style:text-properties fo:color="#000000"/>
    </style:style>
    <style:style style:name="T2441" style:parent-style-name="기본단락글꼴" style:family="text">
      <style:text-properties fo:color="#7F0055"/>
    </style:style>
    <style:style style:name="T2442" style:parent-style-name="기본단락글꼴" style:family="text">
      <style:text-properties fo:color="#000000"/>
    </style:style>
    <style:style style:name="T2443" style:parent-style-name="기본단락글꼴" style:family="text">
      <style:text-properties fo:color="#6A3E3E"/>
    </style:style>
    <style:style style:name="T2444" style:parent-style-name="기본단락글꼴" style:family="text">
      <style:text-properties fo:color="#000000"/>
    </style:style>
    <style:style style:name="T2445" style:parent-style-name="기본단락글꼴" style:family="text">
      <style:text-properties fo:color="#7F0055"/>
    </style:style>
    <style:style style:name="T2446" style:parent-style-name="기본단락글꼴" style:family="text">
      <style:text-properties fo:color="#000000"/>
    </style:style>
    <style:style style:name="T2447" style:parent-style-name="기본단락글꼴" style:family="text">
      <style:text-properties fo:color="#7F0055"/>
    </style:style>
    <style:style style:name="T2448" style:parent-style-name="기본단락글꼴" style:family="text">
      <style:text-properties fo:color="#000000"/>
    </style:style>
    <style:style style:name="T2449" style:parent-style-name="기본단락글꼴" style:family="text">
      <style:text-properties fo:color="#000000"/>
    </style:style>
    <style:style style:name="T2450" style:parent-style-name="기본단락글꼴" style:family="text">
      <style:text-properties fo:color="#7F0055"/>
    </style:style>
    <style:style style:name="T2451" style:parent-style-name="기본단락글꼴" style:family="text">
      <style:text-properties fo:color="#000000"/>
    </style:style>
    <style:style style:name="T2452" style:parent-style-name="기본단락글꼴" style:family="text">
      <style:text-properties fo:color="#6A3E3E"/>
    </style:style>
    <style:style style:name="T2453" style:parent-style-name="기본단락글꼴" style:family="text">
      <style:text-properties fo:color="#000000"/>
    </style:style>
    <style:style style:name="T2454" style:parent-style-name="기본단락글꼴" style:family="text">
      <style:text-properties fo:color="#7F0055"/>
    </style:style>
    <style:style style:name="T2455" style:parent-style-name="기본단락글꼴" style:family="text">
      <style:text-properties fo:color="#000000"/>
    </style:style>
    <style:style style:name="T2456" style:parent-style-name="기본단락글꼴" style:family="text">
      <style:text-properties fo:color="#7F0055"/>
    </style:style>
    <style:style style:name="T2457" style:parent-style-name="기본단락글꼴" style:family="text">
      <style:text-properties fo:color="#000000"/>
    </style:style>
    <style:style style:name="T2458" style:parent-style-name="기본단락글꼴" style:family="text">
      <style:text-properties fo:color="#7F0055"/>
    </style:style>
    <style:style style:name="T2459" style:parent-style-name="기본단락글꼴" style:family="text">
      <style:text-properties fo:color="#000000"/>
    </style:style>
    <style:style style:name="T2460" style:parent-style-name="기본단락글꼴" style:family="text">
      <style:text-properties fo:color="#7F0055"/>
    </style:style>
    <style:style style:name="T2461" style:parent-style-name="기본단락글꼴" style:family="text">
      <style:text-properties fo:color="#000000"/>
    </style:style>
    <style:style style:name="T2462" style:parent-style-name="기본단락글꼴" style:family="text">
      <style:text-properties fo:color="#000000"/>
    </style:style>
    <style:style style:name="T2463" style:parent-style-name="기본단락글꼴" style:family="text">
      <style:text-properties fo:color="#6A3E3E"/>
    </style:style>
    <style:style style:name="T2464" style:parent-style-name="기본단락글꼴" style:family="text">
      <style:text-properties fo:color="#000000"/>
    </style:style>
    <style:style style:name="T2465" style:parent-style-name="기본단락글꼴" style:family="text">
      <style:text-properties fo:color="#6A3E3E"/>
    </style:style>
    <style:style style:name="T2466" style:parent-style-name="기본단락글꼴" style:family="text">
      <style:text-properties fo:color="#000000"/>
    </style:style>
    <style:style style:name="T2467" style:parent-style-name="기본단락글꼴" style:family="text">
      <style:text-properties fo:color="#000000"/>
    </style:style>
    <style:style style:name="T2468" style:parent-style-name="기본단락글꼴" style:family="text">
      <style:text-properties fo:color="#7F0055"/>
    </style:style>
    <style:style style:name="T2469" style:parent-style-name="기본단락글꼴" style:family="text">
      <style:text-properties fo:color="#000000"/>
    </style:style>
    <style:style style:name="T2470" style:parent-style-name="기본단락글꼴" style:family="text">
      <style:text-properties fo:color="#7F0055"/>
    </style:style>
    <style:style style:name="T2471" style:parent-style-name="기본단락글꼴" style:family="text">
      <style:text-properties fo:color="#000000"/>
    </style:style>
    <style:style style:name="T2472" style:parent-style-name="기본단락글꼴" style:family="text">
      <style:text-properties fo:color="#0000C0"/>
    </style:style>
    <style:style style:name="T2473" style:parent-style-name="기본단락글꼴" style:family="text">
      <style:text-properties fo:color="#000000"/>
    </style:style>
    <style:style style:name="T2474" style:parent-style-name="기본단락글꼴" style:family="text">
      <style:text-properties fo:color="#6A3E3E"/>
    </style:style>
    <style:style style:name="T2475" style:parent-style-name="기본단락글꼴" style:family="text">
      <style:text-properties fo:color="#000000"/>
    </style:style>
    <style:style style:name="T2476" style:parent-style-name="기본단락글꼴" style:family="text">
      <style:text-properties fo:color="#0000C0"/>
    </style:style>
    <style:style style:name="T2477" style:parent-style-name="기본단락글꼴" style:family="text">
      <style:text-properties fo:color="#000000"/>
    </style:style>
    <style:style style:name="T2478" style:parent-style-name="기본단락글꼴" style:family="text">
      <style:text-properties fo:color="#7F0055"/>
    </style:style>
    <style:style style:name="T2479" style:parent-style-name="기본단락글꼴" style:family="text">
      <style:text-properties fo:color="#000000"/>
    </style:style>
    <style:style style:name="T2480" style:parent-style-name="기본단락글꼴" style:family="text">
      <style:text-properties fo:color="#0000C0"/>
    </style:style>
    <style:style style:name="T2481" style:parent-style-name="기본단락글꼴" style:family="text">
      <style:text-properties fo:color="#000000"/>
    </style:style>
    <style:style style:name="T2482" style:parent-style-name="기본단락글꼴" style:family="text">
      <style:text-properties fo:color="#6A3E3E"/>
    </style:style>
    <style:style style:name="T2483" style:parent-style-name="기본단락글꼴" style:family="text">
      <style:text-properties fo:color="#000000"/>
    </style:style>
    <style:style style:name="T2484" style:parent-style-name="기본단락글꼴" style:family="text">
      <style:text-properties fo:color="#0000C0"/>
    </style:style>
    <style:style style:name="T2485" style:parent-style-name="기본단락글꼴" style:family="text">
      <style:text-properties fo:color="#000000"/>
    </style:style>
    <style:style style:name="P2486" style:parent-style-name="코드표" style:family="paragraph">
      <style:text-properties fo:color="#000000"/>
    </style:style>
    <style:style style:name="P2487" style:parent-style-name="코드표" style:family="paragraph">
      <style:text-properties fo:color="#000000"/>
    </style:style>
    <style:style style:name="TableColumn2489" style:family="table-column">
      <style:table-column-properties style:column-width="7.2569in" style:use-optimal-column-width="false"/>
    </style:style>
    <style:style style:name="Table2488" style:family="table">
      <style:table-properties style:width="7.2569in" fo:margin-left="0in" table:align="left"/>
    </style:style>
    <style:style style:name="TableRow2490" style:family="table-row">
      <style:table-row-properties style:use-optimal-row-height="false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T2492" style:parent-style-name="기본단락글꼴" style:family="text">
      <style:text-properties fo:color="#7F0055"/>
    </style:style>
    <style:style style:name="T2493" style:parent-style-name="기본단락글꼴" style:family="text">
      <style:text-properties fo:color="#000000"/>
    </style:style>
    <style:style style:name="T2494" style:parent-style-name="기본단락글꼴" style:family="text">
      <style:text-properties fo:color="#7F0055"/>
    </style:style>
    <style:style style:name="T2495" style:parent-style-name="기본단락글꼴" style:family="text">
      <style:text-properties fo:color="#000000"/>
    </style:style>
    <style:style style:name="T2496" style:parent-style-name="기본단락글꼴" style:family="text">
      <style:text-properties fo:color="#7F0055"/>
    </style:style>
    <style:style style:name="T2497" style:parent-style-name="기본단락글꼴" style:family="text">
      <style:text-properties fo:color="#000000"/>
    </style:style>
    <style:style style:name="T2498" style:parent-style-name="기본단락글꼴" style:family="text">
      <style:text-properties fo:color="#7F0055"/>
    </style:style>
    <style:style style:name="T2499" style:parent-style-name="기본단락글꼴" style:family="text">
      <style:text-properties fo:color="#000000"/>
    </style:style>
    <style:style style:name="T2500" style:parent-style-name="기본단락글꼴" style:family="text">
      <style:text-properties fo:color="#7F0055"/>
    </style:style>
    <style:style style:name="T2501" style:parent-style-name="기본단락글꼴" style:family="text">
      <style:text-properties fo:color="#000000"/>
    </style:style>
    <style:style style:name="T2502" style:parent-style-name="기본단락글꼴" style:family="text">
      <style:text-properties fo:color="#000000"/>
    </style:style>
    <style:style style:name="T2503" style:parent-style-name="기본단락글꼴" style:family="text">
      <style:text-properties fo:color="#7F0055"/>
    </style:style>
    <style:style style:name="T2504" style:parent-style-name="기본단락글꼴" style:family="text">
      <style:text-properties fo:color="#000000"/>
    </style:style>
    <style:style style:name="T2505" style:parent-style-name="기본단락글꼴" style:family="text">
      <style:text-properties fo:color="#7F0055"/>
    </style:style>
    <style:style style:name="T2506" style:parent-style-name="기본단락글꼴" style:family="text">
      <style:text-properties fo:color="#000000"/>
    </style:style>
    <style:style style:name="T2507" style:parent-style-name="기본단락글꼴" style:family="text">
      <style:text-properties fo:color="#7F0055"/>
    </style:style>
    <style:style style:name="T2508" style:parent-style-name="기본단락글꼴" style:family="text">
      <style:text-properties fo:color="#000000"/>
    </style:style>
    <style:style style:name="T2509" style:parent-style-name="기본단락글꼴" style:family="text">
      <style:text-properties fo:color="#6A3E3E"/>
    </style:style>
    <style:style style:name="T2510" style:parent-style-name="기본단락글꼴" style:family="text">
      <style:text-properties fo:color="#000000"/>
    </style:style>
    <style:style style:name="T2511" style:parent-style-name="기본단락글꼴" style:family="text">
      <style:text-properties fo:color="#000000"/>
    </style:style>
    <style:style style:name="T2512" style:parent-style-name="기본단락글꼴" style:family="text">
      <style:text-properties fo:color="#6A3E3E"/>
    </style:style>
    <style:style style:name="T2513" style:parent-style-name="기본단락글꼴" style:family="text">
      <style:text-properties fo:color="#000000"/>
    </style:style>
    <style:style style:name="T2514" style:parent-style-name="기본단락글꼴" style:family="text">
      <style:text-properties fo:color="#7F0055"/>
    </style:style>
    <style:style style:name="T2515" style:parent-style-name="기본단락글꼴" style:family="text">
      <style:text-properties fo:color="#000000"/>
    </style:style>
    <style:style style:name="T2516" style:parent-style-name="기본단락글꼴" style:family="text">
      <style:text-properties fo:color="#000000"/>
    </style:style>
    <style:style style:name="T2517" style:parent-style-name="기본단락글꼴" style:family="text">
      <style:text-properties fo:color="#6A3E3E"/>
    </style:style>
    <style:style style:name="T2518" style:parent-style-name="기본단락글꼴" style:family="text">
      <style:text-properties fo:color="#000000"/>
    </style:style>
    <style:style style:name="T2519" style:parent-style-name="기본단락글꼴" style:family="text">
      <style:text-properties fo:color="#7F0055"/>
    </style:style>
    <style:style style:name="T2520" style:parent-style-name="기본단락글꼴" style:family="text">
      <style:text-properties fo:color="#000000"/>
    </style:style>
    <style:style style:name="T2521" style:parent-style-name="기본단락글꼴" style:family="text">
      <style:text-properties fo:color="#2A00FF"/>
    </style:style>
    <style:style style:name="T2522" style:parent-style-name="기본단락글꼴" style:family="text">
      <style:text-properties fo:color="#2A00FF"/>
    </style:style>
    <style:style style:name="T2523" style:parent-style-name="기본단락글꼴" style:family="text">
      <style:text-properties fo:color="#2A00FF"/>
    </style:style>
    <style:style style:name="T2524" style:parent-style-name="기본단락글꼴" style:family="text">
      <style:text-properties fo:color="#000000"/>
    </style:style>
    <style:style style:name="T2525" style:parent-style-name="기본단락글꼴" style:family="text">
      <style:text-properties fo:color="#000000"/>
    </style:style>
    <style:style style:name="T2526" style:parent-style-name="기본단락글꼴" style:family="text">
      <style:text-properties fo:color="#6A3E3E"/>
    </style:style>
    <style:style style:name="T2527" style:parent-style-name="기본단락글꼴" style:family="text">
      <style:text-properties fo:color="#000000"/>
    </style:style>
    <style:style style:name="T2528" style:parent-style-name="기본단락글꼴" style:family="text">
      <style:text-properties fo:color="#7F0055"/>
    </style:style>
    <style:style style:name="T2529" style:parent-style-name="기본단락글꼴" style:family="text">
      <style:text-properties fo:color="#000000"/>
    </style:style>
    <style:style style:name="T2530" style:parent-style-name="기본단락글꼴" style:family="text">
      <style:text-properties fo:color="#2A00FF"/>
    </style:style>
    <style:style style:name="T2531" style:parent-style-name="기본단락글꼴" style:family="text">
      <style:text-properties fo:color="#2A00FF"/>
    </style:style>
    <style:style style:name="T2532" style:parent-style-name="기본단락글꼴" style:family="text">
      <style:text-properties fo:color="#2A00FF"/>
    </style:style>
    <style:style style:name="T2533" style:parent-style-name="기본단락글꼴" style:family="text">
      <style:text-properties fo:color="#000000"/>
    </style:style>
    <style:style style:name="T2534" style:parent-style-name="기본단락글꼴" style:family="text">
      <style:text-properties fo:color="#000000"/>
    </style:style>
    <style:style style:name="T2535" style:parent-style-name="기본단락글꼴" style:family="text">
      <style:text-properties fo:color="#0000C0"/>
    </style:style>
    <style:style style:name="T2536" style:parent-style-name="기본단락글꼴" style:family="text">
      <style:text-properties fo:color="#000000"/>
    </style:style>
    <style:style style:name="T2537" style:parent-style-name="기본단락글꼴" style:family="text">
      <style:text-properties fo:color="#6A3E3E"/>
    </style:style>
    <style:style style:name="T2538" style:parent-style-name="기본단락글꼴" style:family="text">
      <style:text-properties fo:color="#000000"/>
    </style:style>
    <style:style style:name="T2539" style:parent-style-name="기본단락글꼴" style:family="text">
      <style:text-properties fo:color="#7F0055"/>
    </style:style>
    <style:style style:name="T2540" style:parent-style-name="기본단락글꼴" style:family="text">
      <style:text-properties fo:color="#000000"/>
    </style:style>
    <style:style style:name="T2541" style:parent-style-name="기본단락글꼴" style:family="text">
      <style:text-properties fo:color="#2A00FF"/>
    </style:style>
    <style:style style:name="T2542" style:parent-style-name="기본단락글꼴" style:family="text">
      <style:text-properties fo:color="#2A00FF"/>
    </style:style>
    <style:style style:name="T2543" style:parent-style-name="기본단락글꼴" style:family="text">
      <style:text-properties fo:color="#2A00FF"/>
    </style:style>
    <style:style style:name="T2544" style:parent-style-name="기본단락글꼴" style:family="text">
      <style:text-properties fo:color="#000000"/>
    </style:style>
    <style:style style:name="T2545" style:parent-style-name="기본단락글꼴" style:family="text">
      <style:text-properties fo:color="#000000"/>
    </style:style>
    <style:style style:name="T2546" style:parent-style-name="기본단락글꼴" style:family="text">
      <style:text-properties fo:color="#0000C0"/>
    </style:style>
    <style:style style:name="T2547" style:parent-style-name="기본단락글꼴" style:family="text">
      <style:text-properties fo:color="#000000"/>
    </style:style>
    <style:style style:name="T2548" style:parent-style-name="기본단락글꼴" style:family="text">
      <style:text-properties fo:color="#6A3E3E"/>
    </style:style>
    <style:style style:name="T2549" style:parent-style-name="기본단락글꼴" style:family="text">
      <style:text-properties fo:color="#000000"/>
    </style:style>
    <style:style style:name="T2550" style:parent-style-name="기본단락글꼴" style:family="text">
      <style:text-properties fo:color="#7F0055"/>
    </style:style>
    <style:style style:name="T2551" style:parent-style-name="기본단락글꼴" style:family="text">
      <style:text-properties fo:color="#000000"/>
    </style:style>
    <style:style style:name="T2552" style:parent-style-name="기본단락글꼴" style:family="text">
      <style:text-properties fo:color="#2A00FF"/>
    </style:style>
    <style:style style:name="T2553" style:parent-style-name="기본단락글꼴" style:family="text">
      <style:text-properties fo:color="#2A00FF"/>
    </style:style>
    <style:style style:name="T2554" style:parent-style-name="기본단락글꼴" style:family="text">
      <style:text-properties fo:color="#2A00FF"/>
    </style:style>
    <style:style style:name="T2555" style:parent-style-name="기본단락글꼴" style:family="text">
      <style:text-properties fo:color="#000000"/>
    </style:style>
    <style:style style:name="P2556" style:parent-style-name="코드표" style:family="paragraph">
      <style:text-properties fo:color="#000000"/>
    </style:style>
    <style:style style:name="P2557" style:parent-style-name="코드표" style:family="paragraph">
      <style:text-properties fo:color="#000000"/>
    </style:style>
    <style:style style:name="TableColumn2559" style:family="table-column">
      <style:table-column-properties style:column-width="7.2611in" style:use-optimal-column-width="false"/>
    </style:style>
    <style:style style:name="Table2558" style:family="table">
      <style:table-properties style:width="7.2611in" fo:margin-left="0.0034in" table:align="left"/>
    </style:style>
    <style:style style:name="TableRow2560" style:family="table-row">
      <style:table-row-properties style:use-optimal-row-height="false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Standard" style:family="paragraph">
      <style:paragraph-properties fo:text-align="start"/>
    </style:style>
    <style:style style:name="T2563" style:parent-style-name="기본단락글꼴" style:family="text">
      <style:text-properties style:font-name-complex="굴림체" style:letter-kerning="false" style:font-size-complex="10pt"/>
    </style:style>
    <style:style style:name="P2564" style:parent-style-name="Standard" style:family="paragraph">
      <style:paragraph-properties fo:text-align="start"/>
    </style:style>
    <style:style style:name="T2565" style:parent-style-name="기본단락글꼴" style:family="text">
      <style:text-properties style:font-name-complex="굴림체" style:letter-kerning="false" style:font-size-complex="10pt"/>
    </style:style>
    <style:style style:name="P2566" style:parent-style-name="Standard" style:family="paragraph">
      <style:paragraph-properties fo:widows="2" fo:orphans="2" style:snap-to-layout-grid="true" fo:margin-bottom="0.1111in" fo:line-height="107%"/>
    </style:style>
    <style:style style:name="P2567" style:parent-style-name="Standard" style:family="paragraph">
      <style:paragraph-properties fo:widows="2" fo:orphans="2" style:snap-to-layout-grid="true" fo:margin-bottom="0.1111in" fo:line-height="107%"/>
    </style:style>
  </office:automatic-styles>
  <office:body>
    <office:text text:use-soft-page-breaks="true">
      <text:p text:style-name="P1"><text:span text:style-name="T6">필요한<text:s/></text:span><text:span text:style-name="T7">C++</text:span><text:span text:style-name="T8"><text:s/>문법</text:span></text:p>
      <text:p text:style-name="P9"/>
      <text:p text:style-name="P10"/>
      <text:p text:style-name="Standard"><text:span text:style-name="T11">학습목표</text:span></text:p>
      <text:p text:style-name="Standard"><text:span text:style-name="T12">코딩 테스트 문제 구현에 필요한 문법</text:span></text:p>
      <text:p text:style-name="P13"/>
      <text:p text:style-name="P14"/>
      <text:p text:style-name="Standard"><text:span text:style-name="T15">목차</text:span></text:p>
      <text:table-of-content text:name="_TOC0">
        <text:table-of-content-source text:outline-level="2" text:use-outline-level="true" text:use-index-marks="true" text:use-index-source-styles="false" text:index-scope="document">
          <text:table-of-content-entry-template text:outline-level="1" text:style-name="표준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표준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_RefHeading___Toc5846_4171937993" office:target-frame-name="_top" xlink:show="replace">1.<text:s/>언어<text:s/>입출력(Fast I/O)<text:tab/>2</text:a></text:p>
          <text:p text:style-name="P17"><text:a xlink:href="#__RefHeading___Toc5848_4171937993" office:target-frame-name="_top" xlink:show="replace">1)<text:s/>백준<text:s/>문제<text:s/>입출력<text:s/>개요<text:tab/>2</text:a></text:p>
          <text:p text:style-name="P18"><text:a xlink:href="#__RefHeading___Toc5850_4171937993" office:target-frame-name="_top" xlink:show="replace">2)<text:s/>std::cin/std::cout<text:s/>기본<text:s/>객체<text:s/>사용법<text:tab/>2</text:a></text:p>
          <text:p text:style-name="P19"><text:a xlink:href="#__RefHeading___Toc5852_4171937993" office:target-frame-name="_top" xlink:show="replace">3)<text:s/>코딩테스트<text:s/>용<text:s/>빠른<text:s/>입출력<text:s/>최적화(ios_base::sync_with_stdio(false);,cintie(Null);)<text:tab/>2</text:a></text:p>
          <text:p text:style-name="P20"><text:a xlink:href="#__RefHeading___Toc5854_4171937993" office:target-frame-name="_top" xlink:show="replace">4)<text:s/>출력<text:s/>속도<text:s/>최적화:std::두이<text:s/>대신<text:s/>\n사용하기<text:tab/>3</text:a></text:p>
          <text:p text:style-name="P21"><text:a xlink:href="#__RefHeading___Toc5856_4171937993" office:target-frame-name="_top" xlink:show="replace">5)<text:s/>공백을<text:s/>포함한<text:s/>문자열<text:s/>입력<text:s/>받기(std::getline)<text:tab/>3</text:a></text:p>
          <text:p text:style-name="P22"><text:a xlink:href="#__RefHeading___Toc5858_4171937993" office:target-frame-name="_top" xlink:show="replace">2. Map<text:tab/>6</text:a></text:p>
          <text:p text:style-name="P23"><text:a xlink:href="#__RefHeading___Toc5860_4171937993" office:target-frame-name="_top" xlink:show="replace">1) Map interface<text:s/>개요<text:tab/>6</text:a></text:p>
          <text:p text:style-name="P24"><text:a xlink:href="#__RefHeading___Toc5862_4171937993" office:target-frame-name="_top" xlink:show="replace">2)<text:s/>사용<text:s/>예<text:tab/>7</text:a></text:p>
          <text:p text:style-name="P25"><text:a xlink:href="#__RefHeading___Toc5864_4171937993" office:target-frame-name="_top" xlink:show="replace">3) Map<text:s/>인터페이스를<text:s/>구현한<text:s/>클래스<text:tab/>8</text:a></text:p>
          <text:p text:style-name="P26"><text:a xlink:href="#__RefHeading___Toc5866_4171937993" office:target-frame-name="_top" xlink:show="replace">4) Map&lt;K,V&gt; interface<text:s/>메소드<text:tab/>9</text:a></text:p>
          <text:p text:style-name="P27"><text:a xlink:href="#__RefHeading___Toc5868_4171937993" office:target-frame-name="_top" xlink:show="replace">5)<text:s/>예제<text:tab/>10</text:a></text:p>
          <text:p text:style-name="P28"><text:a xlink:href="#__RefHeading___Toc5870_4171937993" office:target-frame-name="_top" xlink:show="replace">6) HashSet<text:s/>클래스<text:tab/>13</text:a></text:p>
          <text:p text:style-name="P29"><text:a xlink:href="#__RefHeading___Toc5872_4171937993" office:target-frame-name="_top" xlink:show="replace">7) TreeMap<text:tab/>14</text:a></text:p>
          <text:p text:style-name="P30"><text:a xlink:href="#__RefHeading___Toc5874_4171937993" office:target-frame-name="_top" xlink:show="replace">3.<text:s/>부록<text:s/>- Java Map<text:s/>고급<text:tab/>15</text:a></text:p>
          <text:p text:style-name="P31"><text:a xlink:href="#__RefHeading___Toc5876_4171937993" office:target-frame-name="_top" xlink:show="replace">1) equals, hashCode<text:s/>메소드<text:s/>재정의<text:tab/>15</text:a></text:p>
          <text:p text:style-name="P32"><text:a xlink:href="#__RefHeading___Toc5878_4171937993" office:target-frame-name="_top" xlink:show="replace">2) Objects<text:s/>클래스<text:tab/>17</text:a></text:p>
          <text:p text:style-name="P33"><text:a xlink:href="#__RefHeading___Toc5880_4171937993" office:target-frame-name="_top" xlink:show="replace">3)<text:s/>예제<text:tab/>18</text:a></text:p>
          <text:p text:style-name="P34"><text:a xlink:href="#__RefHeading___Toc5882_4171937993" office:target-frame-name="_top" xlink:show="replace">4) lombok<text:tab/>20</text:a></text:p>
        </text:index-body>
      </text:table-of-content>
      <text:p text:style-name="Standard"/>
      <text:p text:style-name="Standard"/>
      <text:p text:style-name="P35"/>
      <text:p text:style-name="P36"/>
      <text:h text:style-name="제목1" text:outline-level="1"><text:bookmark-start text:name="_Toc192390218"/><text:bookmark-start text:name="__RefHeading___Toc5846_4171937993"/><text:span text:style-name="T37">언어</text:span><text:s/><text:span text:style-name="T38">입출력</text:span><text:bookmark-end text:name="_Toc192390218"/><text:bookmark-end text:name="__RefHeading___Toc5846_4171937993"/></text:h>
      <text:p text:style-name="Standard"/>
      <text:h text:style-name="제목2" text:outline-level="2"><text:bookmark-start text:name="_Toc192390219"/><text:bookmark-start text:name="__RefHeading___Toc5848_4171937993"/>백준 문제 입출력<text:bookmark-end text:name="_Toc192390219"/><text:bookmark-end text:name="__RefHeading___Toc5848_4171937993"/></text:h>
      <text:p text:style-name="Standard"/>
      <text:p text:style-name="Standard">백준<text:s/>문제의<text:s/>입력은<text:s/>표준<text:s/>입력으로<text:s/>주어진다.</text:p>
      <text:p text:style-name="Standard">표준<text:s/>입력으로부터<text:s/>입력<text:s/>값을<text:s/>읽어서<text:s/>답을<text:s/>계산해야<text:s/>한다.</text:p>
      <text:p text:style-name="Standard">그리고<text:s/>계산<text:s/>결과를<text:s/>표준<text:s/>출력에<text:s/>출력해야<text:s/>한다.</text:p>
      <text:p text:style-name="Standard"/>
      <text:p text:style-name="Standard">표준<text:s/>입력: System.in<text:s/>객체에서<text:s/>읽기</text:p>
      <text:p text:style-name="Standard">표준<text:s/>출력: System.out<text:s/>객체에<text:s/>출력하기<text:s/>예: System.out.println(...)</text:p>
      <text:p text:style-name="Standard"/>
      <text:p text:style-name="Standard">시간<text:s/>효율을<text:s/>측정하는<text:s/>백준<text:s/>문제를<text:s/>풀<text:s/>때<text:s/>신경써서<text:s/>구현해야<text:s/>한다.</text:p>
      <text:p text:style-name="Standard"/>
      <text:p text:style-name="Standard"/>
      <text:h text:style-name="제목2" text:outline-level="2"><text:bookmark-start text:name="_Toc192390220"/><text:bookmark-start text:name="__RefHeading___Toc5850_4171937993"/>Scanner 클래스<text:bookmark-end text:name="_Toc192390220"/><text:bookmark-end text:name="__RefHeading___Toc5850_4171937993"/></text:h>
      <text:p text:style-name="Standard">입출력할<text:s/>때<text:s/>버퍼링하지<text:s/>않으면<text:s/>느리다.</text:p>
      <text:p text:style-name="Standard"><text:span text:style-name="T39">입출력</text:span><text:span text:style-name="T40"><text:s/></text:span><text:span text:style-name="T41">버퍼링에</text:span><text:span text:style-name="T42"><text:s/></text:span><text:span text:style-name="T43">대한</text:span><text:span text:style-name="T44"><text:s/></text:span><text:span text:style-name="T45">자세한</text:span><text:span text:style-name="T46"><text:s/></text:span><text:span text:style-name="T47">설명은</text:span><text:span text:style-name="T48"><text:s/>'Java<text:s/></text:span><text:span text:style-name="T49">네트워크</text:span><text:span text:style-name="T50"><text:s/></text:span><text:span text:style-name="T51">프로그래밍</text:span><text:span text:style-name="T52">'<text:s/></text:span><text:span text:style-name="T53">수업</text:span><text:span text:style-name="T54"><text:s/></text:span><text:span text:style-name="T55">내용을</text:span><text:span text:style-name="T56"><text:s/></text:span><text:span text:style-name="T57">참고하라</text:span><text:span text:style-name="T58">.</text:span></text:p>
      <text:p text:style-name="Standard"/>
      <text:p text:style-name="Standard">java.util.Scanner<text:s/>클래스를<text:s/>사용하기</text:p>
      <text:p text:style-name="P59"><text:span text:style-name="T60">   <text:s/></text:span><text:span text:style-name="T61">Scanner</text:span><text:span text:style-name="T62"><text:s/>scanner =<text:s/></text:span><text:span text:style-name="T63">new</text:span><text:span text:style-name="T64"><text:s/>Scanner(System.in);<text:s/></text:span><text:span text:style-name="T65">// (</text:span><text:span text:style-name="T66">가</text:span><text:span text:style-name="T67">)</text:span></text:p>
      <text:p text:style-name="P68"><text:span text:style-name="T69">   <text:s/></text:span><text:span text:style-name="T70">Scanner</text:span><text:span text:style-name="T71"><text:s/>scanner =<text:s/></text:span><text:span text:style-name="T72">new</text:span><text:span text:style-name="T73"><text:s/>Scanner(</text:span><text:span text:style-name="T74">new</text:span><text:span text:style-name="T75"><text:s/>BufferedInputStream(System.in));<text:s/></text:span><text:span text:style-name="T76">// (</text:span><text:span text:style-name="T77">나</text:span><text:span text:style-name="T78">)</text:span></text:p>
      <text:p text:style-name="P79"/>
      <text:p text:style-name="P80"><text:span text:style-name="T81"><text:s text:c="4"/>(</text:span><text:span text:style-name="T82">가</text:span><text:span text:style-name="T83">)<text:s/></text:span><text:span text:style-name="T84">버퍼링을</text:span><text:span text:style-name="T85"><text:s/></text:span><text:span text:style-name="T86">하지</text:span><text:span text:style-name="T87"><text:s/></text:span><text:span text:style-name="T88">않고</text:span><text:span text:style-name="T89"><text:s/></text:span><text:span text:style-name="T90">표준</text:span><text:span text:style-name="T91"><text:s/></text:span><text:span text:style-name="T92">입력에서</text:span><text:span text:style-name="T93"><text:s/></text:span><text:span text:style-name="T94">읽기</text:span><text:span text:style-name="T95"><text:s/></text:span><text:span text:style-name="T96">때문에</text:span><text:span text:style-name="T97"><text:s/></text:span><text:span text:style-name="T98">느리다</text:span><text:span text:style-name="T99">.</text:span></text:p>
      <text:p text:style-name="P100"><text:span text:style-name="T101"><text:s text:c="4"/>(</text:span><text:span text:style-name="T102">나</text:span><text:span text:style-name="T103">)<text:s/></text:span><text:span text:style-name="T104">버퍼링을</text:span><text:span text:style-name="T105"><text:s/></text:span><text:span text:style-name="T106">하면서</text:span><text:span text:style-name="T107"><text:s/></text:span><text:span text:style-name="T108">표준</text:span><text:span text:style-name="T109"><text:s/></text:span><text:span text:style-name="T110">입력에서</text:span><text:span text:style-name="T111"><text:s/></text:span><text:span text:style-name="T112">읽기</text:span><text:span text:style-name="T113"><text:s/></text:span><text:span text:style-name="T114">때문에</text:span><text:span text:style-name="T115"><text:s/></text:span><text:span text:style-name="T116">빠르다</text:span><text:span text:style-name="T117">.</text:span></text:p>
      <text:p text:style-name="P118"/>
      <text:p text:style-name="P119"/>
      <text:h text:style-name="제목2" text:outline-level="2"><text:bookmark-start text:name="_Toc192390221"/><text:bookmark-start text:name="__RefHeading___Toc5852_4171937993"/>BufferedReader 클래스<text:bookmark-end text:name="_Toc192390221"/><text:bookmark-end text:name="__RefHeading___Toc5852_4171937993"/></text:h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package</text:span><text:span text:style-name="T126"><text:s/>baekjoon;</text:span></text:p>
            <text:p text:style-name="P127"/>
            <text:p text:style-name="P128"><text:span text:style-name="T129">import</text:span><text:span text:style-name="T130"><text:s/>java.io.BufferedReader;</text:span></text:p>
            <text:p text:style-name="P131"><text:span text:style-name="T132">import</text:span><text:span text:style-name="T133"><text:s/>java.io.IOException;</text:span></text:p>
            <text:p text:style-name="P134"><text:span text:style-name="T135">import</text:span><text:span text:style-name="T136"><text:s/>java.io.InputStreamReader;</text:span></text:p>
            <text:p text:style-name="P137"><text:span text:style-name="T138">import</text:span><text:span text:style-name="T139"><text:s/>java.util.StringTokenizer;</text:span></text:p>
            <text:p text:style-name="P140"/>
            <text:p text:style-name="P141"><text:span text:style-name="T142">public</text:span><text:span text:style-name="T143"><text:s/></text:span><text:span text:style-name="T144">class</text:span><text:span text:style-name="T145"><text:s/>Main {</text:span></text:p>
            <text:p text:style-name="P146"/>
            <text:p text:style-name="P147"><text:span text:style-name="T148">   <text:s/></text:span><text:span text:style-name="T149">public</text:span><text:span text:style-name="T150"><text:s/></text:span><text:span text:style-name="T151">static</text:span><text:span text:style-name="T152"><text:s/></text:span><text:span text:style-name="T153">void</text:span><text:span text:style-name="T154"><text:s/>main(</text:span><text:span text:style-name="T155">String</text:span><text:span text:style-name="T156">[] args)<text:s/></text:span><text:span text:style-name="T157">throws</text:span><text:span text:style-name="T158"><text:s/></text:span><text:span text:style-name="T159">IOException</text:span><text:span text:style-name="T160"><text:s/>{</text:span></text:p>
            <text:p text:style-name="P161"><text:span text:style-name="T162">       <text:s/></text:span><text:span text:style-name="T163">var</text:span><text:span text:style-name="T164"><text:s/>reader =<text:s/></text:span><text:span text:style-name="T165">new</text:span><text:span text:style-name="T166"><text:s/>BufferedReader(</text:span><text:span text:style-name="T167">new</text:span><text:span text:style-name="T168"><text:s/>InputStreamReader(System.in));</text:span></text:p>
            <text:p text:style-name="P169"><text:span text:style-name="T170">       <text:s/></text:span><text:span text:style-name="T171">var</text:span><text:span text:style-name="T172"><text:s/>tokenizer =<text:s/></text:span><text:span text:style-name="T173">new</text:span><text:span text:style-name="T174"><text:s/>StringTokenizer(reader.readLine());</text:span></text:p>
            <text:p text:style-name="P175"><text:span text:style-name="T176">       <text:s/></text:span><text:span text:style-name="T177">int</text:span><text:span text:style-name="T178"><text:s/>N = Integer.parseInt(tokenizer.nextToken());</text:span></text:p>
            <text:p text:style-name="P179"><text:span text:style-name="T180">       <text:s/></text:span><text:span text:style-name="T181">int</text:span><text:span text:style-name="T182"><text:s/>M = Integer.parseInt(tokenizer.nextToken());</text:span></text:p>
            <text:p text:style-name="P183"><text:span text:style-name="T184">       <text:s/></text:span><text:span text:style-name="T185">int</text:span><text:span text:style-name="T186">[] A =<text:s/></text:span><text:span text:style-name="T187">new</text:span><text:span text:style-name="T188"><text:s/></text:span><text:span text:style-name="T189">int</text:span><text:span text:style-name="T190">[N];</text:span></text:p>
            <text:p text:style-name="P191"><text:span text:style-name="T192">        tokenizer =<text:s/></text:span><text:span text:style-name="T193">new</text:span><text:span text:style-name="T194"><text:s/>StringTokenizer(reader.readLine());</text:span></text:p>
            <text:p text:style-name="P195"><text:span text:style-name="T196">       <text:s/></text:span><text:span text:style-name="T197">for</text:span><text:span text:style-name="T198"><text:s/>(</text:span><text:span text:style-name="T199">int</text:span><text:span text:style-name="T200"><text:s/>i =<text:s/></text:span><text:span text:style-name="T201">0</text:span><text:span text:style-name="T202">; i &lt; N; ++i)</text:span></text:p>
            <text:p text:style-name="P203"><text:span text:style-name="T204">           <text:s/></text:span><text:span text:style-name="T205">A</text:span><text:span text:style-name="T206">[i] = Integer.parseInt(tokenizer.nextToken());</text:span></text:p>
            <text:p text:style-name="P207"><text:span text:style-name="T208">    }</text:span></text:p>
            <text:p text:style-name="P209"><text:span text:style-name="T210">}</text:span></text:p>
          </table:table-cell>
        </table:table-row>
      </table:table>
      <text:p text:style-name="Standard">이<text:s/>강의에서는<text:s/>BufferedReader<text:s/>클래스를<text:s/>이용하여<text:s/>읽기를<text:s/>구현한다.</text:p>
      <text:p text:style-name="Standard"/>
      <text:p text:style-name="P211"><text:span text:style-name="T212">var</text:span><text:span text:style-name="T213"><text:s/>reader =<text:s/></text:span><text:span text:style-name="T214">new</text:span><text:span text:style-name="T215"><text:s/>BufferedReader(</text:span><text:span text:style-name="T216">new</text:span><text:span text:style-name="T217"><text:s/>InputStreamReader(System.in));</text:span></text:p>
      <text:p text:style-name="P218"><text:span text:style-name="T219"><text:s text:c="3"/>//<text:s/></text:span><text:span text:style-name="T220">버퍼링하면서</text:span><text:span text:style-name="T221"><text:s/></text:span><text:span text:style-name="T222">표준</text:span><text:span text:style-name="T223"><text:s/></text:span><text:span text:style-name="T224">입력에서</text:span><text:span text:style-name="T225"><text:s/></text:span><text:span text:style-name="T226">문자열을</text:span><text:span text:style-name="T227"><text:s/></text:span><text:span text:style-name="T228">읽는</text:span><text:span text:style-name="T229"><text:s/>reader<text:s/></text:span><text:span text:style-name="T230">객체</text:span><text:span text:style-name="T231"><text:s/></text:span><text:span text:style-name="T232">생성</text:span></text:p>
      <text:p text:style-name="P233"/>
      <text:p text:style-name="P234"><text:span text:style-name="T235">var</text:span><text:span text:style-name="T236"><text:s/>tokenizer =<text:s/></text:span><text:span text:style-name="T237">new</text:span><text:span text:style-name="T238"><text:s/>StringTokenizer(reader.readLine());</text:span></text:p>
      <text:p text:style-name="P239"><text:span text:style-name="T240"><text:s text:c="3"/>//<text:s/></text:span><text:span text:style-name="T241">표준</text:span><text:span text:style-name="T242"><text:s/></text:span><text:span text:style-name="T243">입력에서</text:span><text:span text:style-name="T244"><text:s/></text:span><text:span text:style-name="T245">한</text:span><text:span text:style-name="T246"><text:s/></text:span><text:span text:style-name="T247">줄을</text:span><text:span text:style-name="T248"><text:s/></text:span><text:span text:style-name="T249">읽어서</text:span><text:span text:style-name="T250">,</text:span></text:p>
      <text:p text:style-name="P251"><text:span text:style-name="T252"><text:s text:c="3"/>//<text:s/></text:span><text:span text:style-name="T253">공백</text:span><text:span text:style-name="T254"><text:s/></text:span><text:span text:style-name="T255">문자를</text:span><text:span text:style-name="T256"><text:s/></text:span><text:span text:style-name="T257">기준으로</text:span><text:span text:style-name="T258"><text:s/></text:span><text:span text:style-name="T259">그</text:span><text:span text:style-name="T260"><text:s/></text:span><text:span text:style-name="T261">한줄</text:span><text:span text:style-name="T262"><text:s/></text:span><text:span text:style-name="T263">문자열을</text:span><text:span text:style-name="T264"><text:s/></text:span><text:span text:style-name="T265">쪼개기</text:span><text:span text:style-name="T266"><text:s/></text:span><text:span text:style-name="T267">위한</text:span><text:span text:style-name="T268"><text:s/>tokenizer<text:s/></text:span><text:span text:style-name="T269">객체</text:span><text:span text:style-name="T270"><text:s/></text:span><text:span text:style-name="T271">생성</text:span></text:p>
      <text:p text:style-name="P272"/>
      <text:p text:style-name="P273"><text:span text:style-name="T274">int</text:span><text:span text:style-name="T275"><text:s/>N = Integer.parseInt(tokenizer.nextToken());</text:span></text:p>
      <text:p text:style-name="P276"><text:span text:style-name="T277"><text:s text:c="4"/>//<text:s/></text:span><text:span text:style-name="T278">그렇게</text:span><text:span text:style-name="T279"><text:s/></text:span><text:span text:style-name="T280">쪼개어진</text:span><text:span text:style-name="T281"><text:s/></text:span><text:span text:style-name="T282">첫</text:span><text:span text:style-name="T283"><text:s/></text:span><text:span text:style-name="T284">단어를</text:span><text:span text:style-name="T285"><text:s/>int<text:s/></text:span><text:span text:style-name="T286">타입으로</text:span><text:span text:style-name="T287"><text:s/></text:span><text:span text:style-name="T288">변환해서</text:span><text:span text:style-name="T289"><text:s/>N<text:s/></text:span><text:span text:style-name="T290">변수에</text:span><text:span text:style-name="T291"><text:s/></text:span><text:span text:style-name="T292">대입</text:span></text:p>
      <text:p text:style-name="P293"/>
      <text:p text:style-name="P294"><text:span text:style-name="T295">int</text:span><text:span text:style-name="T296"><text:s/>M = Integer.parseInt(tokenizer.nextToken());</text:span></text:p>
      <text:p text:style-name="P297"><text:span text:style-name="T298"><text:s text:c="3"/>//<text:s/></text:span><text:span text:style-name="T299">그</text:span><text:span text:style-name="T300"><text:s/></text:span><text:span text:style-name="T301">다음</text:span><text:span text:style-name="T302"><text:s/></text:span><text:span text:style-name="T303">단어를</text:span><text:span text:style-name="T304"><text:s/>int<text:s/></text:span><text:span text:style-name="T305">타입으로</text:span><text:span text:style-name="T306"><text:s/></text:span><text:span text:style-name="T307">변환해서</text:span><text:span text:style-name="T308"><text:s/>M<text:s/></text:span><text:span text:style-name="T309">변수에</text:span><text:span text:style-name="T310"><text:s/></text:span><text:span text:style-name="T311">대입</text:span></text:p>
      <text:p text:style-name="P312"/>
      <text:p text:style-name="P313"><text:span text:style-name="T314">int</text:span><text:span text:style-name="T315">[] A =<text:s/></text:span><text:span text:style-name="T316">new</text:span><text:span text:style-name="T317"><text:s/></text:span><text:span text:style-name="T318">int</text:span><text:span text:style-name="T319">[N];</text:span></text:p>
      <text:p text:style-name="P320"><text:span text:style-name="T321">tokenizer =<text:s/></text:span><text:span text:style-name="T322">new</text:span><text:span text:style-name="T323"><text:s/>StringTokenizer(reader.readLine());</text:span></text:p>
      <text:p text:style-name="P324"><text:span text:style-name="T325"><text:s text:c="3"/>//<text:s/></text:span><text:span text:style-name="T326">그</text:span><text:span text:style-name="T327"><text:s/></text:span><text:span text:style-name="T328">다음</text:span><text:span text:style-name="T329"><text:s/></text:span><text:span text:style-name="T330">한</text:span><text:span text:style-name="T331"><text:s/></text:span><text:span text:style-name="T332">줄</text:span><text:span text:style-name="T333"><text:s/></text:span><text:span text:style-name="T334">문자열을</text:span><text:span text:style-name="T335"><text:s/></text:span><text:span text:style-name="T336">읽어서</text:span><text:span text:style-name="T337">,</text:span></text:p>
      <text:p text:style-name="P338"><text:span text:style-name="T339"><text:s text:c="3"/>//<text:s/></text:span><text:span text:style-name="T340">공백</text:span><text:span text:style-name="T341"><text:s/></text:span><text:span text:style-name="T342">문자를</text:span><text:span text:style-name="T343"><text:s/></text:span><text:span text:style-name="T344">기준으로</text:span><text:span text:style-name="T345"><text:s/></text:span><text:span text:style-name="T346">그</text:span><text:span text:style-name="T347"><text:s/></text:span><text:span text:style-name="T348">한줄</text:span><text:span text:style-name="T349"><text:s/></text:span><text:span text:style-name="T350">문자열을</text:span><text:span text:style-name="T351"><text:s/></text:span><text:span text:style-name="T352">쪼개기</text:span><text:span text:style-name="T353"><text:s/></text:span><text:span text:style-name="T354">위한</text:span><text:span text:style-name="T355"><text:s/>tokenizer<text:s/></text:span><text:span text:style-name="T356">객체</text:span><text:span text:style-name="T357"><text:s/></text:span><text:span text:style-name="T358">생성</text:span></text:p>
      <text:p text:style-name="P359"/>
      <text:p text:style-name="P360"><text:span text:style-name="T361">for</text:span><text:span text:style-name="T362"><text:s/>(</text:span><text:span text:style-name="T363">int</text:span><text:span text:style-name="T364"><text:s/>i =<text:s/></text:span><text:span text:style-name="T365">0</text:span><text:span text:style-name="T366">; i &lt; N; ++i)</text:span></text:p>
      <text:p text:style-name="P367"><text:span text:style-name="T368"><text:s/> <text:s/></text:span><text:span text:style-name="T369">A</text:span><text:span text:style-name="T370">[i] = Integer.parseInt(tokenizer.nextToken());</text:span></text:p>
      <text:p text:style-name="P371"><text:span text:style-name="T372"><text:s text:c="5"/>// N<text:s/></text:span><text:span text:style-name="T373">개의</text:span><text:span text:style-name="T374"><text:s/></text:span><text:span text:style-name="T375">단어를</text:span><text:span text:style-name="T376"><text:s/>int<text:s/></text:span><text:span text:style-name="T377">타입으로</text:span><text:span text:style-name="T378"><text:s/></text:span><text:span text:style-name="T379">변환해서</text:span><text:span text:style-name="T380"><text:s/>A<text:s/></text:span><text:span text:style-name="T381">배열에</text:span><text:span text:style-name="T382"><text:s/></text:span><text:span text:style-name="T383">대입한다</text:span><text:span text:style-name="T384">.</text:span></text:p>
      <text:p text:style-name="Standard"/>
      <text:p text:style-name="Standard"/>
      <text:h text:style-name="제목2" text:outline-level="2"><text:bookmark-start text:name="_Toc192390222"/><text:bookmark-start text:name="__RefHeading___Toc5854_4171937993"/>System.out.println 메소드<text:bookmark-end text:name="_Toc192390222"/><text:bookmark-end text:name="__RefHeading___Toc5854_4171937993"/></text:h>
      <text:p text:style-name="Standard">출력할<text:s/>답이<text:s/>숫자<text:s/>한<text:s/>두<text:s/>개<text:s/>뿐이라면,</text:p>
      <text:p text:style-name="Standard"><text:s text:c="3"/>그냥<text:s/>System.out.print<text:s/>메소드로<text:s/>출력해도<text:s/>된다.</text:p>
      <text:p text:style-name="Standard"/>
      <text:p text:style-name="Standard">출력할<text:s/>답이<text:s/>숫자<text:s/>여러<text:s/>개이고,<text:s/>시간<text:s/>효율을<text:s/>측정하는<text:s/>문제라면,</text:p>
      <text:soft-page-break/>
      <text:p text:style-name="Standard"><text:s text:c="4"/>그<text:s/>숫자들을<text:s/>하나씩<text:s/>System.out.print<text:s/>메소드로<text:s/>출력하는<text:s/>것은<text:s/>너무<text:s/>느리다.</text:p>
      <text:p text:style-name="Standard"><text:s text:c="4"/>버퍼링하면서<text:s/>출력해야<text:s/>한다.</text:p>
      <text:p text:style-name="Standard"/>
      <text:p text:style-name="Standard"><text:s text:c="4"/>출력할<text:s/>내용들<text:s/>각각을<text:s/>하나씩<text:s/>출력하는<text:s/>것은<text:s/>너무<text:s/>느리다.</text:p>
      <text:p text:style-name="Standard"><text:s text:c="4"/>버퍼에<text:s/>모아서<text:s/>한꺼번에<text:s/>출력해야<text:s/>된다.</text:p>
      <text:p text:style-name="Standard"/>
      <text:p text:style-name="Standard"/>
      <text:h text:style-name="제목2" text:outline-level="2"><text:bookmark-start text:name="_Toc192390223"/><text:bookmark-start text:name="__RefHeading___Toc5856_4171937993"/>BufferedWriter 클래스<text:bookmark-end text:name="_Toc192390223"/><text:bookmark-end text:name="__RefHeading___Toc5856_4171937993"/></text:h>
      <table:table table:style-name="Table385">
        <table:table-columns>
          <table:table-column table:style-name="TableColumn386"/>
        </table:table-columns>
        <table:table-row table:style-name="TableRow387">
          <table:table-cell table:style-name="TableCell388">
            <text:p text:style-name="P389"><text:span text:style-name="T390">package</text:span><text:span text:style-name="T391"><text:s/>baekjoon;</text:span></text:p>
            <text:p text:style-name="P392"/>
            <text:p text:style-name="P393"><text:span text:style-name="T394">import</text:span><text:span text:style-name="T395"><text:s/>java.io.BufferedReader;</text:span></text:p>
            <text:p text:style-name="P396"><text:span text:style-name="T397">import</text:span><text:span text:style-name="T398"><text:s/>java.io.BufferedWriter;</text:span></text:p>
            <text:p text:style-name="P399"><text:span text:style-name="T400">import</text:span><text:span text:style-name="T401"><text:s/>java.io.IOException;</text:span></text:p>
            <text:p text:style-name="P402"><text:span text:style-name="T403">import</text:span><text:span text:style-name="T404"><text:s/>java.io.InputStreamReader;</text:span></text:p>
            <text:p text:style-name="P405"><text:span text:style-name="T406">import</text:span><text:span text:style-name="T407"><text:s/>java.io.OutputStreamWriter;</text:span></text:p>
            <text:p text:style-name="P408"><text:span text:style-name="T409">import</text:span><text:span text:style-name="T410"><text:s/>java.util.StringTokenizer;</text:span></text:p>
            <text:p text:style-name="P411"/>
            <text:p text:style-name="P412"><text:span text:style-name="T413">public</text:span><text:span text:style-name="T414"><text:s/></text:span><text:span text:style-name="T415">class</text:span><text:span text:style-name="T416"><text:s/>Main {</text:span></text:p>
            <text:p text:style-name="P417"/>
            <text:p text:style-name="P418"><text:span text:style-name="T419">   <text:s/></text:span><text:span text:style-name="T420">public</text:span><text:span text:style-name="T421"><text:s/></text:span><text:span text:style-name="T422">static</text:span><text:span text:style-name="T423"><text:s/></text:span><text:span text:style-name="T424">void</text:span><text:span text:style-name="T425"><text:s/>main(</text:span><text:span text:style-name="T426">String</text:span><text:span text:style-name="T427">[] args)<text:s/></text:span><text:span text:style-name="T428">throws</text:span><text:span text:style-name="T429"><text:s/></text:span><text:span text:style-name="T430">IOException</text:span><text:span text:style-name="T431"><text:s/>{</text:span></text:p>
            <text:p text:style-name="P432"><text:span text:style-name="T433">       <text:s/></text:span><text:span text:style-name="T434">var</text:span><text:span text:style-name="T435"><text:s/>reader =<text:s/></text:span><text:span text:style-name="T436">new</text:span><text:span text:style-name="T437"><text:s/>BufferedReader(</text:span><text:span text:style-name="T438">new</text:span><text:span text:style-name="T439"><text:s/>InputStreamReader(System.in));</text:span></text:p>
            <text:p text:style-name="P440"><text:span text:style-name="T441">       <text:s/></text:span><text:span text:style-name="T442">var</text:span><text:span text:style-name="T443"><text:s/>tokenizer =<text:s/></text:span><text:span text:style-name="T444">new</text:span><text:span text:style-name="T445"><text:s/>StringTokenizer(reader.readLine());</text:span></text:p>
            <text:p text:style-name="P446"><text:span text:style-name="T447">       <text:s/></text:span><text:span text:style-name="T448">int</text:span><text:span text:style-name="T449"><text:s/>N = Integer.parseInt(tokenizer.nextToken());</text:span></text:p>
            <text:p text:style-name="P450"><text:span text:style-name="T451">       <text:s/></text:span><text:span text:style-name="T452">int</text:span><text:span text:style-name="T453"><text:s/>M = Integer.parseInt(tokenizer.nextToken());</text:span></text:p>
            <text:p text:style-name="P454"><text:span text:style-name="T455">       <text:s/></text:span><text:span text:style-name="T456">int</text:span><text:span text:style-name="T457">[] A =<text:s/></text:span><text:span text:style-name="T458">new</text:span><text:span text:style-name="T459"><text:s/></text:span><text:span text:style-name="T460">int</text:span><text:span text:style-name="T461">[N];</text:span></text:p>
            <text:p text:style-name="P462"><text:span text:style-name="T463">        tokenizer =<text:s/></text:span><text:span text:style-name="T464">new</text:span><text:span text:style-name="T465"><text:s/>StringTokenizer(reader.readLine());</text:span></text:p>
            <text:p text:style-name="P466"><text:span text:style-name="T467">       <text:s/></text:span><text:span text:style-name="T468">for</text:span><text:span text:style-name="T469"><text:s/>(</text:span><text:span text:style-name="T470">int</text:span><text:span text:style-name="T471"><text:s/>i =<text:s/></text:span><text:span text:style-name="T472">0</text:span><text:span text:style-name="T473">; i &lt; N; ++i)</text:span></text:p>
            <text:p text:style-name="P474"><text:span text:style-name="T475">           <text:s/></text:span><text:span text:style-name="T476">A</text:span><text:span text:style-name="T477">[i] = Integer.parseInt(tokenizer.nextToken());</text:span></text:p>
            <text:p text:style-name="P478"/>
            <text:p text:style-name="P479"><text:span text:style-name="T480">       <text:s/></text:span><text:span text:style-name="T481">var</text:span><text:span text:style-name="T482"><text:s/>writer =<text:s/></text:span><text:span text:style-name="T483">new</text:span><text:span text:style-name="T484"><text:s/>BufferedWriter(</text:span><text:span text:style-name="T485">new</text:span><text:span text:style-name="T486"><text:s/>OutputStreamWriter(System.out));</text:span></text:p>
            <text:p text:style-name="P487"><text:span text:style-name="T488">       <text:s/></text:span><text:span text:style-name="T489">for</text:span><text:span text:style-name="T490"><text:s/>(</text:span><text:span text:style-name="T491">int</text:span><text:span text:style-name="T492"><text:s/>i =<text:s/></text:span><text:span text:style-name="T493">0</text:span><text:span text:style-name="T494">; i &lt; N; ++i) {</text:span></text:p>
            <text:p text:style-name="P495"><text:span text:style-name="T496">            writer.write(String.valueOf(</text:span><text:span text:style-name="T497">A</text:span><text:span text:style-name="T498">[i]));</text:span></text:p>
            <text:p text:style-name="P499"><text:span text:style-name="T500">            writer.write(</text:span><text:span text:style-name="T501">' '</text:span><text:span text:style-name="T502">);</text:span></text:p>
            <text:p text:style-name="P503"><text:span text:style-name="T504">        }</text:span></text:p>
            <text:p text:style-name="P505"><text:span text:style-name="T506">        writer.flush();</text:span></text:p>
            <text:p text:style-name="P507"><text:span text:style-name="T508">    }</text:span></text:p>
            <text:p text:style-name="P509"><text:span text:style-name="T510">}</text:span></text:p>
          </table:table-cell>
        </table:table-row>
      </table:table>
      <text:p text:style-name="Standard"/>
      <text:p text:style-name="Standard"/>
      <text:p text:style-name="P511"><text:span text:style-name="T512">var</text:span><text:span text:style-name="T513"><text:s/>writer =<text:s/></text:span><text:span text:style-name="T514">new</text:span><text:span text:style-name="T515"><text:s/>BufferedWriter(</text:span><text:span text:style-name="T516">new</text:span><text:span text:style-name="T517"><text:s/>OutputStreamWriter(System.out));</text:span></text:p>
      <text:p text:style-name="P518"><text:span text:style-name="T519"><text:s text:c="3"/></text:span><text:span text:style-name="T520">//<text:s/></text:span><text:span text:style-name="T521">버퍼링</text:span><text:span text:style-name="T522"><text:s/></text:span><text:span text:style-name="T523">하면서</text:span><text:span text:style-name="T524"><text:s/></text:span><text:span text:style-name="T525">출력하기</text:span><text:span text:style-name="T526"><text:s/></text:span><text:span text:style-name="T527">위한</text:span><text:span text:style-name="T528"><text:s/>writer<text:s/></text:span><text:span text:style-name="T529">객체를</text:span><text:span text:style-name="T530"><text:s/></text:span><text:span text:style-name="T531">생성한다</text:span><text:span text:style-name="T532">.</text:span></text:p>
      <text:p text:style-name="P533"><text:span text:style-name="T534">for</text:span><text:span text:style-name="T535"><text:s/>(</text:span><text:span text:style-name="T536">int</text:span><text:span text:style-name="T537"><text:s/>i =<text:s/></text:span><text:span text:style-name="T538">0</text:span><text:span text:style-name="T539">; i &lt; N; ++i) {</text:span></text:p>
      <text:p text:style-name="P540"><text:span text:style-name="T541">   writer.write(String.valueOf(</text:span><text:span text:style-name="T542">A</text:span><text:span text:style-name="T543">[i])); <text:s/></text:span><text:span text:style-name="T544">// A[i]<text:s/></text:span><text:span text:style-name="T545">정수를</text:span><text:span text:style-name="T546"><text:s/></text:span><text:span text:style-name="T547">문자열로</text:span><text:span text:style-name="T548"><text:s/></text:span><text:span text:style-name="T549">변환해서</text:span><text:span text:style-name="T550"><text:s/></text:span><text:span text:style-name="T551">출력</text:span></text:p>
      <text:p text:style-name="P552"><text:span text:style-name="T553">   writer.write(</text:span><text:span text:style-name="T554">' '</text:span><text:span text:style-name="T555">); <text:s text:c="20"/></text:span><text:span text:style-name="T556">//<text:s/></text:span><text:span text:style-name="T557">공백</text:span><text:span text:style-name="T558"><text:s/></text:span><text:span text:style-name="T559">문자</text:span><text:span text:style-name="T560"><text:s/></text:span><text:span text:style-name="T561">출력</text:span></text:p>
      <text:p text:style-name="P562"><text:span text:style-name="T563">}</text:span></text:p>
      <text:p text:style-name="P564"><text:span text:style-name="T565">writer.flush(); <text:s/></text:span><text:span text:style-name="T566">//<text:s/></text:span><text:span text:style-name="T567">아직</text:span><text:span text:style-name="T568"><text:s/></text:span><text:span text:style-name="T569">출력되지</text:span><text:span text:style-name="T570"><text:s/></text:span><text:span text:style-name="T571">않고</text:span><text:span text:style-name="T572"><text:s/></text:span><text:span text:style-name="T573">버퍼에</text:span><text:span text:style-name="T574"><text:s/></text:span><text:span text:style-name="T575">남아</text:span><text:span text:style-name="T576"><text:s/></text:span><text:span text:style-name="T577">있을</text:span><text:span text:style-name="T578"><text:s/></text:span><text:span text:style-name="T579">수도</text:span><text:span text:style-name="T580"><text:s/></text:span><text:span text:style-name="T581">있는</text:span><text:span text:style-name="T582"><text:s/></text:span><text:span text:style-name="T583">내용을</text:span><text:span text:style-name="T584"><text:s/></text:span><text:span text:style-name="T585">전부</text:span><text:span text:style-name="T586"><text:s/></text:span><text:span text:style-name="T587">출력한다</text:span></text:p>
      <text:p text:style-name="Standard"/>
      <text:p text:style-name="Standard"/>
      <text:h text:style-name="제목3" text:outline-level="3">StringBuilder<text:s/>클래스</text:h>
      <text:p text:style-name="Standard">BufferedWriter<text:s/>클래스<text:s/>대신에<text:s/>StringBuilder<text:s/>클래스를<text:s/>이용해서<text:s/>출력을<text:s/>구현해도<text:s/>된다.</text:p>
      <text:p text:style-name="Standard">출력할<text:s/>내용을<text:s/>버퍼<text:s/>대신<text:s/>StringBuilder에<text:s/>모아서<text:s/>한꺼번에<text:s/>출력해도<text:s/>된다.</text:p>
      <text:p text:style-name="Standard"/>
      <table:table table:style-name="Table588">
        <table:table-columns>
          <table:table-column table:style-name="TableColumn589"/>
        </table:table-columns>
        <table:table-row table:style-name="TableRow590">
          <table:table-cell table:style-name="TableCell591">
            <text:p text:style-name="P592"><text:span text:style-name="T593">package</text:span><text:span text:style-name="T594"><text:s/>baekjoon;</text:span></text:p>
            <text:p text:style-name="P595"/>
            <text:p text:style-name="P596"><text:span text:style-name="T597">import</text:span><text:span text:style-name="T598"><text:s/>java.io.BufferedReader;</text:span></text:p>
            <text:p text:style-name="P599"><text:span text:style-name="T600">import</text:span><text:span text:style-name="T601"><text:s/>java.io.IOException;</text:span></text:p>
            <text:p text:style-name="P602"><text:span text:style-name="T603">import</text:span><text:span text:style-name="T604"><text:s/>java.io.InputStreamReader;</text:span></text:p>
            <text:soft-page-break/>
            <text:p text:style-name="P605"><text:span text:style-name="T606">import</text:span><text:span text:style-name="T607"><text:s/>java.util.StringTokenizer;</text:span></text:p>
            <text:p text:style-name="P608"/>
            <text:p text:style-name="P609"><text:span text:style-name="T610">public</text:span><text:span text:style-name="T611"><text:s/></text:span><text:span text:style-name="T612">class</text:span><text:span text:style-name="T613"><text:s/>Main {</text:span></text:p>
            <text:p text:style-name="P614"/>
            <text:p text:style-name="P615"><text:span text:style-name="T616">   <text:s/></text:span><text:span text:style-name="T617">public</text:span><text:span text:style-name="T618"><text:s/></text:span><text:span text:style-name="T619">static</text:span><text:span text:style-name="T620"><text:s/></text:span><text:span text:style-name="T621">void</text:span><text:span text:style-name="T622"><text:s/>main(</text:span><text:span text:style-name="T623">String</text:span><text:span text:style-name="T624">[] args)<text:s/></text:span><text:span text:style-name="T625">throws</text:span><text:span text:style-name="T626"><text:s/></text:span><text:span text:style-name="T627">IOException</text:span><text:span text:style-name="T628"><text:s/>{</text:span></text:p>
            <text:p text:style-name="P629"><text:span text:style-name="T630">       <text:s/></text:span><text:span text:style-name="T631">var</text:span><text:span text:style-name="T632"><text:s/>reader =<text:s/></text:span><text:span text:style-name="T633">new</text:span><text:span text:style-name="T634"><text:s/>BufferedReader(</text:span><text:span text:style-name="T635">new</text:span><text:span text:style-name="T636"><text:s/>InputStreamReader(System.in));</text:span></text:p>
            <text:p text:style-name="P637"><text:span text:style-name="T638">       <text:s/></text:span><text:span text:style-name="T639">var</text:span><text:span text:style-name="T640"><text:s/>tokenizer =<text:s/></text:span><text:span text:style-name="T641">new</text:span><text:span text:style-name="T642"><text:s/>StringTokenizer(reader.readLine());</text:span></text:p>
            <text:p text:style-name="P643"><text:span text:style-name="T644">       <text:s/></text:span><text:span text:style-name="T645">int</text:span><text:span text:style-name="T646"><text:s/>N = Integer.parseInt(tokenizer.nextToken());</text:span></text:p>
            <text:p text:style-name="P647"><text:span text:style-name="T648">       <text:s/></text:span><text:span text:style-name="T649">int</text:span><text:span text:style-name="T650"><text:s/>M = Integer.parseInt(tokenizer.nextToken());</text:span></text:p>
            <text:p text:style-name="P651"><text:span text:style-name="T652">       <text:s/></text:span><text:span text:style-name="T653">int</text:span><text:span text:style-name="T654">[] A =<text:s/></text:span><text:span text:style-name="T655">new</text:span><text:span text:style-name="T656"><text:s/></text:span><text:span text:style-name="T657">int</text:span><text:span text:style-name="T658">[N];</text:span></text:p>
            <text:p text:style-name="P659"><text:span text:style-name="T660">        tokenizer =<text:s/></text:span><text:span text:style-name="T661">new</text:span><text:span text:style-name="T662"><text:s/>StringTokenizer(reader.readLine());</text:span></text:p>
            <text:p text:style-name="P663"><text:span text:style-name="T664">       <text:s/></text:span><text:span text:style-name="T665">for</text:span><text:span text:style-name="T666"><text:s/>(</text:span><text:span text:style-name="T667">int</text:span><text:span text:style-name="T668"><text:s/>i =<text:s/></text:span><text:span text:style-name="T669">0</text:span><text:span text:style-name="T670">; i &lt; N; ++i)</text:span></text:p>
            <text:p text:style-name="P671"><text:span text:style-name="T672">           <text:s/></text:span><text:span text:style-name="T673">A</text:span><text:span text:style-name="T674">[i] = Integer.parseInt(tokenizer.nextToken());</text:span></text:p>
            <text:p text:style-name="P675"/>
            <text:p text:style-name="P676"><text:span text:style-name="T677">       <text:s/></text:span><text:span text:style-name="T678">var</text:span><text:span text:style-name="T679"><text:s/>builder =<text:s/></text:span><text:span text:style-name="T680">new</text:span><text:span text:style-name="T681"><text:s/>StringBuilder();</text:span></text:p>
            <text:p text:style-name="P682"><text:span text:style-name="T683">       <text:s/></text:span><text:span text:style-name="T684">for</text:span><text:span text:style-name="T685"><text:s/>(</text:span><text:span text:style-name="T686">int</text:span><text:span text:style-name="T687"><text:s/>i =<text:s/></text:span><text:span text:style-name="T688">0</text:span><text:span text:style-name="T689">; i &lt; N; ++i) {</text:span></text:p>
            <text:p text:style-name="P690"><text:span text:style-name="T691">            builder.append(</text:span><text:span text:style-name="T692">A</text:span><text:span text:style-name="T693">[i]);</text:span></text:p>
            <text:p text:style-name="P694"><text:span text:style-name="T695">            builder.append(</text:span><text:span text:style-name="T696">' '</text:span><text:span text:style-name="T697">);</text:span></text:p>
            <text:p text:style-name="P698"><text:span text:style-name="T699">        }</text:span></text:p>
            <text:p text:style-name="P700"><text:span text:style-name="T701">        System.out.println(builder.toString());</text:span></text:p>
            <text:p text:style-name="P702"><text:span text:style-name="T703">    }</text:span></text:p>
            <text:p text:style-name="P704"><text:span text:style-name="T705">}</text:span></text:p>
          </table:table-cell>
        </table:table-row>
      </table:table>
      <text:p text:style-name="Standard"/>
      <text:p text:style-name="P706"><text:span text:style-name="T707">var</text:span><text:span text:style-name="T708"><text:s/>builder =<text:s/></text:span><text:span text:style-name="T709">new</text:span><text:span text:style-name="T710"><text:s/>StringBuilder();<text:s/></text:span><text:span text:style-name="T711">// StringBuilder<text:s/></text:span><text:span text:style-name="T712">객체</text:span><text:span text:style-name="T713"><text:s/></text:span><text:span text:style-name="T714">생성</text:span></text:p>
      <text:p text:style-name="P715"><text:span text:style-name="T716">for</text:span><text:span text:style-name="T717"><text:s/>(</text:span><text:span text:style-name="T718">int</text:span><text:span text:style-name="T719"><text:s/>i =<text:s/></text:span><text:span text:style-name="T720">0</text:span><text:span text:style-name="T721">; i &lt; N; ++i) {</text:span></text:p>
      <text:p text:style-name="P722"><text:span text:style-name="T723">   builder.append(</text:span><text:span text:style-name="T724">A</text:span><text:span text:style-name="T725">[i]);<text:s/></text:span><text:span text:style-name="T726">// A[i]<text:s/></text:span><text:span text:style-name="T727">정수가</text:span><text:span text:style-name="T728"><text:s/></text:span><text:span text:style-name="T729">자동으로</text:span><text:span text:style-name="T730"><text:s/></text:span><text:span text:style-name="T731">문자열로</text:span><text:span text:style-name="T732"><text:s/></text:span><text:span text:style-name="T733">변환되어서</text:span><text:span text:style-name="T734">, builder</text:span><text:span text:style-name="T735">에</text:span><text:span text:style-name="T736"><text:s/></text:span><text:span text:style-name="T737">추가된다</text:span></text:p>
      <text:p text:style-name="P738"><text:span text:style-name="T739">   builder.append(</text:span><text:span text:style-name="T740">' '</text:span><text:span text:style-name="T741">); <text:s/></text:span><text:span text:style-name="T742">//<text:s/></text:span><text:span text:style-name="T743">공백</text:span><text:span text:style-name="T744"><text:s/></text:span><text:span text:style-name="T745">문자를</text:span><text:span text:style-name="T746"><text:s/>builder</text:span><text:span text:style-name="T747">에</text:span><text:span text:style-name="T748"><text:s/></text:span><text:span text:style-name="T749">추가한다</text:span></text:p>
      <text:p text:style-name="P750"><text:span text:style-name="T751">}</text:span></text:p>
      <text:p text:style-name="P752"><text:span text:style-name="T753">System.out.println(builder.toString());<text:s/></text:span><text:span text:style-name="T754">// builder</text:span><text:span text:style-name="T755">에</text:span><text:span text:style-name="T756"><text:s/></text:span><text:span text:style-name="T757">모았던</text:span><text:span text:style-name="T758"><text:s/></text:span><text:span text:style-name="T759">내용을</text:span><text:span text:style-name="T760"><text:s/></text:span><text:span text:style-name="T761">한꺼번에</text:span><text:span text:style-name="T762"><text:s/></text:span><text:span text:style-name="T763">출력한다</text:span></text:p>
      <text:p text:style-name="Standard"/>
      <text:p text:style-name="Standard"/>
      <text:p text:style-name="Standard"/>
      <text:p text:style-name="P764"/>
      <text:h text:style-name="제목1" text:outline-level="1"><text:bookmark-start text:name="_Toc192390224"/><text:bookmark-start text:name="__RefHeading___Toc5858_4171937993"/>Map<text:bookmark-end text:name="_Toc192390224"/><text:bookmark-end text:name="__RefHeading___Toc5858_4171937993"/></text:h>
      <text:p text:style-name="Standard"/>
      <text:h text:style-name="제목2" text:outline-level="2"><text:bookmark-start text:name="_Toc192390225"/><text:bookmark-start text:name="__RefHeading___Toc5860_4171937993"/>Map interface 개요<text:bookmark-end text:name="_Toc192390225"/><text:bookmark-end text:name="__RefHeading___Toc5860_4171937993"/></text:h>
      <text:p text:style-name="Standard">key<text:s/>값으로<text:s/>value를<text:s/>등록하고,</text:p>
      <text:p text:style-name="Standard">key<text:s/>값을<text:s/>사용하여<text:s/>value를<text:s/>찾아<text:s/>꺼내는<text:s/>사용법을<text:s/>정의한<text:s/>interface</text:p>
      <text:p text:style-name="Standard"/>
      <text:p text:style-name="Standard">데이터<text:s/>항목<text:s/>한<text:s/>개는<text:s/>key와<text:s/>value로<text:s/>구성된다.</text:p>
      <text:p text:style-name="Standard">데이터<text:s/>항목을<text:s/>등록할<text:s/>때는, key와<text:s/>value를<text:s/>같이<text:s/>등록한다.</text:p>
      <text:p text:style-name="Standard">데이터<text:s/>항목을<text:s/>꺼낼<text:s/>때는, key로<text:s/>찾아서<text:s/>value를<text:s/>리턴한다.</text:p>
      <text:p text:style-name="Standard"/>
      <text:p text:style-name="P765"><text:span text:style-name="T766">   </text:span><text:span text:style-name="T767">interface</text:span><text:span text:style-name="T768"><text:s/>Map&lt;</text:span><text:span text:style-name="T769">K</text:span><text:span text:style-name="T770">,<text:s/></text:span><text:span text:style-name="T771">V</text:span><text:span text:style-name="T772">&gt;</text:span></text:p>
      <text:p text:style-name="Standard"><text:s text:c="6"/>K: key<text:s/>값의<text:s/>타입</text:p>
      <text:p text:style-name="Standard"><text:s text:c="6"/>V: value<text:s/>값의<text:s/>타입</text:p>
      <text:p text:style-name="Standard"/>
      <text:p text:style-name="P773"><text:s text:c="3"/>변수<text:s/>선언<text:s/>예:<text:s/><text:span text:style-name="T774">Map</text:span><text:span text:style-name="T775">&lt;</text:span><text:span text:style-name="T776">String</text:span><text:span text:style-name="T777">,<text:s/></text:span><text:span text:style-name="T778">Integer</text:span><text:span text:style-name="T779">&gt; map1;</text:span></text:p>
      <text:p text:style-name="Standard"><text:s text:c="7"/>여기서<text:s/>map1은<text:s/>변수이고, Map&lt;String, Integer&gt;<text:s/>타입의<text:s/>변수이다.</text:p>
      <text:p text:style-name="Standard"><text:s text:c="7"/>아직<text:s/>객체는<text:s/>생성되지<text:s/>않았다.</text:p>
      <text:p text:style-name="Standard"/>
      <text:p text:style-name="Standard">Map<text:s/>인터페이이스를<text:s/>구현한<text:s/>자식<text:s/>클래스:</text:p>
      <text:p text:style-name="Standard"><text:s text:c="5"/>HashMap<text:s/>클래스가<text:s/>가장<text:s/>많이<text:s/>사용되고,</text:p>
      <text:p text:style-name="Standard"><text:s text:c="5"/>TreeMap<text:s/>클래스를<text:s/>사용할<text:s/>일이<text:s/>드물게<text:s/>있다.</text:p>
      <text:p text:style-name="Standard"/>
      <text:p text:style-name="Standard"><text:s text:c="3"/>객체<text:s/>생성의<text:s/>예<text:s/>#1:</text:p>
      <text:soft-page-break/>
      <text:p text:style-name="P780"><text:span text:style-name="T781">       </text:span><text:span text:style-name="T782">Map</text:span><text:span text:style-name="T783">&lt;</text:span><text:span text:style-name="T784">String</text:span><text:span text:style-name="T785">,<text:s/></text:span><text:span text:style-name="T786">Integer</text:span><text:span text:style-name="T787">&gt; map1 =<text:s/></text:span><text:span text:style-name="T788">new</text:span><text:span text:style-name="T789"><text:s/></text:span><text:span text:style-name="T790">HashMap</text:span><text:span text:style-name="T791">&lt;</text:span><text:span text:style-name="T792">String</text:span><text:span text:style-name="T793">,<text:s/></text:span><text:span text:style-name="T794">Integer</text:span><text:span text:style-name="T795">&gt;();</text:span></text:p>
      <text:p text:style-name="P796"><text:span text:style-name="T797">       </text:span><text:span text:style-name="T798">Map</text:span><text:span text:style-name="T799">&lt;</text:span><text:span text:style-name="T800">String</text:span><text:span text:style-name="T801">,<text:s/></text:span><text:span text:style-name="T802">Integer</text:span><text:span text:style-name="T803">&gt; map2 =<text:s/></text:span><text:span text:style-name="T804">new</text:span><text:span text:style-name="T805"><text:s/></text:span><text:span text:style-name="T806">TreeMap</text:span><text:span text:style-name="T807">&lt;</text:span><text:span text:style-name="T808">String</text:span><text:span text:style-name="T809">,<text:s/></text:span><text:span text:style-name="T810">Integer</text:span><text:span text:style-name="T811">&gt;();</text:span></text:p>
      <text:p text:style-name="P812"/>
      <text:p text:style-name="P813"><text:span text:style-name="T814"><text:s text:c="3"/></text:span><text:span text:style-name="T815">다음과</text:span><text:span text:style-name="T816"><text:s/></text:span><text:span text:style-name="T817">같이</text:span><text:span text:style-name="T818"><text:s/></text:span><text:span text:style-name="T819">생략할</text:span><text:span text:style-name="T820"><text:s/></text:span><text:span text:style-name="T821">수</text:span><text:span text:style-name="T822"><text:s/></text:span><text:span text:style-name="T823">있다</text:span><text:span text:style-name="T824">.</text:span></text:p>
      <text:p text:style-name="P825"><text:span text:style-name="T826">       </text:span><text:span text:style-name="T827">Map</text:span><text:span text:style-name="T828">&lt;</text:span><text:span text:style-name="T829">String</text:span><text:span text:style-name="T830">,<text:s/></text:span><text:span text:style-name="T831">Integer</text:span><text:span text:style-name="T832">&gt; map1 =<text:s/></text:span><text:span text:style-name="T833">new</text:span><text:span text:style-name="T834"><text:s/></text:span><text:span text:style-name="T835">HashMap</text:span><text:span text:style-name="T836">&lt;&gt;();</text:span></text:p>
      <text:p text:style-name="P837"><text:span text:style-name="T838">       </text:span><text:span text:style-name="T839">Map</text:span><text:span text:style-name="T840">&lt;</text:span><text:span text:style-name="T841">String</text:span><text:span text:style-name="T842">,<text:s/></text:span><text:span text:style-name="T843">Integer</text:span><text:span text:style-name="T844">&gt; map2 =<text:s/></text:span><text:span text:style-name="T845">new</text:span><text:span text:style-name="T846"><text:s/></text:span><text:span text:style-name="T847">TreeMap</text:span><text:span text:style-name="T848">&lt;&gt;();</text:span></text:p>
      <text:p text:style-name="P849"/>
      <table:table table:style-name="Table850">
        <table:table-columns>
          <table:table-column table:style-name="TableColumn851"/>
        </table:table-columns>
        <table:table-row table:style-name="TableRow852">
          <table:table-cell table:style-name="TableCell853">
            <text:p text:style-name="P854"><text:span text:style-name="T855">참고</text:span><text:span text:style-name="T856">:</text:span></text:p>
            <text:p text:style-name="P857"><text:span text:style-name="T858">Map</text:span><text:span text:style-name="T859">&lt;</text:span><text:span text:style-name="T860">String</text:span><text:span text:style-name="T861">,<text:s/></text:span><text:span text:style-name="T862">Integer</text:span><text:span text:style-name="T863">&gt; map1 =<text:s/></text:span><text:span text:style-name="T864">new</text:span><text:span text:style-name="T865"><text:s/></text:span><text:span text:style-name="T866">HashMap</text:span><text:span text:style-name="T867">&lt;&gt;();</text:span></text:p>
            <text:p text:style-name="P868"><text:span text:style-name="T869"><text:s text:c="2"/></text:span><text:span text:style-name="T870">변수의</text:span><text:span text:style-name="T871"><text:s/></text:span><text:span text:style-name="T872">타입은</text:span><text:span text:style-name="T873"><text:s/></text:span><text:span text:style-name="T874">Map</text:span><text:span text:style-name="T875">&lt;</text:span><text:span text:style-name="T876">String</text:span><text:span text:style-name="T877">,<text:s/></text:span><text:span text:style-name="T878">Integer</text:span><text:span text:style-name="T879">&gt;</text:span><text:s/>인터페이스</text:p>
            <text:p text:style-name="P880"><text:span text:style-name="T881"><text:s text:c="2"/></text:span><text:span text:style-name="T882">생성되는</text:span><text:span text:style-name="T883"><text:s/></text:span><text:span text:style-name="T884">객체의</text:span><text:span text:style-name="T885"><text:s/></text:span><text:span text:style-name="T886">타입은</text:span><text:span text:style-name="T887"><text:s/></text:span><text:span text:style-name="T888">new</text:span><text:span text:style-name="T889"><text:s/></text:span><text:span text:style-name="T890">HashMap</text:span><text:span text:style-name="T891">&lt;</text:span><text:span text:style-name="T892">String</text:span><text:span text:style-name="T893">,<text:s/></text:span><text:span text:style-name="T894">Integer</text:span><text:span text:style-name="T895">&gt;<text:s/></text:span><text:span text:style-name="T896">클래스</text:span></text:p>
            <text:p text:style-name="P897"/>
            <text:p text:style-name="P898"><text:span text:style-name="T899">이렇게</text:span><text:span text:style-name="T900"><text:s/></text:span><text:span text:style-name="T901">가급적</text:span><text:span text:style-name="T902"><text:s/></text:span><text:span text:style-name="T903">변수의</text:span><text:span text:style-name="T904"><text:s/></text:span><text:span text:style-name="T905">타입</text:span><text:span text:style-name="T906">,<text:s/></text:span><text:span text:style-name="T907">리턴</text:span><text:span text:style-name="T908"><text:s/></text:span><text:span text:style-name="T909">타입</text:span><text:span text:style-name="T910">,<text:s/></text:span><text:span text:style-name="T911">파라미터</text:span><text:span text:style-name="T912"><text:s/></text:span><text:span text:style-name="T913">타입</text:span><text:span text:style-name="T914"><text:s/></text:span><text:span text:style-name="T915">등은</text:span></text:p>
            <text:p text:style-name="P916"><text:span text:style-name="T917"><text:s text:c="2"/></text:span><text:span text:style-name="T918">부모</text:span><text:span text:style-name="T919"><text:s/></text:span><text:span text:style-name="T920">인터페이스</text:span><text:span text:style-name="T921"><text:s/></text:span><text:span text:style-name="T922">타입으로</text:span><text:span text:style-name="T923"><text:s/></text:span><text:span text:style-name="T924">선언하는</text:span><text:span text:style-name="T925"><text:s/></text:span><text:span text:style-name="T926">것이</text:span><text:span text:style-name="T927"><text:s/></text:span><text:span text:style-name="T928">좋다</text:span><text:span text:style-name="T929">.</text:span></text:p>
            <text:p text:style-name="P930"/>
            <text:p text:style-name="P931"><text:span text:style-name="T932">예를</text:span><text:span text:style-name="T933"><text:s/></text:span><text:span text:style-name="T934">들어</text:span><text:span text:style-name="T935"><text:s/></text:span><text:span text:style-name="T936">아르바이트</text:span><text:span text:style-name="T937"><text:s/></text:span><text:span text:style-name="T938">직원을</text:span><text:span text:style-name="T939"><text:s/></text:span><text:span text:style-name="T940">모집할</text:span><text:span text:style-name="T941"><text:s/></text:span><text:span text:style-name="T942">때</text:span><text:span text:style-name="T943">,</text:span></text:p>
            <text:p text:style-name="P944"><text:span text:style-name="T945"><text:s text:c="3"/></text:span><text:span text:style-name="T946">꼭</text:span><text:span text:style-name="T947"><text:s/></text:span><text:span text:style-name="T948">남자를</text:span><text:span text:style-name="T949"><text:s/></text:span><text:span text:style-name="T950">원하는</text:span><text:span text:style-name="T951"><text:s/></text:span><text:span text:style-name="T952">것은</text:span><text:span text:style-name="T953"><text:s/></text:span><text:span text:style-name="T954">아니고</text:span><text:span text:style-name="T955">,<text:s/></text:span><text:span text:style-name="T956">남자도</text:span><text:span text:style-name="T957"><text:s/></text:span><text:span text:style-name="T958">좋고</text:span><text:span text:style-name="T959"><text:s/></text:span><text:span text:style-name="T960">여자도</text:span><text:span text:style-name="T961"><text:s/></text:span><text:span text:style-name="T962">좋다면</text:span><text:span text:style-name="T963">,</text:span></text:p>
            <text:p text:style-name="P964"><text:span text:style-name="T965"><text:s text:c="3"/></text:span><text:span text:style-name="T966">남자</text:span><text:span text:style-name="T967"><text:s/></text:span><text:span text:style-name="T968">아르바이트</text:span><text:span text:style-name="T969"><text:s/></text:span><text:span text:style-name="T970">직원</text:span><text:span text:style-name="T971"><text:s/></text:span><text:span text:style-name="T972">모집이라고</text:span><text:span text:style-name="T973"><text:s/></text:span><text:span text:style-name="T974">선언하면</text:span><text:span text:style-name="T975"><text:s/></text:span><text:span text:style-name="T976">안되고</text:span><text:span text:style-name="T977">,<text:s/></text:span><text:span text:style-name="T978">그냥</text:span><text:span text:style-name="T979"><text:s/></text:span><text:span text:style-name="T980">아르바이트</text:span><text:span text:style-name="T981"><text:s/></text:span><text:span text:style-name="T982">직원</text:span><text:span text:style-name="T983"><text:s/></text:span><text:span text:style-name="T984">모집이라고</text:span><text:span text:style-name="T985"><text:s/></text:span><text:span text:style-name="T986">해야하는</text:span><text:span text:style-name="T987"><text:s/></text:span><text:span text:style-name="T988">것</text:span><text:span text:style-name="T989"><text:s/></text:span><text:span text:style-name="T990">처럼</text:span><text:span text:style-name="T991">.</text:span></text:p>
            <text:p text:style-name="P992"/>
            <text:p text:style-name="P993"><text:span text:style-name="T994">꼭</text:span><text:span text:style-name="T995"><text:s/>HashMap<text:s/></text:span><text:span text:style-name="T996">클래스를</text:span><text:span text:style-name="T997"><text:s/></text:span><text:span text:style-name="T998">원하는</text:span><text:span text:style-name="T999"><text:s/></text:span><text:span text:style-name="T1000">것은</text:span><text:span text:style-name="T1001"><text:s/></text:span><text:span text:style-name="T1002">아니고</text:span><text:span text:style-name="T1003">, HashMap</text:span><text:span text:style-name="T1004">도</text:span><text:span text:style-name="T1005"><text:s/></text:span><text:span text:style-name="T1006">괜찮고</text:span><text:span text:style-name="T1007"><text:s/>TreeMap</text:span><text:span text:style-name="T1008">도</text:span><text:span text:style-name="T1009"><text:s/></text:span><text:span text:style-name="T1010">괜찮다면</text:span><text:span text:style-name="T1011">,</text:span></text:p>
            <text:p text:style-name="P1012"><text:span text:style-name="T1013"><text:s text:c="3"/>Map<text:s/></text:span><text:span text:style-name="T1014">이라고</text:span><text:span text:style-name="T1015"><text:s/></text:span><text:span text:style-name="T1016">선언해야</text:span><text:span text:style-name="T1017"><text:s/></text:span><text:span text:style-name="T1018">한다</text:span><text:span text:style-name="T1019">.</text:span></text:p>
          </table:table-cell>
        </table:table-row>
      </table:table>
      <text:p text:style-name="P1020"/>
      <text:p text:style-name="P1021"><text:span text:style-name="T1022"><text:s text:c="3"/></text:span><text:span text:style-name="T1023">다음과</text:span><text:span text:style-name="T1024"><text:s/></text:span><text:span text:style-name="T1025">같이</text:span><text:span text:style-name="T1026"><text:s/></text:span><text:span text:style-name="T1027">생략할</text:span><text:span text:style-name="T1028"><text:s/></text:span><text:span text:style-name="T1029">수</text:span><text:span text:style-name="T1030"><text:s/></text:span><text:span text:style-name="T1031">있다</text:span><text:span text:style-name="T1032">.</text:span></text:p>
      <text:p text:style-name="P1033"><text:span text:style-name="T1034">       </text:span><text:span text:style-name="T1035">var</text:span><text:span text:style-name="T1036"><text:s/>map1 =<text:s/></text:span><text:span text:style-name="T1037">new</text:span><text:span text:style-name="T1038"><text:s/></text:span><text:span text:style-name="T1039">HashMap</text:span><text:span text:style-name="T1040">&lt;</text:span><text:span text:style-name="T1041">String</text:span><text:span text:style-name="T1042">,<text:s/></text:span><text:span text:style-name="T1043">Integer</text:span><text:span text:style-name="T1044">&gt;();</text:span></text:p>
      <text:p text:style-name="P1045"><text:span text:style-name="T1046">       </text:span><text:span text:style-name="T1047">var</text:span><text:span text:style-name="T1048"><text:s/>map2 =<text:s/></text:span><text:span text:style-name="T1049">new</text:span><text:span text:style-name="T1050"><text:s/></text:span><text:span text:style-name="T1051">TreeMap</text:span><text:span text:style-name="T1052">&lt;</text:span><text:span text:style-name="T1053">String</text:span><text:span text:style-name="T1054">,<text:s/></text:span><text:span text:style-name="T1055">Integer</text:span><text:span text:style-name="T1056">&gt;();</text:span></text:p>
      <text:p text:style-name="P1057"><text:span text:style-name="T1058"><text:s text:c="10"/></text:span><text:span text:style-name="T1059">위와</text:span><text:span text:style-name="T1060"><text:s/></text:span><text:span text:style-name="T1061">같이</text:span><text:span text:style-name="T1062"><text:s/></text:span><text:span text:style-name="T1063">변수의</text:span><text:span text:style-name="T1064"><text:s/></text:span><text:span text:style-name="T1065">타입</text:span><text:span text:style-name="T1066"><text:s/></text:span><text:span text:style-name="T1067">선언을</text:span><text:span text:style-name="T1068"><text:s/></text:span><text:span text:style-name="T1069">생략하면</text:span><text:span text:style-name="T1070">,<text:s/></text:span><text:span text:style-name="T1071">변수의</text:span><text:span text:style-name="T1072"><text:s/></text:span><text:span text:style-name="T1073">타입은</text:span><text:span text:style-name="T1074"><text:s/></text:span><text:span text:style-name="T1075">대입되는</text:span><text:span text:style-name="T1076"><text:s/></text:span><text:span text:style-name="T1077">객체의</text:span><text:span text:style-name="T1078"><text:s/></text:span><text:span text:style-name="T1079">타입과</text:span><text:span text:style-name="T1080"><text:s/></text:span><text:span text:style-name="T1081">같다</text:span><text:span text:style-name="T1082">.</text:span></text:p>
      <text:p text:style-name="P1083"/>
      <text:p text:style-name="Standard"><text:s text:c="3"/>HashMap<text:s/>클래스: hash table<text:s/>자료구조로<text:s/>구현됨.<text:s/>삽입<text:s/>삭제<text:s/>O(1)</text:p>
      <text:p text:style-name="Standard"><text:s text:c="3"/>TreeMap<text:s/>클래스: red black tree<text:s/>자료구조로<text:s/>구현됨.<text:s/>삽입<text:s/>삭제<text:s/>O(logN)</text:p>
      <text:p text:style-name="Standard"/>
      <text:p text:style-name="Standard"><text:s text:c="7"/>HashMap<text:s/>보다<text:s/>TreeMap이<text:s/>느리기<text:s/>때문에, TreeMap을<text:s/>사용할<text:s/>이유가<text:s/>거의<text:s/>없고,</text:p>
      <text:p text:style-name="Standard"><text:s text:c="7"/>key<text:s/>값들을<text:s/>정렬<text:s/>순서대로<text:s/>나열해야<text:s/>할<text:s/>때만, TreeMap을<text:s/>사용한다.</text:p>
      <text:p text:style-name="Standard"/>
      <text:p text:style-name="P1084"/>
      <text:h text:style-name="제목2" text:outline-level="2"><text:bookmark-start text:name="_Toc192390226"/><text:bookmark-start text:name="__RefHeading___Toc5862_4171937993"/>사용 예<text:bookmark-end text:name="_Toc192390226"/><text:bookmark-end text:name="__RefHeading___Toc5862_4171937993"/></text:h>
      <text:p text:style-name="Standard"/>
      <text:h text:style-name="제목3" text:outline-level="3">객체<text:s/>생성</text:h>
      <text:p text:style-name="P1085"><text:span text:style-name="T1086">Map</text:span><text:span text:style-name="T1087">&lt;</text:span><text:span text:style-name="T1088">String</text:span><text:span text:style-name="T1089">,<text:s/></text:span><text:span text:style-name="T1090">Person</text:span><text:span text:style-name="T1091">&gt; map =<text:s/></text:span><text:span text:style-name="T1092">new</text:span><text:span text:style-name="T1093"><text:s/></text:span><text:span text:style-name="T1094">HashMap</text:span><text:span text:style-name="T1095">&lt;</text:span><text:span text:style-name="T1096">String</text:span><text:span text:style-name="T1097">,<text:s/></text:span><text:span text:style-name="T1098">Person</text:span><text:span text:style-name="T1099">&gt;();</text:span></text:p>
      <text:p text:style-name="Standard"><text:s text:c="4"/>key는<text:s/>String<text:s/>객체이고, value는<text:s/>Person<text:s/>객체이다.</text:p>
      <text:p text:style-name="Standard"/>
      <text:h text:style-name="제목3" text:outline-level="3">사용</text:h>
      <text:p text:style-name="P1100"><text:span text:style-name="T1101">map.put(</text:span><text:span text:style-name="T1102">"</text:span><text:span text:style-name="T1103">가</text:span><text:span text:style-name="T1104">"</text:span><text:span text:style-name="T1105">,<text:s/></text:span><text:span text:style-name="T1106">new</text:span><text:span text:style-name="T1107"><text:s/>Person(</text:span><text:span text:style-name="T1108">"</text:span><text:span text:style-name="T1109">홍길동</text:span><text:span text:style-name="T1110">"</text:span><text:span text:style-name="T1111">));<text:s/></text:span><text:span text:style-name="T1112">// (key: "</text:span><text:span text:style-name="T1113">가</text:span><text:span text:style-name="T1114">", value:<text:s/></text:span><text:span text:style-name="T1115">홍길동</text:span><text:span text:style-name="T1116"><text:s/>Person<text:s/></text:span><text:span text:style-name="T1117">객체</text:span><text:span text:style-name="T1118">)<text:s/></text:span><text:span text:style-name="T1119">등록</text:span></text:p>
      <text:p text:style-name="P1120"><text:span text:style-name="T1121">map.put(</text:span><text:span text:style-name="T1122">"</text:span><text:span text:style-name="T1123">나</text:span><text:span text:style-name="T1124">"</text:span><text:span text:style-name="T1125">,<text:s/></text:span><text:span text:style-name="T1126">new</text:span><text:span text:style-name="T1127"><text:s/>Person(</text:span><text:span text:style-name="T1128">"</text:span><text:span text:style-name="T1129">임꺽정</text:span><text:span text:style-name="T1130">"</text:span><text:span text:style-name="T1131">));<text:s/></text:span><text:span text:style-name="T1132">// (key: "</text:span><text:span text:style-name="T1133">나</text:span><text:span text:style-name="T1134">", value:<text:s/></text:span><text:span text:style-name="T1135">임꺽정</text:span><text:span text:style-name="T1136"><text:s/>Person<text:s/></text:span><text:span text:style-name="T1137">객체</text:span><text:span text:style-name="T1138">)<text:s/></text:span><text:span text:style-name="T1139">등록</text:span></text:p>
      <text:p text:style-name="P1140"/>
      <text:p text:style-name="P1141"><text:span text:style-name="T1142">Person</text:span><text:span text:style-name="T1143"><text:s/>p1 = map.get(</text:span><text:span text:style-name="T1144">"</text:span><text:span text:style-name="T1145">가</text:span><text:span text:style-name="T1146">"</text:span><text:span text:style-name="T1147">);          </text:span><text:span text:style-name="T1148">// (key: "</text:span><text:span text:style-name="T1149">가</text:span><text:span text:style-name="T1150">")<text:s/></text:span><text:span text:style-name="T1151">로</text:span><text:span text:style-name="T1152"><text:s/></text:span><text:span text:style-name="T1153">등록했던</text:span><text:span text:style-name="T1154"><text:s/>value</text:span><text:span text:style-name="T1155">를</text:span><text:span text:style-name="T1156"><text:s/></text:span><text:span text:style-name="T1157">리턴한다</text:span><text:span text:style-name="T1158">.</text:span></text:p>
      <text:p text:style-name="P1159"><text:span text:style-name="T1160">  <text:s/>                                 <text:s/></text:span><text:span text:style-name="T1161">//<text:s/></text:span><text:span text:style-name="T1162">홍길동</text:span><text:span text:style-name="T1163"><text:s/>Person<text:s/></text:span><text:span text:style-name="T1164">객체</text:span><text:span text:style-name="T1165"><text:s/></text:span><text:span text:style-name="T1166">리턴됨</text:span><text:span text:style-name="T1167">.</text:span></text:p>
      <text:p text:style-name="P1168"/>
      <text:p text:style-name="P1169"><text:span text:style-name="T1170">Person</text:span><text:span text:style-name="T1171"><text:s/>p2 = map.get(</text:span><text:span text:style-name="T1172">"</text:span><text:span text:style-name="T1173">나</text:span><text:span text:style-name="T1174">"</text:span><text:span text:style-name="T1175">);          </text:span><text:span text:style-name="T1176">// (key: "</text:span><text:span text:style-name="T1177">나</text:span><text:span text:style-name="T1178">")<text:s/></text:span><text:span text:style-name="T1179">로</text:span><text:span text:style-name="T1180"><text:s/></text:span><text:span text:style-name="T1181">등록했던</text:span><text:span text:style-name="T1182"><text:s/>value</text:span><text:span text:style-name="T1183">를</text:span><text:span text:style-name="T1184"><text:s/></text:span><text:span text:style-name="T1185">리턴한다</text:span><text:span text:style-name="T1186">.</text:span></text:p>
      <text:p text:style-name="P1187"><text:span text:style-name="T1188">  <text:s/>                                 <text:s/></text:span><text:span text:style-name="T1189">//<text:s/></text:span><text:span text:style-name="T1190">임꺽정</text:span><text:span text:style-name="T1191"><text:s/>Person<text:s/></text:span><text:span text:style-name="T1192">객체</text:span><text:span text:style-name="T1193"><text:s/></text:span><text:span text:style-name="T1194">리턴됨</text:span><text:span text:style-name="T1195">.</text:span></text:p>
      <text:p text:style-name="P1196"/>
      <text:p text:style-name="P1197"><text:span text:style-name="T1198">Person</text:span><text:span text:style-name="T1199"><text:s/>p3 = map.get(</text:span><text:span text:style-name="T1200">"</text:span><text:span text:style-name="T1201">다</text:span><text:span text:style-name="T1202">"</text:span><text:span text:style-name="T1203">);          </text:span><text:span text:style-name="T1204">// (key: "</text:span><text:span text:style-name="T1205">다</text:span><text:span text:style-name="T1206">")<text:s/></text:span><text:span text:style-name="T1207">로</text:span><text:span text:style-name="T1208"><text:s/></text:span><text:span text:style-name="T1209">등록했던</text:span><text:span text:style-name="T1210"><text:s/>value</text:span><text:span text:style-name="T1211">를</text:span><text:span text:style-name="T1212"><text:s/></text:span><text:span text:style-name="T1213">리턴한다</text:span><text:span text:style-name="T1214">.</text:span></text:p>
      <text:p text:style-name="P1215"><text:span text:style-name="T1216"><text:s/>                                   <text:s/></text:span><text:span text:style-name="T1217">//<text:s/></text:span><text:span text:style-name="T1218">등록되지</text:span><text:span text:style-name="T1219"><text:s/></text:span><text:span text:style-name="T1220">않았으므로</text:span><text:span text:style-name="T1221"><text:s/>null<text:s/></text:span><text:span text:style-name="T1222">리턴됨</text:span><text:span text:style-name="T1223">.</text:span></text:p>
      <text:p text:style-name="P1224"/>
      <text:soft-page-break/>
      <text:h text:style-name="제목3" text:outline-level="3">치환</text:h>
      <text:p text:style-name="Standard">동일한<text:s/>key로<text:s/>다른<text:s/>value를<text:s/>등록하면<text:s/>기존의<text:s/>value의<text:s/>치환된다.</text:p>
      <text:p text:style-name="Standard"/>
      <text:p text:style-name="Standard">사용<text:s/>예:</text:p>
      <text:p text:style-name="P1225"><text:span text:style-name="T1226">map.put(</text:span><text:span text:style-name="T1227">"</text:span><text:span text:style-name="T1228">가</text:span><text:span text:style-name="T1229">"</text:span><text:span text:style-name="T1230">,<text:s/></text:span><text:span text:style-name="T1231">new</text:span><text:span text:style-name="T1232"><text:s/>Person(</text:span><text:span text:style-name="T1233">"</text:span><text:span text:style-name="T1234">홍길동</text:span><text:span text:style-name="T1235">"</text:span><text:span text:style-name="T1236">));<text:s/></text:span><text:span text:style-name="T1237">// (key: "</text:span><text:span text:style-name="T1238">가</text:span><text:span text:style-name="T1239">", value:<text:s/></text:span><text:span text:style-name="T1240">홍길동</text:span><text:span text:style-name="T1241"><text:s/>Person<text:s/></text:span><text:span text:style-name="T1242">객체</text:span><text:span text:style-name="T1243">)<text:s/></text:span><text:span text:style-name="T1244">등록</text:span></text:p>
      <text:p text:style-name="P1245"><text:span text:style-name="T1246">map.put(</text:span><text:span text:style-name="T1247">"</text:span><text:span text:style-name="T1248">가</text:span><text:span text:style-name="T1249">"</text:span><text:span text:style-name="T1250">,<text:s/></text:span><text:span text:style-name="T1251">new</text:span><text:span text:style-name="T1252"><text:s/>Person(</text:span><text:span text:style-name="T1253">"</text:span><text:span text:style-name="T1254">임꺽정</text:span><text:span text:style-name="T1255">"</text:span><text:span text:style-name="T1256">));<text:s/></text:span><text:span text:style-name="T1257">// (key: "</text:span><text:span text:style-name="T1258">가</text:span><text:span text:style-name="T1259">", value:<text:s/></text:span><text:span text:style-name="T1260">임꺽정</text:span><text:span text:style-name="T1261"><text:s/>Person<text:s/></text:span><text:span text:style-name="T1262">객체</text:span><text:span text:style-name="T1263">)<text:s/></text:span><text:span text:style-name="T1264">등록된다</text:span><text:span text:style-name="T1265">.</text:span></text:p>
      <text:p text:style-name="P1266"/>
      <text:p text:style-name="P1267"><text:span text:style-name="T1268">Person</text:span><text:span text:style-name="T1269"><text:s/>p1 = map.get(</text:span><text:span text:style-name="T1270">"</text:span><text:span text:style-name="T1271">가</text:span><text:span text:style-name="T1272">"</text:span><text:span text:style-name="T1273">); <text:s/>         </text:span><text:span text:style-name="T1274">// (key: "</text:span><text:span text:style-name="T1275">가</text:span><text:span text:style-name="T1276">")<text:s/></text:span><text:span text:style-name="T1277">로</text:span><text:span text:style-name="T1278"><text:s/></text:span><text:span text:style-name="T1279">등록했던</text:span><text:span text:style-name="T1280"><text:s/>value</text:span><text:span text:style-name="T1281">를</text:span><text:span text:style-name="T1282"><text:s/></text:span><text:span text:style-name="T1283">리턴한다</text:span><text:span text:style-name="T1284">.</text:span></text:p>
      <text:p text:style-name="P1285"><text:span text:style-name="T1286"><text:s text:c="2"/>                                   <text:s/></text:span><text:span text:style-name="T1287">//<text:s/></text:span><text:span text:style-name="T1288">임꺽정</text:span><text:span text:style-name="T1289"><text:s/>Person<text:s/></text:span><text:span text:style-name="T1290">객체</text:span><text:span text:style-name="T1291"><text:s/></text:span><text:span text:style-name="T1292">리턴된다</text:span><text:span text:style-name="T1293">.</text:span></text:p>
      <text:p text:style-name="P1294"/>
      <text:p text:style-name="Standard"/>
      <text:h text:style-name="제목3" text:outline-level="3">제거</text:h>
      <text:p text:style-name="P1295"><text:span text:style-name="T1296">map.put(</text:span><text:span text:style-name="T1297">"</text:span><text:span text:style-name="T1298">가</text:span><text:span text:style-name="T1299">"</text:span><text:span text:style-name="T1300">,<text:s/></text:span><text:span text:style-name="T1301">new</text:span><text:span text:style-name="T1302"><text:s/>Person(</text:span><text:span text:style-name="T1303">"</text:span><text:span text:style-name="T1304">임꺽정</text:span><text:span text:style-name="T1305">"</text:span><text:span text:style-name="T1306">));<text:s/></text:span><text:span text:style-name="T1307">// (key: "</text:span><text:span text:style-name="T1308">가</text:span><text:span text:style-name="T1309">", value:<text:s/></text:span><text:span text:style-name="T1310">임꺽정</text:span><text:span text:style-name="T1311"><text:s/>Person<text:s/></text:span><text:span text:style-name="T1312">객체</text:span><text:span text:style-name="T1313">)<text:s/></text:span><text:span text:style-name="T1314">등록된다</text:span><text:span text:style-name="T1315">.</text:span></text:p>
      <text:p text:style-name="P1316"/>
      <text:p text:style-name="P1317"><text:span text:style-name="T1318">Person</text:span><text:span text:style-name="T1319"><text:s/>p1 = map.get(</text:span><text:span text:style-name="T1320">"</text:span><text:span text:style-name="T1321">가</text:span><text:span text:style-name="T1322">"</text:span><text:span text:style-name="T1323">);          </text:span><text:span text:style-name="T1324">// (key: "</text:span><text:span text:style-name="T1325">가</text:span><text:span text:style-name="T1326">")<text:s/></text:span><text:span text:style-name="T1327">로</text:span><text:span text:style-name="T1328"><text:s/></text:span><text:span text:style-name="T1329">등록했던</text:span><text:span text:style-name="T1330"><text:s/>value</text:span><text:span text:style-name="T1331">를</text:span><text:span text:style-name="T1332"><text:s/></text:span><text:span text:style-name="T1333">리턴한다</text:span><text:span text:style-name="T1334">.</text:span></text:p>
      <text:p text:style-name="P1335"><text:span text:style-name="T1336">                                    <text:s/></text:span><text:span text:style-name="T1337">//<text:s/></text:span><text:span text:style-name="T1338">임꺽정</text:span><text:span text:style-name="T1339"><text:s/>Person<text:s/></text:span><text:span text:style-name="T1340">객체</text:span><text:span text:style-name="T1341"><text:s/></text:span><text:span text:style-name="T1342">리턴된다</text:span><text:span text:style-name="T1343">.</text:span></text:p>
      <text:p text:style-name="P1344"/>
      <text:p text:style-name="P1345"><text:span text:style-name="T1346">map.remove(</text:span><text:span text:style-name="T1347">"</text:span><text:span text:style-name="T1348">가</text:span><text:span text:style-name="T1349">"</text:span><text:span text:style-name="T1350">);                  <text:s/></text:span><text:span text:style-name="T1351">// (key: "</text:span><text:span text:style-name="T1352">가</text:span><text:span text:style-name="T1353">")<text:s/></text:span><text:span text:style-name="T1354">로</text:span><text:span text:style-name="T1355"><text:s/></text:span><text:span text:style-name="T1356">등록했던</text:span><text:span text:style-name="T1357"><text:s/></text:span><text:span text:style-name="T1358">데이터를</text:span><text:span text:style-name="T1359"><text:s/></text:span><text:span text:style-name="T1360">제거한다</text:span><text:span text:style-name="T1361">.</text:span></text:p>
      <text:p text:style-name="P1362"/>
      <text:p text:style-name="P1363"><text:span text:style-name="T1364">p1 = map.get(</text:span><text:span text:style-name="T1365">"</text:span><text:span text:style-name="T1366">가</text:span><text:span text:style-name="T1367">"</text:span><text:span text:style-name="T1368">);                <text:s/></text:span><text:span text:style-name="T1369">// null<text:s/></text:span><text:span text:style-name="T1370">이</text:span><text:span text:style-name="T1371"><text:s/></text:span><text:span text:style-name="T1372">리턴된다</text:span><text:span text:style-name="T1373">.</text:span></text:p>
      <text:p text:style-name="P1374"/>
      <text:p text:style-name="Standard"/>
      <text:p text:style-name="Standard"/>
      <text:p text:style-name="P1375"/>
      <text:h text:style-name="제목2" text:outline-level="2"><text:bookmark-start text:name="_Toc192390227"/><text:bookmark-start text:name="__RefHeading___Toc5864_4171937993"/><text:bookmark-start text:name="_Toc496620822"/>Map 인터페이스를 구현한 클래스<text:bookmark-end text:name="_Toc192390227"/><text:bookmark-end text:name="__RefHeading___Toc5864_4171937993"/><text:bookmark-end text:name="_Toc496620822"/></text:h>
      <text:p text:style-name="Standard"/>
      <text:h text:style-name="제목3" text:outline-level="3">HashMap<text:s/>클래스</text:h>
      <text:p text:style-name="Standard">해시<text:s/>테이블<text:s/>알고리즘으로<text:s/>구현된<text:s/>클래스</text:p>
      <text:p text:style-name="Standard"/>
      <text:p text:style-name="Standard">해시<text:s/>테이블<text:s/>알고리즘의<text:s/>성능</text:p>
      <text:p text:style-name="Standard"><text:s text:c="2"/>평균: <text:s text:c="7"/>O(1)</text:p>
      <text:p text:style-name="Standard"><text:s text:c="2"/>최악의<text:s/>경우: O(1) or O(<text:span text:style-name="T1376">N</text:span>) <text:s text:c="4"/></text:p>
      <text:p text:style-name="Standard"/>
      <text:p text:style-name="Standard"><text:s text:c="2"/>참고:<text:s/>최악의<text:s/>경우가<text:s/>O(<text:span text:style-name="T1377">N</text:span>)인<text:s/>것은<text:s/><text:span text:style-name="T1378">N</text:span>에<text:s/>비해서<text:s/>해시<text:s/>테이블의<text:s/>크기가<text:s/>너무<text:s/>작아</text:p>
      <text:p text:style-name="Standard"><text:s text:c="8"/>거의<text:s/>모든<text:s/>삽입에서<text:s/>충돌이<text:s/>발생하는<text:s/>경우<text:s/>뿐이다.</text:p>
      <text:p text:style-name="Standard"><text:s text:c="8"/>그런데<text:s/>N의<text:s/>크기<text:s/>규모를<text:s/>미리<text:s/>예상할<text:s/>수<text:s/>없어도,<text:s/>해시<text:s/>케이블<text:s/>크기가<text:s/>너무<text:s/>작어<text:s/>벌어지는</text:p>
      <text:p text:style-name="Standard"><text:s text:c="8"/>최악의<text:s/>경우를<text:s/>피하는<text:s/>구현<text:s/>기법이<text:s/>꽤<text:s/>쉽다.</text:p>
      <text:p text:style-name="Standard"><text:s text:c="8"/>따라서<text:s/>생초보의<text:s/>구현만<text:s/>무시하면,<text:s/>해시<text:s/>테이블<text:s/>알고리즘의<text:s/>평범한<text:s/>구현<text:s/>성능은<text:s/>O(1)<text:s/>이다.</text:p>
      <text:p text:style-name="Standard"><text:s/></text:p>
      <text:p text:style-name="Standard"/>
      <text:h text:style-name="제목3" text:outline-level="3">TreeMap<text:s/>클래스</text:h>
      <text:p text:style-name="Standard">Red Black Tree<text:s/>알고리즘으로<text:s/>구현된<text:s/>클래스</text:p>
      <text:p text:style-name="Standard"/>
      <text:p text:style-name="Standard">Red Black Tree<text:s/>알고리즘의<text:s/>성능</text:p>
      <text:p text:style-name="Standard"><text:s text:c="3"/>평균: <text:s text:c="7"/>O(log<text:span text:style-name="T1379">N</text:span>)</text:p>
      <text:p text:style-name="Standard"><text:s text:c="3"/>최악의<text:s/>경우: O(log<text:span text:style-name="T1380">N</text:span>)</text:p>
      <text:p text:style-name="Standard"/>
      <text:p text:style-name="Standard">TreeMap<text:s/>클래스는<text:s/>SortMap<text:s/>인터페이스를<text:s/>구현하였다.</text:p>
      <text:p text:style-name="Standard">등록된<text:s/>데이터<text:s/>항목들이<text:s/>key<text:s/>순서대로<text:s/>정렬된다. (Red Black Tree<text:s/>도<text:s/>Binary Tree<text:s/>이므로)</text:p>
      <text:p text:style-name="Standard"/>
      <text:p text:style-name="Standard"/>
      <text:p text:style-name="P1381"><text:span text:style-name="T1382">var</text:span><text:span text:style-name="T1383"><text:s/>map1 =<text:s/></text:span><text:span text:style-name="T1384">new</text:span><text:span text:style-name="T1385"><text:s/></text:span><text:span text:style-name="T1386">HashMap</text:span><text:span text:style-name="T1387">&lt;</text:span><text:span text:style-name="T1388">String</text:span><text:span text:style-name="T1389">,<text:s/></text:span><text:span text:style-name="T1390">Integer</text:span><text:span text:style-name="T1391">&gt;();</text:span></text:p>
      <text:p text:style-name="P1392"><text:span text:style-name="T1393">for</text:span><text:span text:style-name="T1394"><text:s/>(</text:span><text:span text:style-name="T1395">String</text:span><text:span text:style-name="T1396"><text:s/>key<text:s/></text:span><text:span text:style-name="T1397">:</text:span><text:span text:style-name="T1398"><text:s/>map1.keySet()) {</text:span></text:p>
      <text:p text:style-name="P1399"><text:span text:style-name="T1400">   System.out.println(key); <text:s text:c="2"/></text:span><text:span text:style-name="T1401">//<text:s/></text:span><text:span text:style-name="T1402">출력되는</text:span><text:span text:style-name="T1403"><text:s/>key</text:span><text:span text:style-name="T1404">값의</text:span><text:span text:style-name="T1405"><text:s/></text:span><text:span text:style-name="T1406">순서는</text:span><text:span text:style-name="T1407">, hash<text:s/></text:span><text:span text:style-name="T1408">값</text:span><text:span text:style-name="T1409"><text:s/></text:span><text:span text:style-name="T1410">순서라서</text:span><text:span text:style-name="T1411"><text:s/></text:span><text:span text:style-name="T1412">랜덤한</text:span><text:span text:style-name="T1413"><text:s/></text:span><text:span text:style-name="T1414">것처럼</text:span><text:span text:style-name="T1415"><text:s/></text:span><text:span text:style-name="T1416">보인다</text:span><text:span text:style-name="T1417">.</text:span></text:p>
      <text:p text:style-name="P1418"/>
      <text:p text:style-name="P1419"><text:span text:style-name="T1420">var</text:span><text:span text:style-name="T1421"><text:s/>map2 =<text:s/></text:span><text:span text:style-name="T1422">new</text:span><text:span text:style-name="T1423"><text:s/></text:span><text:span text:style-name="T1424">TreeMap</text:span><text:span text:style-name="T1425">&lt;</text:span><text:span text:style-name="T1426">String</text:span><text:span text:style-name="T1427">,<text:s/></text:span><text:span text:style-name="T1428">Integer</text:span><text:span text:style-name="T1429">&gt;();</text:span></text:p>
      <text:p text:style-name="P1430"><text:span text:style-name="T1431">for</text:span><text:span text:style-name="T1432"><text:s/>(</text:span><text:span text:style-name="T1433">String</text:span><text:span text:style-name="T1434"><text:s/>key<text:s/></text:span><text:span text:style-name="T1435">:</text:span><text:span text:style-name="T1436"><text:s/>map2.keySet()) {</text:span></text:p>
      <text:soft-page-break/>
      <text:p text:style-name="P1437"><text:span text:style-name="T1438">   System.out.println(key); <text:s text:c="2"/></text:span><text:span text:style-name="T1439">//<text:s/></text:span><text:span text:style-name="T1440">출력되는</text:span><text:span text:style-name="T1441"><text:s/>key</text:span><text:span text:style-name="T1442">값의</text:span><text:span text:style-name="T1443"><text:s/></text:span><text:span text:style-name="T1444">순서는</text:span><text:span text:style-name="T1445">, key<text:s/></text:span><text:span text:style-name="T1446">값</text:span><text:span text:style-name="T1447"><text:s/></text:span><text:span text:style-name="T1448">오름차순</text:span><text:span text:style-name="T1449"><text:s/></text:span><text:span text:style-name="T1450">정렬</text:span><text:span text:style-name="T1451"><text:s/></text:span><text:span text:style-name="T1452">순서이다</text:span><text:span text:style-name="T1453">.</text:span></text:p>
      <text:p text:style-name="Standard"/>
      <text:p text:style-name="Standard"/>
      <text:h text:style-name="제목3" text:outline-level="3">다형성</text:h>
      <text:p text:style-name="Standard">위<text:s/>두<text:s/>클래스<text:s/>모두<text:s/>Map<text:s/>인터페이스를<text:s/>구현했기<text:s/>때문에,</text:p>
      <text:p text:style-name="Standard">사용법이<text:s/>같고<text:s/>서로<text:s/>호환된다.</text:p>
      <text:p text:style-name="Standard"/>
      <text:p text:style-name="Standard"/>
      <text:p text:style-name="P1454"/>
      <text:h text:style-name="제목2" text:outline-level="2"><text:bookmark-start text:name="_Toc192390228"/><text:bookmark-start text:name="__RefHeading___Toc5866_4171937993"/><text:bookmark-start text:name="_Toc496620823"/>Map&lt;K,V&gt; interface 메소드<text:bookmark-end text:name="_Toc192390228"/><text:bookmark-end text:name="__RefHeading___Toc5866_4171937993"/><text:bookmark-end text:name="_Toc496620823"/></text:h>
      <text:p text:style-name="Standard"/>
      <text:p text:style-name="Standard">Map<text:s/>인터페이스를<text:s/>사용할<text:s/>때, Map&lt;K, V&gt;<text:s/>형태로<text:s/>사용한다.</text:p>
      <text:p text:style-name="Standard">여기서<text:s/>K, V<text:s/>부분에<text:s/>각각<text:s/>실제<text:s/>클래스<text:s/>타입을<text:s/>지정해야<text:s/>한다.</text:p>
      <text:p text:style-name="Standard">K는<text:s/>key의<text:s/>타입이고, V는<text:s/>value의<text:s/>타입이다.</text:p>
      <text:p text:style-name="Standard"/>
      <table:table table:style-name="Table1455">
        <table:table-columns>
          <table:table-column table:style-name="TableColumn1456"/>
        </table:table-columns>
        <table:table-row table:style-name="TableRow1457">
          <table:table-cell table:style-name="TableCell1458">
            <text:p text:style-name="Standard"><text:span text:style-name="T1459">void clear()</text:span></text:p>
            <text:p text:style-name="Standard">내부<text:s/>목록에<text:s/>들어있는<text:s/>항목<text:s/>전체를<text:s/>제거한다.<text:s/>그<text:s/>결과<text:s/>내부<text:s/>목록은<text:s/>비어<text:s/>있는<text:s/>상태가<text:s/>된다.</text:p>
          </table:table-cell>
        </table:table-row>
        <table:table-row table:style-name="TableRow1460">
          <table:table-cell table:style-name="TableCell1461">
            <text:p text:style-name="Standard"><text:span text:style-name="T1462">boolean containsKey(Object k)</text:span></text:p>
            <text:p text:style-name="Standard">등록된<text:s/>key<text:s/>목록<text:s/>중에서<text:s/>k<text:s/>가<text:s/>포함되어<text:s/>있으면<text:s/>true,<text:s/>없으면<text:s/>false<text:s/>리턴</text:p>
          </table:table-cell>
        </table:table-row>
        <table:table-row table:style-name="TableRow1463">
          <table:table-cell table:style-name="TableCell1464">
            <text:p text:style-name="Standard"><text:span text:style-name="T1465">boolean containsValue(Object v)</text:span></text:p>
            <text:p text:style-name="Standard">등록된<text:s/>value<text:s/>목록<text:s/>중에서<text:s/>v<text:s/>가<text:s/>포함되어<text:s/>있으면<text:s/>true,<text:s/>없으면<text:s/>false<text:s/>리턴</text:p>
          </table:table-cell>
        </table:table-row>
        <table:table-row table:style-name="TableRow1466">
          <table:table-cell table:style-name="TableCell1467">
            <text:p text:style-name="Standard"><text:span text:style-name="T1468">Set&lt;Map.Entry&lt;K,V&gt;&gt; <text:s/>entrySet()</text:span></text:p>
            <text:p text:style-name="Standard">등록된<text:s/>데이터<text:s/>항목들의<text:s/>목록을<text:s/>Set<text:s/>컬렉션<text:s/>타입으로<text:s/>리턴한다.</text:p>
            <text:p text:style-name="Standard">key의<text:s/>타입은<text:s/><text:span text:style-name="T1469">K</text:span><text:s/>이고, value의<text:s/>타입은<text:s/><text:span text:style-name="T1470">V</text:span><text:s/>이고,</text:p>
            <text:p text:style-name="Standard">데이터<text:s/>항목<text:s/>한<text:s/>개의<text:s/>타입은<text:s/><text:span text:style-name="T1471">Map.Entry&lt;K,V&gt;</text:span><text:s/>타입이고,</text:p>
            <text:p text:style-name="Standard">리턴되는<text:s/>데이터<text:s/>항목의<text:s/>목록의<text:s/>타입은<text:s/><text:span text:style-name="T1472">Set&lt;</text:span><text:span text:style-name="T1473">Map.Entry&lt;K,V&gt;</text:span><text:span text:style-name="T1474">&gt;</text:span><text:s/>타입이다.</text:p>
          </table:table-cell>
        </table:table-row>
        <table:table-row table:style-name="TableRow1475">
          <table:table-cell table:style-name="TableCell1476">
            <text:p text:style-name="Standard"><text:span text:style-name="T1477">V get(Object k)</text:span></text:p>
            <text:p text:style-name="Standard">(key: k)<text:s/>로<text:s/>등록했던<text:s/>value를<text:s/>리턴한다.</text:p>
          </table:table-cell>
        </table:table-row>
        <table:table-row table:style-name="TableRow1478">
          <table:table-cell table:style-name="TableCell1479">
            <text:p text:style-name="Standard"><text:span text:style-name="T1480">boolean isEmpty()</text:span></text:p>
            <text:p text:style-name="Standard">등록된<text:s/>데이터가<text:s/>0<text:s/>개이면<text:s/>true를<text:s/>리턴한다.</text:p>
          </table:table-cell>
        </table:table-row>
        <table:table-row table:style-name="TableRow1481">
          <table:table-cell table:style-name="TableCell1482">
            <text:p text:style-name="Standard"><text:span text:style-name="T1483">Set&lt;K&gt; keySet()</text:span></text:p>
            <text:p text:style-name="Standard">등록된<text:s/>key<text:s/>목록을<text:s/>Set<text:s/>타입으로<text:s/>리턴한다.</text:p>
          </table:table-cell>
        </table:table-row>
        <table:table-row table:style-name="TableRow1484">
          <table:table-cell table:style-name="TableCell1485">
            <text:p text:style-name="Standard"><text:span text:style-name="T1486">V put(K k, V v)</text:span></text:p>
            <text:p text:style-name="Standard">(key: k, value: v)<text:s/>등록한다.</text:p>
            <text:p text:style-name="Standard">(key: k)로<text:s/>이미<text:s/>등록되어<text:s/>있던<text:s/>value<text:s/>가<text:s/>있다면, v로<text:s/>치환된다.</text:p>
            <text:p text:style-name="Standard">리턴<text:s/>값은<text:s/>(key: k)로<text:s/>이미<text:s/>등록되어<text:s/>있던<text:s/>value<text:s/>이다.<text:s/>등록되어<text:s/>있던<text:s/>value<text:s/>가<text:s/>없을<text:s/>경우<text:s/>null을<text:s/>리턴한다.</text:p>
          </table:table-cell>
        </table:table-row>
        <table:table-row table:style-name="TableRow1487">
          <table:table-cell table:style-name="TableCell1488">
            <text:p text:style-name="Standard"><text:span text:style-name="T1489">void putAll(Map map)</text:span></text:p>
            <text:p text:style-name="Standard">map<text:s/>에<text:s/>등록되어<text:s/>있는<text:s/>데이터<text:s/>항목들을<text:s/>전부<text:s/>this에<text:s/>등록한다.</text:p>
          </table:table-cell>
        </table:table-row>
        <table:table-row table:style-name="TableRow1490">
          <table:table-cell table:style-name="TableCell1491">
            <text:p text:style-name="Standard"><text:span text:style-name="T1492">V remove(K v)</text:span></text:p>
            <text:p text:style-name="Standard">(key: k)로<text:s/>등록되어<text:s/>있던<text:s/>데이터를<text:s/>제거한다.</text:p>
            <text:p text:style-name="Standard">리턴<text:s/>값은<text:s/>(key: k)로<text:s/>이미<text:s/>등록되어<text:s/>있던<text:s/>value<text:s/>이다.<text:s/>등록되어<text:s/>있던<text:s/>value<text:s/>가<text:s/>없을<text:s/>경우<text:s/>null을<text:s/>리턴한다.</text:p>
          </table:table-cell>
        </table:table-row>
        <table:table-row table:style-name="TableRow1493">
          <table:table-cell table:style-name="TableCell1494">
            <text:p text:style-name="Standard"><text:span text:style-name="T1495">int size()</text:span></text:p>
            <text:p text:style-name="Standard">등록된<text:s/>데이터<text:s/>항목의<text:s/>수를<text:s/>리턴한다.</text:p>
          </table:table-cell>
        </table:table-row>
        <table:table-row table:style-name="TableRow1496">
          <table:table-cell table:style-name="TableCell1497">
            <text:p text:style-name="Standard"><text:span text:style-name="T1498">Collection&lt;V&gt; values()</text:span></text:p>
            <text:p text:style-name="Standard">등록된<text:s/>value<text:s/>목록을<text:s/>Collection<text:s/>타입으로<text:s/>리턴한다.</text:p>
          </table:table-cell>
        </table:table-row>
      </table:table>
      <text:p text:style-name="Standard"/>
      <text:p text:style-name="P1499"/>
      <text:h text:style-name="제목2" text:outline-level="2"><text:bookmark-start text:name="_Toc192390229"/><text:bookmark-start text:name="__RefHeading___Toc5868_4171937993"/><text:bookmark-start text:name="_Toc496620824"/>예제<text:bookmark-end text:name="_Toc192390229"/><text:bookmark-end text:name="__RefHeading___Toc5868_4171937993"/><text:bookmark-end text:name="_Toc496620824"/></text:h>
      <text:p text:style-name="Standard">Map<text:s/>인터페이스의<text:s/>메소드를<text:s/>사용하는<text:s/>예제를<text:s/>살펴보자</text:p>
      <text:p text:style-name="Standard"/>
      <text:h text:style-name="제목3" text:outline-level="3">예1 - add</text:h>
      <table:table table:style-name="Table1500">
        <table:table-columns>
          <table:table-column table:style-name="TableColumn1501"/>
        </table:table-columns>
        <table:table-row table:style-name="TableRow1502">
          <table:table-cell table:style-name="TableCell1503">
            <text:p text:style-name="코드표"><text:span text:style-name="T1504">package</text:span><text:span text:style-name="T1505"><text:s/>net.skhu.map;</text:span></text:p>
            <text:p text:style-name="코드표"/>
            <text:p text:style-name="코드표"><text:span text:style-name="T1506">import</text:span><text:span text:style-name="T1507"><text:s/>java.util.HashMap;</text:span></text:p>
            <text:p text:style-name="코드표"><text:span text:style-name="T1508">import</text:span><text:span text:style-name="T1509"><text:s/>java.util.Map;</text:span></text:p>
            <text:p text:style-name="코드표"/>
            <text:p text:style-name="코드표"><text:span text:style-name="T1510">public</text:span><text:span text:style-name="T1511"><text:s/></text:span><text:span text:style-name="T1512">class</text:span><text:span text:style-name="T1513"><text:s/>Example1 {</text:span></text:p>
            <text:p text:style-name="코드표"/>
            <text:p text:style-name="코드표"><text:span text:style-name="T1514"><text:s text:c="4"/></text:span><text:span text:style-name="T1515">public</text:span><text:span text:style-name="T1516"><text:s/></text:span><text:span text:style-name="T1517">static</text:span><text:span text:style-name="T1518"><text:s/></text:span><text:span text:style-name="T1519">void</text:span><text:span text:style-name="T1520"><text:s/>main(String[]<text:s/></text:span><text:span text:style-name="T1521">args</text:span><text:span text:style-name="T1522">) {</text:span></text:p>
            <text:soft-page-break/>
            <text:p text:style-name="코드표"><text:span text:style-name="T1523"><text:s text:c="8"/>Map&lt;String, Integer&gt;<text:s/></text:span><text:span text:style-name="T1524">map</text:span><text:span text:style-name="T1525"><text:s/>=<text:s/></text:span><text:span text:style-name="T1526">new</text:span><text:span text:style-name="T1527"><text:s/>HashMap&lt;String, Integer&gt;();</text:span></text:p>
            <text:p text:style-name="코드표"><text:span text:style-name="T1528"><text:s text:c="8"/></text:span><text:span text:style-name="T1529">map</text:span><text:span text:style-name="T1530">.put(</text:span><text:span text:style-name="T1531">"a"</text:span><text:span text:style-name="T1532">, 101);</text:span></text:p>
            <text:p text:style-name="코드표"><text:span text:style-name="T1533"><text:s text:c="8"/></text:span><text:span text:style-name="T1534">map</text:span><text:span text:style-name="T1535">.put(</text:span><text:span text:style-name="T1536">"b"</text:span><text:span text:style-name="T1537">, 102);</text:span></text:p>
            <text:p text:style-name="코드표"><text:span text:style-name="T1538"><text:s text:c="8"/></text:span><text:span text:style-name="T1539">map</text:span><text:span text:style-name="T1540">.put(</text:span><text:span text:style-name="T1541">"c"</text:span><text:span text:style-name="T1542">, 103);</text:span></text:p>
            <text:p text:style-name="코드표"/>
            <text:p text:style-name="코드표"><text:span text:style-name="T1543"><text:s text:c="8"/>System.</text:span><text:span text:style-name="T1544">out</text:span><text:span text:style-name="T1545">.printf(</text:span><text:span text:style-name="T1546">"%d %d %d\n"</text:span><text:span text:style-name="T1547">,<text:s/></text:span><text:span text:style-name="T1548">map</text:span><text:span text:style-name="T1549">.get(</text:span><text:span text:style-name="T1550">"a"</text:span><text:span text:style-name="T1551">),<text:s/></text:span><text:span text:style-name="T1552">map</text:span><text:span text:style-name="T1553">.get(</text:span><text:span text:style-name="T1554">"b"</text:span><text:span text:style-name="T1555">),<text:s/></text:span><text:span text:style-name="T1556">map</text:span><text:span text:style-name="T1557">.get(</text:span><text:span text:style-name="T1558">"c"</text:span><text:span text:style-name="T1559">));</text:span></text:p>
            <text:p text:style-name="P1560"><text:s text:c="4"/>}</text:p>
            <text:p text:style-name="P1561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1562">
        <table:table-columns>
          <table:table-column table:style-name="TableColumn1563"/>
        </table:table-columns>
        <table:table-row table:style-name="TableRow1564">
          <table:table-cell table:style-name="TableCell1565">
            <text:p text:style-name="Standard">101 102 103</text:p>
          </table:table-cell>
        </table:table-row>
      </table:table>
      <text:p text:style-name="Standard"/>
      <text:p text:style-name="Standard"/>
      <text:h text:style-name="제목3" text:outline-level="3">예2 - remove</text:h>
      <table:table table:style-name="Table1566">
        <table:table-columns>
          <table:table-column table:style-name="TableColumn1567"/>
        </table:table-columns>
        <table:table-row table:style-name="TableRow1568">
          <table:table-cell table:style-name="TableCell1569">
            <text:p text:style-name="코드표"><text:span text:style-name="T1570">package</text:span><text:span text:style-name="T1571"><text:s/>net.skhu.map;</text:span></text:p>
            <text:p text:style-name="코드표"/>
            <text:p text:style-name="코드표"><text:span text:style-name="T1572">import</text:span><text:span text:style-name="T1573"><text:s/>java.util.HashMap;</text:span></text:p>
            <text:p text:style-name="코드표"><text:span text:style-name="T1574">import</text:span><text:span text:style-name="T1575"><text:s/>java.util.Map;</text:span></text:p>
            <text:p text:style-name="코드표"/>
            <text:p text:style-name="코드표"><text:span text:style-name="T1576">public</text:span><text:span text:style-name="T1577"><text:s/></text:span><text:span text:style-name="T1578">class</text:span><text:span text:style-name="T1579"><text:s/>Example2 {</text:span></text:p>
            <text:p text:style-name="코드표"/>
            <text:p text:style-name="코드표"><text:span text:style-name="T1580"><text:s text:c="4"/></text:span><text:span text:style-name="T1581">public</text:span><text:span text:style-name="T1582"><text:s/></text:span><text:span text:style-name="T1583">static</text:span><text:span text:style-name="T1584"><text:s/></text:span><text:span text:style-name="T1585">void</text:span><text:span text:style-name="T1586"><text:s/>main(String[]<text:s/></text:span><text:span text:style-name="T1587">args</text:span><text:span text:style-name="T1588">) {</text:span></text:p>
            <text:p text:style-name="코드표"><text:span text:style-name="T1589"><text:s text:c="8"/>Map&lt;Integer, String&gt;<text:s/></text:span><text:span text:style-name="T1590">map</text:span><text:span text:style-name="T1591"><text:s/>=<text:s/></text:span><text:span text:style-name="T1592">new</text:span><text:span text:style-name="T1593"><text:s/>HashMap&lt;Integer, String&gt;();</text:span></text:p>
            <text:p text:style-name="코드표"><text:span text:style-name="T1594"><text:s text:c="8"/></text:span><text:span text:style-name="T1595">map</text:span><text:span text:style-name="T1596">.put(101,<text:s/></text:span><text:span text:style-name="T1597">"a"</text:span><text:span text:style-name="T1598">);</text:span></text:p>
            <text:p text:style-name="코드표"><text:span text:style-name="T1599"><text:s text:c="8"/></text:span><text:span text:style-name="T1600">map</text:span><text:span text:style-name="T1601">.put(102,<text:s/></text:span><text:span text:style-name="T1602">"b"</text:span><text:span text:style-name="T1603">);</text:span></text:p>
            <text:p text:style-name="코드표"><text:span text:style-name="T1604"><text:s text:c="8"/></text:span><text:span text:style-name="T1605">map</text:span><text:span text:style-name="T1606">.put(103,<text:s/></text:span><text:span text:style-name="T1607">"c"</text:span><text:span text:style-name="T1608">);</text:span></text:p>
            <text:p text:style-name="코드표"/>
            <text:p text:style-name="코드표"><text:span text:style-name="T1609"><text:s text:c="8"/>System.</text:span><text:span text:style-name="T1610">out</text:span><text:span text:style-name="T1611">.printf(</text:span><text:span text:style-name="T1612">"%s %s %s\n"</text:span><text:span text:style-name="T1613">,<text:s/></text:span><text:span text:style-name="T1614">map</text:span><text:span text:style-name="T1615">.get(101),<text:s/></text:span><text:span text:style-name="T1616">map</text:span><text:span text:style-name="T1617">.get(102),<text:s/></text:span><text:span text:style-name="T1618">map</text:span><text:span text:style-name="T1619">.get(103));</text:span></text:p>
            <text:p text:style-name="코드표"/>
            <text:p text:style-name="코드표"><text:span text:style-name="T1620"><text:s text:c="8"/></text:span><text:span text:style-name="T1621">map</text:span><text:span text:style-name="T1622">.remove(102);</text:span></text:p>
            <text:p text:style-name="코드표"><text:span text:style-name="T1623"><text:s text:c="8"/>System.</text:span><text:span text:style-name="T1624">out</text:span><text:span text:style-name="T1625">.printf(</text:span><text:span text:style-name="T1626">"%s %s %s\n"</text:span><text:span text:style-name="T1627">,<text:s/></text:span><text:span text:style-name="T1628">map</text:span><text:span text:style-name="T1629">.get(101),<text:s/></text:span><text:span text:style-name="T1630">map</text:span><text:span text:style-name="T1631">.get(102),<text:s/></text:span><text:span text:style-name="T1632">map</text:span><text:span text:style-name="T1633">.get(103));</text:span></text:p>
            <text:p text:style-name="P1634"><text:s text:c="4"/>}</text:p>
            <text:p text:style-name="P1635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1636">
        <table:table-columns>
          <table:table-column table:style-name="TableColumn1637"/>
        </table:table-columns>
        <table:table-row table:style-name="TableRow1638">
          <table:table-cell table:style-name="TableCell1639">
            <text:p text:style-name="P1640"><text:span text:style-name="T1641">a b c</text:span></text:p>
            <text:p text:style-name="P1642"><text:span text:style-name="T1643">a null c</text:span></text:p>
          </table:table-cell>
        </table:table-row>
      </table:table>
      <text:p text:style-name="Standard"/>
      <text:p text:style-name="Standard"/>
      <text:p text:style-name="Standard"/>
      <text:p text:style-name="P1644"/>
      <text:h text:style-name="제목3" text:outline-level="3"><text:bookmark-start text:name="_Toc496620826"/>예3<text:bookmark-end text:name="_Toc496620826"/><text:s/>-<text:s/>객체<text:s/>value</text:h>
      <text:p text:style-name="Standard">Person.java</text:p>
      <table:table table:style-name="Table1645">
        <table:table-columns>
          <table:table-column table:style-name="TableColumn1646"/>
        </table:table-columns>
        <table:table-row table:style-name="TableRow1647">
          <table:table-cell table:style-name="TableCell1648">
            <text:p text:style-name="코드표"><text:span text:style-name="T1649">package</text:span><text:span text:style-name="T1650"><text:s/>net.skhu.map;</text:span></text:p>
            <text:p text:style-name="코드표"/>
            <text:p text:style-name="코드표"><text:span text:style-name="T1651">public</text:span><text:span text:style-name="T1652"><text:s/></text:span><text:span text:style-name="T1653">class</text:span><text:span text:style-name="T1654"><text:s/>Person {</text:span></text:p>
            <text:p text:style-name="코드표"><text:span text:style-name="T1655"><text:s text:c="4"/>String<text:s/></text:span><text:span text:style-name="T1656">name</text:span><text:span text:style-name="T1657">;</text:span></text:p>
            <text:p text:style-name="코드표"><text:span text:style-name="T1658"><text:s text:c="4"/></text:span><text:span text:style-name="T1659">int</text:span><text:span text:style-name="T1660"><text:s/></text:span><text:span text:style-name="T1661">age</text:span><text:span text:style-name="T1662">;</text:span></text:p>
            <text:p text:style-name="코드표"/>
            <text:p text:style-name="코드표"><text:span text:style-name="T1663"><text:s text:c="4"/></text:span><text:span text:style-name="T1664">public</text:span><text:span text:style-name="T1665"><text:s/>Person(String<text:s/></text:span><text:span text:style-name="T1666">name</text:span><text:span text:style-name="T1667">,<text:s/></text:span><text:span text:style-name="T1668">int</text:span><text:span text:style-name="T1669"><text:s/></text:span><text:span text:style-name="T1670">age</text:span><text:span text:style-name="T1671">) {</text:span></text:p>
            <text:p text:style-name="코드표"><text:span text:style-name="T1672"><text:s text:c="8"/></text:span><text:span text:style-name="T1673">this</text:span><text:span text:style-name="T1674">.</text:span><text:span text:style-name="T1675">name</text:span><text:span text:style-name="T1676"><text:s/>=<text:s/></text:span><text:span text:style-name="T1677">name</text:span><text:span text:style-name="T1678">;</text:span></text:p>
            <text:p text:style-name="코드표"><text:span text:style-name="T1679"><text:s text:c="8"/></text:span><text:span text:style-name="T1680">this</text:span><text:span text:style-name="T1681">.</text:span><text:span text:style-name="T1682">age</text:span><text:span text:style-name="T1683"><text:s/>=<text:s/></text:span><text:span text:style-name="T1684">age</text:span><text:span text:style-name="T1685">;</text:span></text:p>
            <text:p text:style-name="P1686"><text:s text:c="4"/>}</text:p>
            <text:p text:style-name="코드표"/>
            <text:p text:style-name="코드표"><text:span text:style-name="T1687"><text:s text:c="4"/></text:span><text:span text:style-name="T1688">@Override</text:span></text:p>
            <text:p text:style-name="코드표"><text:span text:style-name="T1689"><text:s text:c="4"/></text:span><text:span text:style-name="T1690">public</text:span><text:span text:style-name="T1691"><text:s/>String toString() {</text:span></text:p>
            <text:p text:style-name="코드표"><text:span text:style-name="T1692"><text:s text:c="8"/></text:span><text:span text:style-name="T1693">return</text:span><text:span text:style-name="T1694"><text:s/>String.format(</text:span><text:span text:style-name="T1695">"Person(\"%s\",%d)"</text:span><text:span text:style-name="T1696">,<text:s/></text:span><text:span text:style-name="T1697">name</text:span><text:span text:style-name="T1698">,<text:s/></text:span><text:span text:style-name="T1699">age</text:span><text:span text:style-name="T1700">);</text:span></text:p>
            <text:p text:style-name="P1701"><text:s text:c="4"/>}</text:p>
            <text:p text:style-name="P1702">}</text:p>
            <text:p text:style-name="코드표"/>
          </table:table-cell>
        </table:table-row>
      </table:table>
      <text:p text:style-name="Standard"/>
      <text:p text:style-name="Standard">Example3.java</text:p>
      <table:table table:style-name="Table1703">
        <table:table-columns>
          <table:table-column table:style-name="TableColumn1704"/>
        </table:table-columns>
        <table:table-row table:style-name="TableRow1705">
          <table:table-cell table:style-name="TableCell1706">
            <text:p text:style-name="코드표"><text:span text:style-name="T1707">package</text:span><text:span text:style-name="T1708"><text:s/>net.skhu.map;</text:span></text:p>
            <text:p text:style-name="코드표"/>
            <text:soft-page-break/>
            <text:p text:style-name="코드표"><text:span text:style-name="T1709">import</text:span><text:span text:style-name="T1710"><text:s/>java.util.HashMap;</text:span></text:p>
            <text:p text:style-name="코드표"><text:span text:style-name="T1711">import</text:span><text:span text:style-name="T1712"><text:s/>java.util.Map;</text:span></text:p>
            <text:p text:style-name="코드표"/>
            <text:p text:style-name="코드표"><text:span text:style-name="T1713">public</text:span><text:span text:style-name="T1714"><text:s/></text:span><text:span text:style-name="T1715">class</text:span><text:span text:style-name="T1716"><text:s/>Example3 {</text:span></text:p>
            <text:p text:style-name="코드표"/>
            <text:p text:style-name="코드표"><text:span text:style-name="T1717"><text:s text:c="4"/></text:span><text:span text:style-name="T1718">public</text:span><text:span text:style-name="T1719"><text:s/></text:span><text:span text:style-name="T1720">static</text:span><text:span text:style-name="T1721"><text:s/></text:span><text:span text:style-name="T1722">void</text:span><text:span text:style-name="T1723"><text:s/>main(String[]<text:s/></text:span><text:span text:style-name="T1724">args</text:span><text:span text:style-name="T1725">) {</text:span></text:p>
            <text:p text:style-name="코드표"><text:span text:style-name="T1726"><text:s text:c="8"/>Map&lt;Integer, Person&gt;<text:s/></text:span><text:span text:style-name="T1727">map</text:span><text:span text:style-name="T1728"><text:s/>=<text:s/></text:span><text:span text:style-name="T1729">new</text:span><text:span text:style-name="T1730"><text:s/>HashMap&lt;Integer, Person&gt;();</text:span></text:p>
            <text:p text:style-name="코드표"><text:span text:style-name="T1731"><text:s text:c="8"/></text:span><text:span text:style-name="T1732">map</text:span><text:span text:style-name="T1733">.put(101,<text:s/></text:span><text:span text:style-name="T1734">new</text:span><text:span text:style-name="T1735"><text:s/>Person(</text:span><text:span text:style-name="T1736">"</text:span><text:span text:style-name="T1737">홍길동</text:span><text:span text:style-name="T1738">"</text:span><text:span text:style-name="T1739">, 18));</text:span></text:p>
            <text:p text:style-name="코드표"><text:span text:style-name="T1740"><text:s text:c="8"/></text:span><text:span text:style-name="T1741">map</text:span><text:span text:style-name="T1742">.put(102,<text:s/></text:span><text:span text:style-name="T1743">new</text:span><text:span text:style-name="T1744"><text:s/>Person(</text:span><text:span text:style-name="T1745">"</text:span><text:span text:style-name="T1746">임꺽정</text:span><text:span text:style-name="T1747">"</text:span><text:span text:style-name="T1748">, 19));</text:span></text:p>
            <text:p text:style-name="코드표"/>
            <text:p text:style-name="코드표"><text:span text:style-name="T1749"><text:s text:c="8"/>System.</text:span><text:span text:style-name="T1750">out</text:span><text:span text:style-name="T1751">.printf(</text:span><text:span text:style-name="T1752">"%s <text:s/>%s <text:s/>%s\n"</text:span><text:span text:style-name="T1753">,<text:s/></text:span><text:span text:style-name="T1754">map</text:span><text:span text:style-name="T1755">.get(101),<text:s/></text:span><text:span text:style-name="T1756">map</text:span><text:span text:style-name="T1757">.get(102),<text:s/></text:span><text:span text:style-name="T1758">map</text:span><text:span text:style-name="T1759">.get(103));</text:span></text:p>
            <text:p text:style-name="코드표"/>
            <text:p text:style-name="코드표"><text:span text:style-name="T1760"><text:s text:c="8"/></text:span><text:span text:style-name="T1761">map</text:span><text:span text:style-name="T1762">.remove(102);</text:span></text:p>
            <text:p text:style-name="코드표"><text:span text:style-name="T1763"><text:s text:c="8"/>System.</text:span><text:span text:style-name="T1764">out</text:span><text:span text:style-name="T1765">.printf(</text:span><text:span text:style-name="T1766">"%s <text:s/>%s <text:s/>%s\n"</text:span><text:span text:style-name="T1767">,<text:s/></text:span><text:span text:style-name="T1768">map</text:span><text:span text:style-name="T1769">.get(101),<text:s/></text:span><text:span text:style-name="T1770">map</text:span><text:span text:style-name="T1771">.get(102),<text:s/></text:span><text:span text:style-name="T1772">map</text:span><text:span text:style-name="T1773">.get(103));</text:span></text:p>
            <text:p text:style-name="P1774"><text:s text:c="4"/>}</text:p>
            <text:p text:style-name="P1775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1776">
        <table:table-columns>
          <table:table-column table:style-name="TableColumn1777"/>
        </table:table-columns>
        <table:table-row table:style-name="TableRow1778">
          <table:table-cell table:style-name="TableCell1779">
            <text:p text:style-name="P1780"><text:span text:style-name="T1781">Person("</text:span><text:span text:style-name="T1782">홍길동</text:span><text:span text:style-name="T1783">",18) <text:s/>Person("</text:span><text:span text:style-name="T1784">임꺽정</text:span><text:span text:style-name="T1785">",19) <text:s/>null</text:span></text:p>
            <text:p text:style-name="P1786"><text:span text:style-name="T1787">Person("</text:span><text:span text:style-name="T1788">홍길동</text:span><text:span text:style-name="T1789">",18) <text:s/>null <text:s/>null</text:span></text:p>
          </table:table-cell>
        </table:table-row>
      </table:table>
      <text:p text:style-name="Standard"/>
      <text:p text:style-name="Standard"/>
      <text:p text:style-name="P1790"/>
      <text:h text:style-name="제목3" text:outline-level="3">예4 -<text:s/>목록<text:s/>탐색</text:h>
      <table:table table:style-name="Table1791">
        <table:table-columns>
          <table:table-column table:style-name="TableColumn1792"/>
        </table:table-columns>
        <table:table-row table:style-name="TableRow1793">
          <table:table-cell table:style-name="TableCell1794">
            <text:p text:style-name="코드표"><text:span text:style-name="T1795">package</text:span><text:span text:style-name="T1796"><text:s/>net.skhu.map;</text:span></text:p>
            <text:p text:style-name="코드표"/>
            <text:p text:style-name="코드표"><text:span text:style-name="T1797">import</text:span><text:span text:style-name="T1798"><text:s/>java.util.HashMap;</text:span></text:p>
            <text:p text:style-name="코드표"><text:span text:style-name="T1799">import</text:span><text:span text:style-name="T1800"><text:s/>java.util.Map;</text:span></text:p>
            <text:p text:style-name="코드표"/>
            <text:p text:style-name="코드표"><text:span text:style-name="T1801">public</text:span><text:span text:style-name="T1802"><text:s/></text:span><text:span text:style-name="T1803">class</text:span><text:span text:style-name="T1804"><text:s/>Example6 {</text:span></text:p>
            <text:p text:style-name="코드표"/>
            <text:p text:style-name="코드표"><text:span text:style-name="T1805"><text:s text:c="4"/></text:span><text:span text:style-name="T1806">public</text:span><text:span text:style-name="T1807"><text:s/></text:span><text:span text:style-name="T1808">static</text:span><text:span text:style-name="T1809"><text:s/></text:span><text:span text:style-name="T1810">void</text:span><text:span text:style-name="T1811"><text:s/>main(String[]<text:s/></text:span><text:span text:style-name="T1812">args</text:span><text:span text:style-name="T1813">) {</text:span></text:p>
            <text:p text:style-name="코드표"><text:span text:style-name="T1814"><text:s text:c="8"/>Map&lt;String, Integer&gt;<text:s/></text:span><text:span text:style-name="T1815">map</text:span><text:span text:style-name="T1816"><text:s/>=<text:s/></text:span><text:span text:style-name="T1817">new</text:span><text:span text:style-name="T1818"><text:s/>HashMap&lt;String, Integer&gt;();</text:span></text:p>
            <text:p text:style-name="코드표"><text:span text:style-name="T1819"><text:s text:c="8"/></text:span><text:span text:style-name="T1820">map</text:span><text:span text:style-name="T1821">.put(</text:span><text:span text:style-name="T1822">"a"</text:span><text:span text:style-name="T1823">, 101);</text:span></text:p>
            <text:p text:style-name="코드표"><text:span text:style-name="T1824"><text:s text:c="8"/></text:span><text:span text:style-name="T1825">map</text:span><text:span text:style-name="T1826">.put(</text:span><text:span text:style-name="T1827">"b"</text:span><text:span text:style-name="T1828">, 102);</text:span></text:p>
            <text:p text:style-name="코드표"><text:span text:style-name="T1829"><text:s text:c="8"/></text:span><text:span text:style-name="T1830">map</text:span><text:span text:style-name="T1831">.put(</text:span><text:span text:style-name="T1832">"c"</text:span><text:span text:style-name="T1833">, 103);</text:span></text:p>
            <text:p text:style-name="코드표"/>
            <text:p text:style-name="코드표"><text:span text:style-name="T1834"><text:s text:c="8"/></text:span><text:span text:style-name="T1835">for</text:span><text:span text:style-name="T1836"><text:s/>(String<text:s/></text:span><text:span text:style-name="T1837">key</text:span><text:span text:style-name="T1838"><text:s/>:<text:s/></text:span><text:span text:style-name="T1839">map</text:span><text:span text:style-name="T1840">.keySet())</text:span></text:p>
            <text:p text:style-name="코드표"><text:span text:style-name="T1841"><text:s text:c="12"/>System.</text:span><text:span text:style-name="T1842">out</text:span><text:span text:style-name="T1843">.printf(</text:span><text:span text:style-name="T1844">"(%s, %d) "</text:span><text:span text:style-name="T1845">,<text:s/></text:span><text:span text:style-name="T1846">key</text:span><text:span text:style-name="T1847">,<text:s/></text:span><text:span text:style-name="T1848">map</text:span><text:span text:style-name="T1849">.get(</text:span><text:span text:style-name="T1850">key</text:span><text:span text:style-name="T1851">));</text:span></text:p>
            <text:p text:style-name="코드표"><text:span text:style-name="T1852"><text:s text:c="8"/>System.</text:span><text:span text:style-name="T1853">out</text:span><text:span text:style-name="T1854">.println();</text:span></text:p>
            <text:p text:style-name="코드표"/>
            <text:p text:style-name="코드표"><text:span text:style-name="T1855"><text:s text:c="8"/></text:span><text:span text:style-name="T1856">for</text:span><text:span text:style-name="T1857"><text:s/>(Map.Entry&lt;String,Integer&gt;<text:s/></text:span><text:span text:style-name="T1858">entry</text:span><text:span text:style-name="T1859"><text:s/>:<text:s/></text:span><text:span text:style-name="T1860">map</text:span><text:span text:style-name="T1861">.entrySet())</text:span></text:p>
            <text:p text:style-name="코드표"><text:span text:style-name="T1862"><text:s text:c="12"/>System.</text:span><text:span text:style-name="T1863">out</text:span><text:span text:style-name="T1864">.printf(</text:span><text:span text:style-name="T1865">"(%s, %d) "</text:span><text:span text:style-name="T1866">,<text:s/></text:span><text:span text:style-name="T1867">entry</text:span><text:span text:style-name="T1868">.getKey(),<text:s/></text:span><text:span text:style-name="T1869">entry</text:span><text:span text:style-name="T1870">.getValue());</text:span></text:p>
            <text:p text:style-name="코드표"><text:span text:style-name="T1871"><text:s text:c="8"/>System.</text:span><text:span text:style-name="T1872">out</text:span><text:span text:style-name="T1873">.println();</text:span></text:p>
            <text:p text:style-name="P1874"><text:s text:c="4"/>}</text:p>
            <text:p text:style-name="P1875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1876">
        <table:table-columns>
          <table:table-column table:style-name="TableColumn1877"/>
        </table:table-columns>
        <table:table-row table:style-name="TableRow1878">
          <table:table-cell table:style-name="TableCell1879">
            <text:p text:style-name="P1880"><text:span text:style-name="T1881">(a, 101) (b, 102) (c, 103)</text:span></text:p>
            <text:p text:style-name="P1882"><text:span text:style-name="T1883">(a, 101) (b, 102) (c, 103)</text:span></text:p>
          </table:table-cell>
        </table:table-row>
      </table:table>
      <text:p text:style-name="Standard"/>
      <text:p text:style-name="Standard"/>
      <text:p text:style-name="P1884"/>
      <text:h text:style-name="제목2" text:outline-level="2"><text:bookmark-start text:name="_Toc192390230"/><text:bookmark-start text:name="__RefHeading___Toc5870_4171937993"/>HashSet 클래스<text:bookmark-end text:name="_Toc192390230"/><text:bookmark-end text:name="__RefHeading___Toc5870_4171937993"/></text:h>
      <text:p text:style-name="Standard">집합<text:s/>연산을<text:s/>구현한<text:s/>클래스.</text:p>
      <text:p text:style-name="Standard">Set ineterface를<text:s/>구현한<text:s/>클래스.</text:p>
      <text:p text:style-name="Standard"/>
      <table:table table:style-name="Table1885">
        <table:table-columns>
          <table:table-column table:style-name="TableColumn1886"/>
        </table:table-columns>
        <table:table-row table:style-name="TableRow1887">
          <table:table-cell table:style-name="TableCell1888">
            <text:p text:style-name="P1889"><text:span text:style-name="T1890">import</text:span><text:span text:style-name="T1891"><text:s/>java.util.HashSet;</text:span></text:p>
            <text:p text:style-name="P1892"><text:span text:style-name="T1893">import</text:span><text:span text:style-name="T1894"><text:s/>java.util.Set;</text:span></text:p>
            <text:p text:style-name="P1895"/>
            <text:p text:style-name="P1896"><text:span text:style-name="T1897">public</text:span><text:span text:style-name="T1898"><text:s/></text:span><text:span text:style-name="T1899">class</text:span><text:span text:style-name="T1900"><text:s/>Test {</text:span></text:p>
            <text:soft-page-break/>
            <text:p text:style-name="P1901"><text:span text:style-name="T1902">   <text:s/></text:span><text:span text:style-name="T1903">public</text:span><text:span text:style-name="T1904"><text:s/></text:span><text:span text:style-name="T1905">static</text:span><text:span text:style-name="T1906"><text:s/></text:span><text:span text:style-name="T1907">void</text:span><text:span text:style-name="T1908"><text:s/>main(</text:span><text:span text:style-name="T1909">String</text:span><text:span text:style-name="T1910">[] args) {</text:span></text:p>
            <text:p text:style-name="P1911"><text:span text:style-name="T1912">       <text:s/></text:span><text:span text:style-name="T1913">Set</text:span><text:span text:style-name="T1914">&lt;</text:span><text:span text:style-name="T1915">String</text:span><text:span text:style-name="T1916">&gt; set1 =<text:s/></text:span><text:span text:style-name="T1917">new</text:span><text:span text:style-name="T1918"><text:s/></text:span><text:span text:style-name="T1919">HashSet</text:span><text:span text:style-name="T1920">&lt;&gt;();</text:span></text:p>
            <text:p text:style-name="P1921"/>
            <text:p text:style-name="P1922"><text:span text:style-name="T1923">        set1.add(</text:span><text:span text:style-name="T1924">"a"</text:span><text:span text:style-name="T1925">);</text:span></text:p>
            <text:p text:style-name="P1926"><text:span text:style-name="T1927">        set1.add(</text:span><text:span text:style-name="T1928">"b"</text:span><text:span text:style-name="T1929">);</text:span></text:p>
            <text:p text:style-name="P1930"><text:span text:style-name="T1931">        set1.add(</text:span><text:span text:style-name="T1932">"c"</text:span><text:span text:style-name="T1933">);</text:span></text:p>
            <text:p text:style-name="P1934"/>
            <text:p text:style-name="P1935"><text:span text:style-name="T1936">        System.out.println(set1.size());<text:s/></text:span><text:span text:style-name="T1937">// 3</text:span></text:p>
            <text:p text:style-name="P1938"><text:span text:style-name="T1939">        System.out.println(set1.contains(</text:span><text:span text:style-name="T1940">"a"</text:span><text:span text:style-name="T1941">));<text:s/></text:span><text:span text:style-name="T1942">// true</text:span></text:p>
            <text:p text:style-name="P1943"><text:span text:style-name="T1944">        System.out.println(set1.contains(</text:span><text:span text:style-name="T1945">"d"</text:span><text:span text:style-name="T1946">));<text:s/></text:span><text:span text:style-name="T1947">// false</text:span></text:p>
            <text:p text:style-name="P1948"/>
            <text:p text:style-name="P1949"><text:span text:style-name="T1950">        set1.remove(</text:span><text:span text:style-name="T1951">"a"</text:span><text:span text:style-name="T1952">);</text:span></text:p>
            <text:p text:style-name="P1953"><text:span text:style-name="T1954">        System.out.println(set1.size());<text:s/></text:span><text:span text:style-name="T1955">// 2</text:span></text:p>
            <text:p text:style-name="P1956"><text:span text:style-name="T1957">        System.out.println(set1.contains(</text:span><text:span text:style-name="T1958">"a"</text:span><text:span text:style-name="T1959">));<text:s/></text:span><text:span text:style-name="T1960">// false</text:span></text:p>
            <text:p text:style-name="P1961"/>
            <text:p text:style-name="P1962"><text:span text:style-name="T1963">       <text:s/></text:span><text:span text:style-name="T1964">Set</text:span><text:span text:style-name="T1965">&lt;</text:span><text:span text:style-name="T1966">String</text:span><text:span text:style-name="T1967">&gt; set2 =<text:s/></text:span><text:span text:style-name="T1968">new</text:span><text:span text:style-name="T1969"><text:s/></text:span><text:span text:style-name="T1970">HashSet</text:span><text:span text:style-name="T1971">&lt;&gt;(Set.of(</text:span><text:span text:style-name="T1972">"a"</text:span><text:span text:style-name="T1973">,<text:s/></text:span><text:span text:style-name="T1974">"b"</text:span><text:span text:style-name="T1975">,<text:s/></text:span><text:span text:style-name="T1976">"c"</text:span><text:span text:style-name="T1977">,<text:s/></text:span><text:span text:style-name="T1978">"d"</text:span><text:span text:style-name="T1979">));</text:span></text:p>
            <text:p text:style-name="P1980"><text:span text:style-name="T1981">        System.out.println(set2.size());<text:s/></text:span><text:span text:style-name="T1982">// 4</text:span></text:p>
            <text:p text:style-name="P1983"/>
            <text:p text:style-name="P1984"><text:span text:style-name="T1985">       <text:s/></text:span><text:span text:style-name="T1986">// set1</text:span><text:span text:style-name="T1987">과</text:span><text:span text:style-name="T1988"><text:s/>set2</text:span><text:span text:style-name="T1989">의</text:span><text:span text:style-name="T1990"><text:s/></text:span><text:span text:style-name="T1991">교집합</text:span><text:span text:style-name="T1992"><text:s/></text:span><text:span text:style-name="T1993">구하기</text:span></text:p>
            <text:p text:style-name="P1994"><text:span text:style-name="T1995">       <text:s/></text:span><text:span text:style-name="T1996">Set</text:span><text:span text:style-name="T1997">&lt;</text:span><text:span text:style-name="T1998">String</text:span><text:span text:style-name="T1999">&gt; set3 =<text:s/></text:span><text:span text:style-name="T2000">new</text:span><text:span text:style-name="T2001"><text:s/></text:span><text:span text:style-name="T2002">HashSet</text:span><text:span text:style-name="T2003">&lt;&gt;(set1);<text:s/></text:span><text:span text:style-name="T2004">// set1</text:span><text:span text:style-name="T2005">을</text:span><text:span text:style-name="T2006"><text:s/></text:span><text:span text:style-name="T2007">복사해서</text:span><text:span text:style-name="T2008"><text:s/>set3</text:span><text:span text:style-name="T2009">를</text:span><text:span text:style-name="T2010"><text:s/></text:span><text:span text:style-name="T2011">만듦</text:span></text:p>
            <text:p text:style-name="P2012"><text:span text:style-name="T2013">        set3.retainAll(set2);<text:s/></text:span><text:span text:style-name="T2014">// set3</text:span><text:span text:style-name="T2015">에</text:span><text:span text:style-name="T2016"><text:s/>set2</text:span><text:span text:style-name="T2017">와의</text:span><text:span text:style-name="T2018"><text:s/></text:span><text:span text:style-name="T2019">교집합만</text:span><text:span text:style-name="T2020"><text:s/></text:span><text:span text:style-name="T2021">남기고</text:span><text:span text:style-name="T2022"><text:s/></text:span><text:span text:style-name="T2023">나머지는</text:span><text:span text:style-name="T2024"><text:s/></text:span><text:span text:style-name="T2025">제거</text:span></text:p>
            <text:p text:style-name="P2026"/>
            <text:p text:style-name="P2027"><text:span text:style-name="T2028">        System.out.println(set3);<text:s/></text:span><text:span text:style-name="T2029">// [b, c]</text:span></text:p>
            <text:p text:style-name="P2030"><text:span text:style-name="T2031">    }</text:span></text:p>
            <text:p text:style-name="P2032"><text:span text:style-name="T2033">}</text:span></text:p>
            <text:p text:style-name="Standard"/>
          </table:table-cell>
        </table:table-row>
      </table:table>
      <text:p text:style-name="Standard"/>
      <text:p text:style-name="Standard"/>
      <text:p text:style-name="P2034"/>
      <text:h text:style-name="제목2" text:outline-level="2"><text:bookmark-start text:name="_Toc192390231"/><text:bookmark-start text:name="__RefHeading___Toc5872_4171937993"/>TreeMap<text:bookmark-end text:name="_Toc192390231"/><text:bookmark-end text:name="__RefHeading___Toc5872_4171937993"/></text:h>
      <text:p text:style-name="Standard">Map의<text:s/>key값들을<text:s/>정렬된<text:s/>순서로<text:s/>유지하는<text:s/>기능이<text:s/>필요한<text:s/>경우가<text:s/>아주<text:s/>드물게<text:s/>있다.</text:p>
      <text:p text:style-name="Standard"><text:s text:c="2"/>100<text:s/>문제<text:s/>중<text:s/>1개<text:s/>정도로<text:s/>드물다.</text:p>
      <text:p text:style-name="Standard"/>
      <text:p text:style-name="Standard">이런<text:s/>문제를<text:s/>풀<text:s/>때에는<text:s/>TreeMap을<text:s/>사용하면<text:s/>편하다.</text:p>
      <text:p text:style-name="Standard"/>
      <text:p text:style-name="Standard">TreeMap은<text:s/>red black tree<text:s/>알고리즘으로<text:s/>구현된<text:s/>균형잡힌<text:s/>이진<text:s/>검색<text:s/>트리이다.</text:p>
      <text:p text:style-name="Standard">그래서<text:s/>최악의<text:s/>경우<text:s/>없이<text:s/>O(logN)<text:s/>이다.</text:p>
      <text:p text:style-name="Standard">이진<text:s/>검색<text:s/>트리이므로<text:s/>당연히<text:s/>key<text:s/>값들을<text:s/>정렬<text:s/>순서가<text:s/>유지된다.</text:p>
      <text:p text:style-name="Standard"/>
      <text:p text:style-name="Standard"/>
      <text:p text:style-name="Standard">내가<text:s/>TreeMap을<text:s/>이용해<text:s/>풀었던<text:s/>문제들</text:p>
      <text:p text:style-name="Standard"><text:s text:c="3"/>백준<text:s/>- 2957<text:s/>이진<text:s/>탐색<text:s/>트리<text:s/>(플래티넘5)</text:p>
      <text:p text:style-name="Standard"><text:s text:c="3"/>프로그래머스<text:s/>-<text:s/>주차요금계산<text:s/>(레벨2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35"/>
      <text:p text:style-name="P2036"/>
      <text:h text:style-name="제목1" text:outline-level="1"><text:bookmark-start text:name="_Toc192390232"/><text:bookmark-start text:name="__RefHeading___Toc5874_4171937993"/><text:soft-page-break/><text:span text:style-name="T2037">부록</text:span><text:s/>- Java Map<text:s/><text:span text:style-name="T2038">고급</text:span><text:bookmark-end text:name="_Toc192390232"/><text:bookmark-end text:name="__RefHeading___Toc5874_4171937993"/></text:h>
      <text:p text:style-name="Standard">실력있는<text:s/>Java<text:s/>개발자라면<text:s/>반드시<text:s/>알아야<text:s/>하는<text:s/>내용이지만,<text:s/>코테<text:s/>문제<text:s/>풀기위해<text:s/>필요한<text:s/>내용은<text:s/>아니다.</text:p>
      <text:p text:style-name="Standard">그래서<text:s/>부록으로<text:s/>정리함.</text:p>
      <text:p text:style-name="Standard"/>
      <text:h text:style-name="제목2" text:outline-level="2"><text:bookmark-start text:name="_Toc192390233"/><text:bookmark-start text:name="__RefHeading___Toc5876_4171937993"/><text:bookmark-start text:name="_Toc496620827"/>equals, hashCode 메소드 재정의<text:bookmark-end text:name="_Toc192390233"/><text:bookmark-end text:name="__RefHeading___Toc5876_4171937993"/><text:bookmark-end text:name="_Toc496620827"/></text:h>
      <text:p text:style-name="Standard"/>
      <text:p text:style-name="Standard">HashMap<text:s/>클래스는<text:s/>해시<text:s/>테이블<text:s/>알고리즘으로<text:s/>구현되었다.</text:p>
      <text:p text:style-name="Standard">해시<text:s/>테이블<text:s/>알고리즘에서<text:s/>저장할<text:s/>데이터의<text:s/>해시(hash)<text:s/>값을<text:s/>계산할<text:s/>때,</text:p>
      <text:p text:style-name="Standard">hashCode<text:s/>메소드를<text:s/>사용한다.</text:p>
      <text:p text:style-name="Standard"/>
      <text:p text:style-name="Standard"><text:span text:style-name="T2039">HashMap<text:s/></text:span><text:span text:style-name="T2040">에</text:span><text:span text:style-name="T2041"><text:s/>key<text:s/></text:span><text:span text:style-name="T2042">로</text:span><text:span text:style-name="T2043"><text:s/></text:span><text:span text:style-name="T2044">저장할</text:span><text:span text:style-name="T2045"><text:s/></text:span><text:span text:style-name="T2046">클래스는</text:span></text:p>
      <text:p text:style-name="Standard"><text:span text:style-name="T2047">equals, hashCode<text:s/></text:span><text:span text:style-name="T2048">메소드를</text:span><text:span text:style-name="T2049"><text:s/></text:span><text:span text:style-name="T2050">재정의</text:span><text:span text:style-name="T2051"><text:s/></text:span><text:span text:style-name="T2052">해야</text:span><text:span text:style-name="T2053"><text:s/></text:span><text:span text:style-name="T2054">한다</text:span><text:span text:style-name="T2055">.</text:span></text:p>
      <text:p text:style-name="Standard"/>
      <text:p text:style-name="Standard"/>
      <text:p text:style-name="Standard"/>
      <text:h text:style-name="제목3" text:outline-level="3"><text:bookmark-start text:name="_Toc496620829"/>Object<text:s/>클래스의<text:s/>equals, hashCode<text:s/>메소드의<text:s/>문제점<text:bookmark-end text:name="_Toc496620829"/></text:h>
      <text:p text:style-name="Standard">hashCode, equals<text:s/>메소드는<text:s/>Object<text:s/>클래스에<text:s/>정의되어<text:s/>있기<text:s/>때문에</text:p>
      <text:p text:style-name="Standard"><text:s text:c="2"/>모든<text:s/>Java<text:s/>클래스에<text:s/>상속된다.</text:p>
      <text:p text:style-name="Standard"><text:s text:c="2"/>이렇게<text:s/>상속된<text:s/>메소드를<text:s/>사용하는<text:s/>것은<text:s/>매우<text:s/>바람직하지<text:s/>않다.</text:p>
      <text:p text:style-name="Standard"/>
      <text:p text:style-name="Standard">equals<text:s/>메소드는<text:s/>객체의<text:s/>내용이<text:s/>동일한지<text:s/>비교해야<text:s/>하는데<text:s/>(equality<text:s/>비교),</text:p>
      <text:p text:style-name="Standard"><text:s text:c="2"/>Object<text:s/>클래스에<text:s/>구현된<text:s/>equals<text:s/>메소드는<text:s/>identity를<text:s/>비교한다.</text:p>
      <text:p text:style-name="Standard"><text:s text:c="2"/>그래서<text:s/>내용이<text:s/>동일한<text:s/>두<text:s/>객체를<text:s/>비교해도<text:s/>false가<text:s/>될<text:s/>수<text:s/>있다.</text:p>
      <text:p text:style-name="Standard"><text:s text:c="2"/>내용이<text:s/>동일한<text:s/>두<text:s/>객체를<text:s/>equals<text:s/>메소드로<text:s/>비교하면<text:s/>true<text:s/>이어야<text:s/>한다.</text:p>
      <text:p text:style-name="Standard"/>
      <text:p text:style-name="Standard">hashCode<text:s/>메소드는<text:s/>객체의<text:s/>내용을<text:s/>가지고<text:s/>계산해야<text:s/>하는데</text:p>
      <text:p text:style-name="Standard">Object<text:s/>클래스에<text:s/>구현된<text:s/>hashCode<text:s/>메소드는<text:s/>identity를<text:s/>가지고<text:s/>계산한다.</text:p>
      <text:p text:style-name="Standard">그래서<text:s/>내용이<text:s/>동일한<text:s/>두<text:s/>객체의<text:s/>hashCode<text:s/>값이<text:s/>다를<text:s/>수<text:s/>있다.</text:p>
      <text:p text:style-name="Standard">내용이<text:s/>동일한<text:s/>두<text:s/>객체의<text:s/>hashCode<text:s/>값은<text:s/>같아야<text:s/>한다.</text:p>
      <text:p text:style-name="Standard"/>
      <text:p text:style-name="P2056"/>
      <text:h text:style-name="제목3" text:outline-level="3">예</text:h>
      <table:table table:style-name="Table2057">
        <table:table-columns>
          <table:table-column table:style-name="TableColumn2058"/>
        </table:table-columns>
        <table:table-row table:style-name="TableRow2059">
          <table:table-cell table:style-name="TableCell2060">
            <text:p text:style-name="P2061"><text:span text:style-name="T2062">public</text:span><text:span text:style-name="T2063"><text:s/></text:span><text:span text:style-name="T2064">class</text:span><text:span text:style-name="T2065"><text:s/>Test {</text:span></text:p>
            <text:p text:style-name="P2066"/>
            <text:p text:style-name="P2067"><text:span text:style-name="T2068">   <text:s/></text:span><text:span text:style-name="T2069">static</text:span><text:span text:style-name="T2070"><text:s/></text:span><text:span text:style-name="T2071">class</text:span><text:span text:style-name="T2072"><text:s/>Person {</text:span></text:p>
            <text:p text:style-name="P2073"><text:span text:style-name="T2074">       <text:s/></text:span><text:span text:style-name="T2075">String</text:span><text:span text:style-name="T2076"><text:s/>name;</text:span></text:p>
            <text:p text:style-name="P2077"/>
            <text:p text:style-name="P2078"><text:span text:style-name="T2079">       <text:s/></text:span><text:span text:style-name="T2080">public</text:span><text:span text:style-name="T2081"><text:s/>Person(</text:span><text:span text:style-name="T2082">String</text:span><text:span text:style-name="T2083"><text:s/>name) {</text:span></text:p>
            <text:p text:style-name="P2084"><text:span text:style-name="T2085">           <text:s/></text:span><text:span text:style-name="T2086">this</text:span><text:span text:style-name="T2087">.name = name;</text:span></text:p>
            <text:p text:style-name="P2088"><text:span text:style-name="T2089">        }</text:span></text:p>
            <text:p text:style-name="P2090"><text:span text:style-name="T2091">    }</text:span></text:p>
            <text:p text:style-name="P2092"/>
            <text:p text:style-name="P2093"><text:span text:style-name="T2094">   <text:s/></text:span><text:span text:style-name="T2095">public</text:span><text:span text:style-name="T2096"><text:s/></text:span><text:span text:style-name="T2097">static</text:span><text:span text:style-name="T2098"><text:s/></text:span><text:span text:style-name="T2099">void</text:span><text:span text:style-name="T2100"><text:s/>main(</text:span><text:span text:style-name="T2101">String</text:span><text:span text:style-name="T2102">[] args) {</text:span></text:p>
            <text:p text:style-name="P2103"><text:span text:style-name="T2104">       <text:s/></text:span><text:span text:style-name="T2105">var</text:span><text:span text:style-name="T2106"><text:s/>obj1 =<text:s/></text:span><text:span text:style-name="T2107">new</text:span><text:span text:style-name="T2108"><text:s/>Person(</text:span><text:span text:style-name="T2109">"</text:span><text:span text:style-name="T2110">홍길동</text:span><text:span text:style-name="T2111">"</text:span><text:span text:style-name="T2112">);</text:span></text:p>
            <text:p text:style-name="P2113"><text:span text:style-name="T2114">       <text:s/></text:span><text:span text:style-name="T2115">var</text:span><text:span text:style-name="T2116"><text:s/>obj2 =<text:s/></text:span><text:span text:style-name="T2117">new</text:span><text:span text:style-name="T2118"><text:s/>Person(</text:span><text:span text:style-name="T2119">"</text:span><text:span text:style-name="T2120">홍길동</text:span><text:span text:style-name="T2121">"</text:span><text:span text:style-name="T2122">);</text:span></text:p>
            <text:p text:style-name="P2123"><text:span text:style-name="T2124">       <text:s/></text:span><text:span text:style-name="T2125">var</text:span><text:span text:style-name="T2126"><text:s/>obj3 = obj1;</text:span></text:p>
            <text:p text:style-name="P2127"/>
            <text:p text:style-name="P2128"><text:span text:style-name="T2129">        System.out.println(obj1 == obj2);<text:s/></text:span><text:span text:style-name="T2130">// false</text:span></text:p>
            <text:p text:style-name="P2131"><text:span text:style-name="T2132">        System.out.println(obj1 == obj3);<text:s/></text:span><text:span text:style-name="T2133">// true</text:span></text:p>
            <text:p text:style-name="P2134"><text:span text:style-name="T2135">        System.out.println(obj1.equals(obj2));<text:s/></text:span><text:span text:style-name="T2136">// false</text:span></text:p>
            <text:p text:style-name="P2137"><text:span text:style-name="T2138">        System.out.println(obj1.equals(obj3));<text:s/></text:span><text:span text:style-name="T2139">// true</text:span></text:p>
            <text:p text:style-name="P2140"><text:span text:style-name="T2141">    }</text:span></text:p>
            <text:p text:style-name="P2142"><text:span text:style-name="T2143">}</text:span></text:p>
          </table:table-cell>
        </table:table-row>
      </table:table>
      <text:p text:style-name="Standard"/>
      <text:p text:style-name="Standard">obj1, obj2<text:s/>두<text:s/>객체의<text:s/>내용은<text:s/>같지만,<text:s/>서로<text:s/>다른<text:s/>두<text:s/>객체이라서<text:s/>참조<text:s/>주소가<text:s/>서로<text:s/>다르다.</text:p>
      <text:p text:style-name="Standard"/>
      <text:p text:style-name="Standard">obj1, obj3<text:s/>두<text:s/>변수는<text:s/>동일한<text:s/>객체를<text:s/>참조하고<text:s/>있다.</text:p>
      <text:p text:style-name="Standard">즉<text:s/>obj1, obj3<text:s/>참조<text:s/>변수에<text:s/>들어있는<text:s/>참조<text:s/>주소가<text:s/>같다.</text:p>
      <text:p text:style-name="Standard"/>
      <text:p text:style-name="Standard">equals<text:s/>메소드를<text:s/>재정의<text:s/>하지<text:s/>않으면, Object<text:s/>클래스의<text:s/>equals<text:s/>메소드가<text:s/>상속된다.</text:p>
      <text:p text:style-name="Standard">이<text:s/>메소드는<text:s/>참조<text:s/>주소만<text:s/>비교한다.</text:p>
      <text:p text:style-name="Standard"/>
      <text:p text:style-name="Standard"/>
      <text:p text:style-name="Standard"/>
      <text:p text:style-name="P2144"/>
      <text:h text:style-name="제목2" text:outline-level="2"><text:bookmark-start text:name="_Toc192390234"/><text:bookmark-start text:name="__RefHeading___Toc5878_4171937993"/><text:bookmark-start text:name="_Toc496620830"/>Objects 클래스<text:bookmark-end text:name="_Toc192390234"/><text:bookmark-end text:name="__RefHeading___Toc5878_4171937993"/><text:bookmark-end text:name="_Toc496620830"/></text:h>
      <text:p text:style-name="Standard"><text:s/></text:p>
      <text:p text:style-name="Standard">equals<text:s/>메소드와<text:s/>hashCode<text:s/>메소드를<text:s/>재정의할<text:s/>때<text:s/>편리하게<text:s/>사용할<text:s/>수<text:s/>있는<text:s/>메소드가</text:p>
      <text:p text:style-name="Standard">Obejcts<text:s/>클래스에<text:s/>포함되어<text:s/>있다.</text:p>
      <text:p text:style-name="Standard"/>
      <text:h text:style-name="제목3" text:outline-level="3">hashCode<text:s/>메소드<text:s/>재정의</text:h>
      <table:table table:style-name="Table2145">
        <table:table-columns>
          <table:table-column table:style-name="TableColumn2146"/>
        </table:table-columns>
        <table:table-row table:style-name="TableRow2147">
          <table:table-cell table:style-name="TableCell2148">
            <text:p text:style-name="코드표"><text:span text:style-name="T2149"><text:s text:c="4"/></text:span><text:span text:style-name="T2150">@Override</text:span></text:p>
            <text:p text:style-name="코드표"><text:span text:style-name="T2151"><text:s text:c="4"/></text:span><text:span text:style-name="T2152">public</text:span><text:span text:style-name="T2153"><text:s/></text:span><text:span text:style-name="T2154">int</text:span><text:span text:style-name="T2155"><text:s/>hashCode() {</text:span></text:p>
            <text:p text:style-name="코드표"><text:span text:style-name="T2156"><text:s text:c="8"/></text:span><text:span text:style-name="T2157">return</text:span><text:span text:style-name="T2158"><text:s/>Objects.hash(</text:span><text:span text:style-name="T2159">name</text:span><text:span text:style-name="T2160">,<text:s/></text:span><text:span text:style-name="T2161">age</text:span><text:span text:style-name="T2162">);</text:span></text:p>
            <text:p text:style-name="P2163"><text:s text:c="4"/>}</text:p>
          </table:table-cell>
        </table:table-row>
      </table:table>
      <text:p text:style-name="Standard"/>
      <text:p text:style-name="Standard">return Objects.hash(....);</text:p>
      <text:p text:style-name="Standard"><text:s text:c="4"/>....<text:s/>부분에<text:s/>모든<text:s/>멤버<text:s/>변수를<text:s/>나열하면<text:s/>된다.</text:p>
      <text:p text:style-name="Standard"><text:s text:c="4"/>Objects<text:s/>클래스의<text:s/>hash<text:s/>메소드가<text:s/>해시<text:s/>값을<text:s/>계산해<text:s/>준다.</text:p>
      <text:p text:style-name="Standard"/>
      <text:p text:style-name="Standard"/>
      <text:h text:style-name="제목3" text:outline-level="3">equals<text:s/>메소드<text:s/>재정의</text:h>
      <table:table table:style-name="Table2164">
        <table:table-columns>
          <table:table-column table:style-name="TableColumn2165"/>
        </table:table-columns>
        <table:table-row table:style-name="TableRow2166">
          <table:table-cell table:style-name="TableCell2167">
            <text:p text:style-name="코드표"><text:span text:style-name="T2168"><text:s text:c="4"/></text:span><text:span text:style-name="T2169">@Override</text:span></text:p>
            <text:p text:style-name="코드표"><text:span text:style-name="T2170"><text:s text:c="4"/></text:span><text:span text:style-name="T2171">public</text:span><text:span text:style-name="T2172"><text:s/></text:span><text:span text:style-name="T2173">boolean</text:span><text:span text:style-name="T2174"><text:s/>equals(Object<text:s/></text:span><text:span text:style-name="T2175">obj</text:span><text:span text:style-name="T2176">) {</text:span></text:p>
            <text:p text:style-name="코드표"><text:span text:style-name="T2177"><text:s text:c="8"/></text:span><text:span text:style-name="T2178">if</text:span><text:span text:style-name="T2179"><text:s/>(</text:span><text:span text:style-name="T2180">this</text:span><text:span text:style-name="T2181"><text:s/>==<text:s/></text:span><text:span text:style-name="T2182">obj</text:span><text:span text:style-name="T2183">)<text:s/></text:span><text:span text:style-name="T2184">return</text:span><text:span text:style-name="T2185"><text:s/></text:span><text:span text:style-name="T2186">true</text:span><text:span text:style-name="T2187">;</text:span></text:p>
            <text:p text:style-name="코드표"><text:span text:style-name="T2188"><text:s text:c="8"/></text:span><text:span text:style-name="T2189">if</text:span><text:span text:style-name="T2190"><text:s/>(</text:span><text:span text:style-name="T2191">obj</text:span><text:span text:style-name="T2192"><text:s/></text:span><text:span text:style-name="T2193">instanceof</text:span><text:span text:style-name="T2194"><text:s/>Person2 ==<text:s/></text:span><text:span text:style-name="T2195">false</text:span><text:span text:style-name="T2196">)<text:s/></text:span><text:span text:style-name="T2197">return</text:span><text:span text:style-name="T2198"><text:s/></text:span><text:span text:style-name="T2199">false</text:span><text:span text:style-name="T2200">;</text:span></text:p>
            <text:p text:style-name="코드표"><text:span text:style-name="T2201"><text:s text:c="8"/>Person2<text:s/></text:span><text:span text:style-name="T2202">p</text:span><text:span text:style-name="T2203"><text:s/>= (Person2)</text:span><text:span text:style-name="T2204">obj</text:span><text:span text:style-name="T2205">;</text:span></text:p>
            <text:p text:style-name="코드표"><text:span text:style-name="T2206"><text:s text:c="8"/></text:span><text:span text:style-name="T2207">return</text:span><text:span text:style-name="T2208"><text:s/></text:span><text:span text:style-name="T2209">this</text:span><text:span text:style-name="T2210">.</text:span><text:span text:style-name="T2211">age</text:span><text:span text:style-name="T2212"><text:s/>==<text:s/></text:span><text:span text:style-name="T2213">p</text:span><text:span text:style-name="T2214">.</text:span><text:span text:style-name="T2215">age</text:span><text:span text:style-name="T2216"><text:s/>&amp;&amp; Objects.equals(</text:span><text:span text:style-name="T2217">this</text:span><text:span text:style-name="T2218">.</text:span><text:span text:style-name="T2219">name</text:span><text:span text:style-name="T2220">,<text:s/></text:span><text:span text:style-name="T2221">p</text:span><text:span text:style-name="T2222">.</text:span><text:span text:style-name="T2223">name</text:span><text:span text:style-name="T2224">);</text:span></text:p>
            <text:p text:style-name="P2225"><text:s text:c="4"/>}</text:p>
          </table:table-cell>
        </table:table-row>
      </table:table>
      <text:p text:style-name="Standard"/>
      <text:p text:style-name="Standard">return<text:s/>문에서,<text:s/>모든<text:s/>멤버<text:s/>변수를<text:s/>비교해야<text:s/>한다.</text:p>
      <text:p text:style-name="Standard"><text:s text:c="3"/>기본<text:s/>자료형은<text:s/>this.age == p.age<text:s/>형태로<text:s/>비교하고,</text:p>
      <text:p text:style-name="Standard"><text:s text:c="3"/>참조형은<text:s/>Objects.equals(this.name, p.name)<text:s/>형태로<text:s/>비교하면<text:s/>된다.</text:p>
      <text:p text:style-name="Standard"/>
      <text:p text:style-name="Standard"><text:s text:c="2"/>Objects.equals<text:s/>메소드를<text:s/>사용하지<text:s/>않으려면</text:p>
      <text:p text:style-name="Standard"><text:s text:c="6"/>this.name == null ? p.name == null : this.name.equals(p.name)<text:s/>형태로<text:s/>비교하면<text:s/>되는데,</text:p>
      <text:p text:style-name="Standard"><text:s text:c="6"/>Objects.equals(this.name, p.name)<text:s/>형태가<text:s/>훨씬<text:s/>갈결하다.</text:p>
      <text:p text:style-name="Standard"/>
      <text:p text:style-name="Standard"/>
      <text:h text:style-name="제목3" text:outline-level="3">사례</text:h>
      <table:table table:style-name="Table2226">
        <table:table-columns>
          <table:table-column table:style-name="TableColumn2227"/>
        </table:table-columns>
        <table:table-row table:style-name="TableRow2228">
          <table:table-cell table:style-name="TableCell2229">
            <text:p text:style-name="코드표"><text:span text:style-name="T2230">package</text:span><text:s/>net.skhu.objects;</text:p>
            <text:p text:style-name="코드표"/>
            <text:p text:style-name="코드표"><text:span text:style-name="T2231">import</text:span><text:s/>java.util.Date;</text:p>
            <text:p text:style-name="코드표"><text:span text:style-name="T2232">import</text:span><text:s/>java.util.Objects;</text:p>
            <text:p text:style-name="코드표"/>
            <text:p text:style-name="코드표"><text:span text:style-name="T2233">public</text:span><text:s/><text:span text:style-name="T2234">class</text:span><text:s/>Data {</text:p>
            <text:p text:style-name="코드표"><text:s text:c="4"/><text:span text:style-name="T2235">int</text:span><text:s/><text:span text:style-name="T2236">year</text:span>;</text:p>
            <text:p text:style-name="코드표"><text:s text:c="4"/>String<text:s/><text:span text:style-name="T2237">address</text:span>;</text:p>
            <text:p text:style-name="코드표"><text:s text:c="4"/>Date<text:s/><text:span text:style-name="T2238">startDate</text:span>;</text:p>
            <text:p text:style-name="코드표"/>
            <text:p text:style-name="코드표"><text:s text:c="4"/><text:span text:style-name="T2239">@Override</text:span></text:p>
            <text:p text:style-name="코드표"><text:s text:c="4"/><text:span text:style-name="T2240">public</text:span><text:s/><text:span text:style-name="T2241">int</text:span><text:s/>hashCode() {</text:p>
            <text:p text:style-name="코드표"><text:s text:c="8"/><text:span text:style-name="T2242">return</text:span><text:s/>Objects.hash(<text:span text:style-name="T2243">year</text:span>,<text:s/><text:span text:style-name="T2244">address</text:span>,<text:s/><text:span text:style-name="T2245">startDate</text:span>);</text:p>
            <text:p text:style-name="코드표"><text:s text:c="4"/>}</text:p>
            <text:p text:style-name="코드표"/>
            <text:p text:style-name="코드표"><text:s text:c="4"/><text:span text:style-name="T2246">@Override</text:span></text:p>
            <text:p text:style-name="코드표"><text:s text:c="4"/><text:span text:style-name="T2247">public</text:span><text:s/><text:span text:style-name="T2248">boolean</text:span><text:s/>equals(Object<text:s/><text:span text:style-name="T2249">obj</text:span>) {</text:p>
            <text:p text:style-name="코드표"><text:s text:c="8"/><text:span text:style-name="T2250">if</text:span><text:s/>(<text:span text:style-name="T2251">this</text:span><text:s/>==<text:s/><text:span text:style-name="T2252">obj</text:span>)<text:s/><text:span text:style-name="T2253">return</text:span><text:s/><text:span text:style-name="T2254">true</text:span>;</text:p>
            <text:p text:style-name="코드표"><text:s text:c="8"/><text:span text:style-name="T2255">if</text:span><text:s/>(<text:span text:style-name="T2256">obj</text:span><text:s/><text:span text:style-name="T2257">instanceof</text:span><text:s/>Data ==<text:s/><text:span text:style-name="T2258">false</text:span>)<text:s/><text:span text:style-name="T2259">return</text:span><text:s/><text:span text:style-name="T2260">false</text:span>;</text:p>
            <text:p text:style-name="코드표"><text:s text:c="8"/>Data<text:s/><text:span text:style-name="T2261">d</text:span><text:s/>= (Data)<text:span text:style-name="T2262">obj</text:span>;</text:p>
            <text:p text:style-name="코드표"><text:s text:c="8"/><text:span text:style-name="T2263">return</text:span><text:s/><text:span text:style-name="T2264">this</text:span>.<text:span text:style-name="T2265">year</text:span><text:s/>==<text:s/><text:span text:style-name="T2266">d</text:span>.<text:span text:style-name="T2267">year</text:span><text:s/>&amp;&amp;</text:p>
            <text:soft-page-break/>
            <text:p text:style-name="코드표"><text:s text:c="16"/>Objects.equals(<text:span text:style-name="T2268">this</text:span>.<text:span text:style-name="T2269">address</text:span>,<text:s/><text:span text:style-name="T2270">d</text:span>.<text:span text:style-name="T2271">address</text:span>) &amp;&amp;</text:p>
            <text:p text:style-name="코드표"><text:s text:c="16"/>Objects.equals(<text:span text:style-name="T2272">this</text:span>.<text:span text:style-name="T2273">startDate</text:span>,<text:s/><text:span text:style-name="T2274">d</text:span>.<text:span text:style-name="T2275">startDate</text:span>);</text:p>
            <text:p text:style-name="코드표"><text:s text:c="4"/>}</text:p>
            <text:p text:style-name="코드표">}</text:p>
          </table:table-cell>
        </table:table-row>
      </table:table>
      <text:p text:style-name="Standard"/>
      <text:p text:style-name="Standard"/>
      <text:h text:style-name="제목2" text:outline-level="2"><text:bookmark-start text:name="_Toc496620831"/><text:bookmark-start text:name="_Toc192390235"/><text:bookmark-start text:name="__RefHeading___Toc5880_4171937993"/>예<text:bookmark-end text:name="_Toc496620831"/>제<text:bookmark-end text:name="_Toc192390235"/><text:bookmark-end text:name="__RefHeading___Toc5880_4171937993"/></text:h>
      <text:h text:style-name="제목3" text:outline-level="3">예1</text:h>
      <table:table table:style-name="Table2276">
        <table:table-columns>
          <table:table-column table:style-name="TableColumn2277"/>
        </table:table-columns>
        <table:table-row table:style-name="TableRow2278">
          <table:table-cell table:style-name="TableCell2279">
            <text:p text:style-name="코드표"><text:span text:style-name="T2280">package</text:span><text:span text:style-name="T2281"><text:s/>net.skhu.map;</text:span></text:p>
            <text:p text:style-name="코드표"/>
            <text:p text:style-name="코드표"><text:span text:style-name="T2282">import</text:span><text:span text:style-name="T2283"><text:s/>java.util.HashMap;</text:span></text:p>
            <text:p text:style-name="코드표"><text:span text:style-name="T2284">import</text:span><text:span text:style-name="T2285"><text:s/>java.util.Map;</text:span></text:p>
            <text:p text:style-name="코드표"/>
            <text:p text:style-name="코드표"><text:span text:style-name="T2286">public</text:span><text:span text:style-name="T2287"><text:s/></text:span><text:span text:style-name="T2288">class</text:span><text:span text:style-name="T2289"><text:s/>Example4 {</text:span></text:p>
            <text:p text:style-name="코드표"/>
            <text:p text:style-name="코드표"><text:span text:style-name="T2290"><text:s text:c="4"/></text:span><text:span text:style-name="T2291">public</text:span><text:span text:style-name="T2292"><text:s/></text:span><text:span text:style-name="T2293">static</text:span><text:span text:style-name="T2294"><text:s/></text:span><text:span text:style-name="T2295">void</text:span><text:span text:style-name="T2296"><text:s/>main(String[]<text:s/></text:span><text:span text:style-name="T2297">args</text:span><text:span text:style-name="T2298">) {</text:span></text:p>
            <text:p text:style-name="코드표"><text:span text:style-name="T2299"><text:s text:c="8"/>Map&lt;Person, Integer&gt;<text:s/></text:span><text:span text:style-name="T2300">map</text:span><text:span text:style-name="T2301"><text:s/>=<text:s/></text:span><text:span text:style-name="T2302">new</text:span><text:span text:style-name="T2303"><text:s/>HashMap&lt;Person, Integer&gt;();</text:span></text:p>
            <text:p text:style-name="코드표"><text:span text:style-name="T2304"><text:s text:c="8"/></text:span><text:span text:style-name="T2305">map</text:span><text:span text:style-name="T2306">.put(</text:span><text:span text:style-name="T2307">new</text:span><text:span text:style-name="T2308"><text:s/>Person(</text:span><text:span text:style-name="T2309">"</text:span><text:span text:style-name="T2310">홍길동</text:span><text:span text:style-name="T2311">"</text:span><text:span text:style-name="T2312">, 18), 101);</text:span></text:p>
            <text:p text:style-name="코드표"><text:span text:style-name="T2313"><text:s text:c="8"/></text:span><text:span text:style-name="T2314">map</text:span><text:span text:style-name="T2315">.put(</text:span><text:span text:style-name="T2316">new</text:span><text:span text:style-name="T2317"><text:s/>Person(</text:span><text:span text:style-name="T2318">"</text:span><text:span text:style-name="T2319">임꺽정</text:span><text:span text:style-name="T2320">"</text:span><text:span text:style-name="T2321">, 19), 102);</text:span></text:p>
            <text:p text:style-name="코드표"/>
            <text:p text:style-name="코드표"><text:span text:style-name="T2322"><text:s text:c="8"/>System.</text:span><text:span text:style-name="T2323">out</text:span><text:span text:style-name="T2324">.println(</text:span><text:span text:style-name="T2325">map</text:span><text:span text:style-name="T2326">.get(</text:span><text:span text:style-name="T2327">new</text:span><text:span text:style-name="T2328"><text:s/>Person(</text:span><text:span text:style-name="T2329">"</text:span><text:span text:style-name="T2330">홍길동</text:span><text:span text:style-name="T2331">"</text:span><text:span text:style-name="T2332">, 18)));</text:span></text:p>
            <text:p text:style-name="코드표"><text:span text:style-name="T2333"><text:s text:c="8"/>System.</text:span><text:span text:style-name="T2334">out</text:span><text:span text:style-name="T2335">.println(</text:span><text:span text:style-name="T2336">map</text:span><text:span text:style-name="T2337">.get(</text:span><text:span text:style-name="T2338">new</text:span><text:span text:style-name="T2339"><text:s/>Person(</text:span><text:span text:style-name="T2340">"</text:span><text:span text:style-name="T2341">임꺽정</text:span><text:span text:style-name="T2342">"</text:span><text:span text:style-name="T2343">, 19)));</text:span></text:p>
            <text:p text:style-name="P2344"><text:s text:c="4"/>}</text:p>
            <text:p text:style-name="P2345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2346">
        <table:table-columns>
          <table:table-column table:style-name="TableColumn2347"/>
        </table:table-columns>
        <table:table-row table:style-name="TableRow2348">
          <table:table-cell table:style-name="TableCell2349">
            <text:p text:style-name="P2350"><text:span text:style-name="T2351">null</text:span></text:p>
            <text:p text:style-name="P2352"><text:span text:style-name="T2353">null</text:span></text:p>
          </table:table-cell>
        </table:table-row>
      </table:table>
      <text:p text:style-name="Standard"/>
      <text:p text:style-name="Standard">Person<text:s/>클래스에<text:s/>equals, hashCode<text:s/>메소드가<text:s/>재정의<text:s/>되어<text:s/>있지<text:s/>않아서,</text:p>
      <text:p text:style-name="Standard">key를<text:s/>찾지<text:s/>못한다.</text:p>
      <text:p text:style-name="Standard">그래서<text:s/>null<text:s/>이<text:s/>출력된다.</text:p>
      <text:p text:style-name="Standard"/>
      <text:p text:style-name="Standard"/>
      <text:p text:style-name="Standard"/>
      <text:p text:style-name="P2354"/>
      <text:h text:style-name="제목3" text:outline-level="3"><text:bookmark-start text:name="_Toc496620832"/>예<text:bookmark-end text:name="_Toc496620832"/>2</text:h>
      <text:p text:style-name="Standard">Person2.java</text:p>
      <table:table table:style-name="Table2355">
        <table:table-columns>
          <table:table-column table:style-name="TableColumn2356"/>
        </table:table-columns>
        <table:table-row table:style-name="TableRow2357">
          <table:table-cell table:style-name="TableCell2358">
            <text:p text:style-name="코드표"><text:span text:style-name="T2359">package</text:span><text:span text:style-name="T2360"><text:s/>net.skhu.map;</text:span></text:p>
            <text:p text:style-name="코드표"/>
            <text:p text:style-name="코드표"><text:span text:style-name="T2361">import</text:span><text:span text:style-name="T2362"><text:s/>java.util.Objects;</text:span></text:p>
            <text:p text:style-name="코드표"/>
            <text:p text:style-name="코드표"><text:span text:style-name="T2363">public</text:span><text:span text:style-name="T2364"><text:s/></text:span><text:span text:style-name="T2365">class</text:span><text:span text:style-name="T2366"><text:s/>Person2 {</text:span></text:p>
            <text:p text:style-name="코드표"><text:span text:style-name="T2367"><text:s text:c="4"/>String<text:s/></text:span><text:span text:style-name="T2368">name</text:span><text:span text:style-name="T2369">;</text:span></text:p>
            <text:p text:style-name="코드표"><text:span text:style-name="T2370"><text:s text:c="4"/></text:span><text:span text:style-name="T2371">int</text:span><text:span text:style-name="T2372"><text:s/></text:span><text:span text:style-name="T2373">age</text:span><text:span text:style-name="T2374">;</text:span></text:p>
            <text:p text:style-name="코드표"/>
            <text:p text:style-name="코드표"><text:span text:style-name="T2375"><text:s text:c="4"/></text:span><text:span text:style-name="T2376">public</text:span><text:span text:style-name="T2377"><text:s/>Person2(String<text:s/></text:span><text:span text:style-name="T2378">name</text:span><text:span text:style-name="T2379">,<text:s/></text:span><text:span text:style-name="T2380">int</text:span><text:span text:style-name="T2381"><text:s/></text:span><text:span text:style-name="T2382">age</text:span><text:span text:style-name="T2383">) {</text:span></text:p>
            <text:p text:style-name="코드표"><text:span text:style-name="T2384"><text:s text:c="8"/></text:span><text:span text:style-name="T2385">this</text:span><text:span text:style-name="T2386">.</text:span><text:span text:style-name="T2387">name</text:span><text:span text:style-name="T2388"><text:s/>=<text:s/></text:span><text:span text:style-name="T2389">name</text:span><text:span text:style-name="T2390">;</text:span></text:p>
            <text:p text:style-name="코드표"><text:span text:style-name="T2391"><text:s text:c="8"/></text:span><text:span text:style-name="T2392">this</text:span><text:span text:style-name="T2393">.</text:span><text:span text:style-name="T2394">age</text:span><text:span text:style-name="T2395"><text:s/>=<text:s/></text:span><text:span text:style-name="T2396">age</text:span><text:span text:style-name="T2397">;</text:span></text:p>
            <text:p text:style-name="P2398"><text:s text:c="4"/>}</text:p>
            <text:p text:style-name="코드표"/>
            <text:p text:style-name="코드표"><text:span text:style-name="T2399"><text:s text:c="4"/></text:span><text:span text:style-name="T2400">@Override</text:span></text:p>
            <text:p text:style-name="코드표"><text:span text:style-name="T2401"><text:s text:c="4"/></text:span><text:span text:style-name="T2402">public</text:span><text:span text:style-name="T2403"><text:s/>String toString() {</text:span></text:p>
            <text:p text:style-name="코드표"><text:span text:style-name="T2404"><text:s text:c="8"/></text:span><text:span text:style-name="T2405">return</text:span><text:span text:style-name="T2406"><text:s/>String.format(</text:span><text:span text:style-name="T2407">"Person(\"%s\",%d)"</text:span><text:span text:style-name="T2408">,<text:s/></text:span><text:span text:style-name="T2409">name</text:span><text:span text:style-name="T2410">,<text:s/></text:span><text:span text:style-name="T2411">age</text:span><text:span text:style-name="T2412">);</text:span></text:p>
            <text:p text:style-name="P2413"><text:s text:c="4"/>}</text:p>
            <text:p text:style-name="코드표"/>
            <text:p text:style-name="코드표"><text:span text:style-name="T2414"><text:s text:c="4"/></text:span><text:span text:style-name="T2415">@Override</text:span></text:p>
            <text:p text:style-name="코드표"><text:span text:style-name="T2416"><text:s text:c="4"/></text:span><text:span text:style-name="T2417">public</text:span><text:span text:style-name="T2418"><text:s/></text:span><text:span text:style-name="T2419">int</text:span><text:span text:style-name="T2420"><text:s/>hashCode() {</text:span></text:p>
            <text:p text:style-name="코드표"><text:span text:style-name="T2421"><text:s text:c="8"/></text:span><text:span text:style-name="T2422">return</text:span><text:span text:style-name="T2423"><text:s/>Objects.hash(</text:span><text:span text:style-name="T2424">name</text:span><text:span text:style-name="T2425">,<text:s/></text:span><text:span text:style-name="T2426">age</text:span><text:span text:style-name="T2427">);</text:span></text:p>
            <text:p text:style-name="P2428"><text:s text:c="4"/>}</text:p>
            <text:p text:style-name="코드표"/>
            <text:p text:style-name="코드표"><text:span text:style-name="T2429"><text:s text:c="4"/></text:span><text:span text:style-name="T2430">@Override</text:span></text:p>
            <text:p text:style-name="코드표"><text:span text:style-name="T2431"><text:s text:c="4"/></text:span><text:span text:style-name="T2432">public</text:span><text:span text:style-name="T2433"><text:s/></text:span><text:span text:style-name="T2434">boolean</text:span><text:span text:style-name="T2435"><text:s/>equals(Object<text:s/></text:span><text:span text:style-name="T2436">obj</text:span><text:span text:style-name="T2437">) {</text:span></text:p>
            <text:p text:style-name="코드표"><text:span text:style-name="T2438"><text:s text:c="8"/></text:span><text:span text:style-name="T2439">if</text:span><text:span text:style-name="T2440"><text:s/>(</text:span><text:span text:style-name="T2441">this</text:span><text:span text:style-name="T2442"><text:s/>==<text:s/></text:span><text:span text:style-name="T2443">obj</text:span><text:span text:style-name="T2444">)<text:s/></text:span><text:span text:style-name="T2445">return</text:span><text:span text:style-name="T2446"><text:s/></text:span><text:span text:style-name="T2447">true</text:span><text:span text:style-name="T2448">;</text:span></text:p>
            <text:soft-page-break/>
            <text:p text:style-name="코드표"><text:span text:style-name="T2449"><text:s text:c="8"/></text:span><text:span text:style-name="T2450">if</text:span><text:span text:style-name="T2451"><text:s/>(</text:span><text:span text:style-name="T2452">obj</text:span><text:span text:style-name="T2453"><text:s/></text:span><text:span text:style-name="T2454">instanceof</text:span><text:span text:style-name="T2455"><text:s/>Person2 ==<text:s/></text:span><text:span text:style-name="T2456">false</text:span><text:span text:style-name="T2457">)<text:s/></text:span><text:span text:style-name="T2458">return</text:span><text:span text:style-name="T2459"><text:s/></text:span><text:span text:style-name="T2460">false</text:span><text:span text:style-name="T2461">;</text:span></text:p>
            <text:p text:style-name="코드표"><text:span text:style-name="T2462"><text:s text:c="8"/>Person2<text:s/></text:span><text:span text:style-name="T2463">p</text:span><text:span text:style-name="T2464"><text:s/>= (Person2)</text:span><text:span text:style-name="T2465">obj</text:span><text:span text:style-name="T2466">;</text:span></text:p>
            <text:p text:style-name="코드표"><text:span text:style-name="T2467"><text:s text:c="8"/></text:span><text:span text:style-name="T2468">return</text:span><text:span text:style-name="T2469"><text:s/></text:span><text:span text:style-name="T2470">this</text:span><text:span text:style-name="T2471">.</text:span><text:span text:style-name="T2472">age</text:span><text:span text:style-name="T2473"><text:s/>==<text:s/></text:span><text:span text:style-name="T2474">p</text:span><text:span text:style-name="T2475">.</text:span><text:span text:style-name="T2476">age</text:span><text:span text:style-name="T2477"><text:s/>&amp;&amp; Objects.equals(</text:span><text:span text:style-name="T2478">this</text:span><text:span text:style-name="T2479">.</text:span><text:span text:style-name="T2480">name</text:span><text:span text:style-name="T2481">,<text:s/></text:span><text:span text:style-name="T2482">p</text:span><text:span text:style-name="T2483">.</text:span><text:span text:style-name="T2484">name</text:span><text:span text:style-name="T2485">);</text:span></text:p>
            <text:p text:style-name="P2486"><text:s text:c="4"/>}</text:p>
            <text:p text:style-name="P2487">}</text:p>
            <text:p text:style-name="코드표"/>
          </table:table-cell>
        </table:table-row>
      </table:table>
      <text:p text:style-name="Standard"/>
      <text:p text:style-name="Standard">Example5.java</text:p>
      <table:table table:style-name="Table2488">
        <table:table-columns>
          <table:table-column table:style-name="TableColumn2489"/>
        </table:table-columns>
        <table:table-row table:style-name="TableRow2490">
          <table:table-cell table:style-name="TableCell2491">
            <text:p text:style-name="코드표"><text:span text:style-name="T2492">package</text:span><text:span text:style-name="T2493"><text:s/>net.skhu.map;</text:span></text:p>
            <text:p text:style-name="코드표"/>
            <text:p text:style-name="코드표"><text:span text:style-name="T2494">import</text:span><text:span text:style-name="T2495"><text:s/>java.util.HashMap;</text:span></text:p>
            <text:p text:style-name="코드표"><text:span text:style-name="T2496">import</text:span><text:span text:style-name="T2497"><text:s/>java.util.Map;</text:span></text:p>
            <text:p text:style-name="코드표"/>
            <text:p text:style-name="코드표"><text:span text:style-name="T2498">public</text:span><text:span text:style-name="T2499"><text:s/></text:span><text:span text:style-name="T2500">class</text:span><text:span text:style-name="T2501"><text:s/>Example5 {</text:span></text:p>
            <text:p text:style-name="코드표"/>
            <text:p text:style-name="코드표"><text:span text:style-name="T2502"><text:s text:c="4"/></text:span><text:span text:style-name="T2503">public</text:span><text:span text:style-name="T2504"><text:s/></text:span><text:span text:style-name="T2505">static</text:span><text:span text:style-name="T2506"><text:s/></text:span><text:span text:style-name="T2507">void</text:span><text:span text:style-name="T2508"><text:s/>main(String[]<text:s/></text:span><text:span text:style-name="T2509">args</text:span><text:span text:style-name="T2510">) {</text:span></text:p>
            <text:p text:style-name="코드표"><text:span text:style-name="T2511"><text:s text:c="8"/>Map&lt;Person2, Integer&gt;<text:s/></text:span><text:span text:style-name="T2512">map</text:span><text:span text:style-name="T2513"><text:s/>=<text:s/></text:span><text:span text:style-name="T2514">new</text:span><text:span text:style-name="T2515"><text:s/>HashMap&lt;Person2, Integer&gt;();</text:span></text:p>
            <text:p text:style-name="코드표"><text:span text:style-name="T2516"><text:s text:c="8"/></text:span><text:span text:style-name="T2517">map</text:span><text:span text:style-name="T2518">.put(</text:span><text:span text:style-name="T2519">new</text:span><text:span text:style-name="T2520"><text:s/>Person2(</text:span><text:span text:style-name="T2521">"</text:span><text:span text:style-name="T2522">홍길동</text:span><text:span text:style-name="T2523">"</text:span><text:span text:style-name="T2524">, 18), 101);</text:span></text:p>
            <text:p text:style-name="코드표"><text:span text:style-name="T2525"><text:s text:c="8"/></text:span><text:span text:style-name="T2526">map</text:span><text:span text:style-name="T2527">.put(</text:span><text:span text:style-name="T2528">new</text:span><text:span text:style-name="T2529"><text:s/>Person2(</text:span><text:span text:style-name="T2530">"</text:span><text:span text:style-name="T2531">임꺽정</text:span><text:span text:style-name="T2532">"</text:span><text:span text:style-name="T2533">, 19), 102);</text:span></text:p>
            <text:p text:style-name="코드표"/>
            <text:p text:style-name="코드표"><text:span text:style-name="T2534"><text:s text:c="8"/>System.</text:span><text:span text:style-name="T2535">out</text:span><text:span text:style-name="T2536">.println(</text:span><text:span text:style-name="T2537">map</text:span><text:span text:style-name="T2538">.get(</text:span><text:span text:style-name="T2539">new</text:span><text:span text:style-name="T2540"><text:s/>Person2(</text:span><text:span text:style-name="T2541">"</text:span><text:span text:style-name="T2542">홍길동</text:span><text:span text:style-name="T2543">"</text:span><text:span text:style-name="T2544">, 18)));</text:span></text:p>
            <text:p text:style-name="코드표"><text:span text:style-name="T2545"><text:s text:c="8"/>System.</text:span><text:span text:style-name="T2546">out</text:span><text:span text:style-name="T2547">.println(</text:span><text:span text:style-name="T2548">map</text:span><text:span text:style-name="T2549">.get(</text:span><text:span text:style-name="T2550">new</text:span><text:span text:style-name="T2551"><text:s/>Person2(</text:span><text:span text:style-name="T2552">"</text:span><text:span text:style-name="T2553">임꺽정</text:span><text:span text:style-name="T2554">"</text:span><text:span text:style-name="T2555">, 19)));</text:span></text:p>
            <text:p text:style-name="P2556"><text:s text:c="4"/>}</text:p>
            <text:p text:style-name="P2557">}</text:p>
            <text:p text:style-name="코드표"/>
          </table:table-cell>
        </table:table-row>
      </table:table>
      <text:p text:style-name="Standard"/>
      <text:p text:style-name="Standard">실행결과<text:s/>출력</text:p>
      <table:table table:style-name="Table2558">
        <table:table-columns>
          <table:table-column table:style-name="TableColumn2559"/>
        </table:table-columns>
        <table:table-row table:style-name="TableRow2560">
          <table:table-cell table:style-name="TableCell2561">
            <text:p text:style-name="P2562"><text:span text:style-name="T2563">101</text:span></text:p>
            <text:p text:style-name="P2564"><text:span text:style-name="T2565">102</text:span></text:p>
          </table:table-cell>
        </table:table-row>
      </table:table>
      <text:p text:style-name="Standard"/>
      <text:p text:style-name="Standard">Person2<text:s/>클래스에<text:s/>equals, hashCode<text:s/>메소드가<text:s/>재정의되어<text:s/>있기<text:s/>때문에</text:p>
      <text:p text:style-name="Standard">정상적으로<text:s/>작동한다.</text:p>
      <text:p text:style-name="Standard"/>
      <text:p text:style-name="Standard"/>
      <text:p text:style-name="P2566"/>
      <text:h text:style-name="제목2" text:outline-level="2"><text:bookmark-start text:name="_Toc192390236"/><text:bookmark-start text:name="__RefHeading___Toc5882_4171937993"/>lombok<text:bookmark-end text:name="_Toc192390236"/><text:bookmark-end text:name="__RefHeading___Toc5882_4171937993"/></text:h>
      <text:p text:style-name="Standard">백엔드<text:s/>강의에서<text:s/>배운<text:s/>lombok @Data<text:s/>어노테이션을<text:s/>클래스<text:s/>앞에<text:s/>붙이면,</text:p>
      <text:p text:style-name="Standard">lombok이</text:p>
      <text:p text:style-name="Standard"><text:s text:c="3"/>getter, setter<text:s/>뿐만<text:s/>아니라,</text:p>
      <text:p text:style-name="Standard"><text:s text:c="3"/>equals, hashCode, toString<text:s/>메소드들도<text:s/>잘<text:s/>구현해<text:s/>준다.</text:p>
      <text:p text:style-name="Standard"/>
      <text:p text:style-name="Standard">따라서<text:s/>lombok @Data<text:s/>클래스는<text:s/>HashMap, HashSet<text:s/>클래스의<text:s/>키로<text:s/>사용해도<text:s/>된다.</text:p>
      <text:p text:style-name="Standard"/>
      <text:p text:style-name="Standard">아!<text:s/>당연히<text:s/>코테<text:s/>문제<text:s/>풀<text:s/>때<text:s text:c="2"/>lombok<text:s/>사용<text:s/>할<text:s/>수<text:s/>없다.</text:p>
      <text:p text:style-name="Standard"/>
      <text:p text:style-name="Standard">참고:</text:p>
      <text:p text:style-name="Standard"><text:s text:c="2"/>lombok이<text:s/>자동으로<text:s/>생성한<text:s/>메소드들은</text:p>
      <text:p text:style-name="Standard"><text:s text:c="2"/>*.java<text:s/>파일을<text:s/>컴파일하여<text:s/>생성된<text:s/>*.class<text:s/>파일에<text:s/>들어있다.</text:p>
      <text:p text:style-name="Standard"/>
      <text:p text:style-name="Standard"/>
      <text:p text:style-name="Standard"/>
      <text:p text:style-name="P25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맑은 고딕" svg:font-family="맑은 고딕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굴림체" svg:font-family="굴림체" style:font-family-generic="modern" style:font-pitch="fixed" svg:panose-1="2 11 6 9 0 1 1 1 1 1"/>
    <style:font-face style:name="돋움" svg:font-family="돋움" style:font-family-generic="swiss" style:font-pitch="variable" svg:panose-1="2 11 6 0 0 1 1 1 1 1"/>
    <style:font-face style:name="Consolas" svg:font-family="Consolas" style:font-family-generic="modern" style:font-pitch="fixed" svg:panose-1="2 11 6 9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wiss" style:font-pitch="variable" svg:panose-1="2 13 6 4 0 0 0 0 0 0"/>
    <style:font-face style:name="Lucida Sans" svg:font-family="Lucida Sans" style:font-family-generic="swiss" style:font-pitch="variable" svg:panose-1="2 11 6 2 3 5 4 2 2 4"/>
    <style:font-face style:name="굴림" svg:font-family="굴림" style:font-family-generic="swiss" style:font-pitch="variable" svg:panose-1="2 11 6 0 0 1 1 1 1 1"/>
    <style:font-face style:name="함초롬바탕" svg:font-family="함초롬바탕" style:font-family-generic="roman" style:font-pitch="variable" svg:panose-1="2 3 6 4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555in">
        <style:background-fill draw:fill="solid"/>
      </style:paragraph-properties>
      <style:text-properties style:font-name="맑은 고딕" style:font-name-asian="맑은 고딕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1" style:display-name="제목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Tahoma" fo:font-weight="bold" style:font-weight-asian="bold" fo:font-size="20pt" style:font-size-asian="20pt" style:font-size-complex="14pt" fo:hyphenate="false"/>
    </style:style>
    <style:style style:name="제목2" style:display-name="제목 2" style:family="paragraph" style:parent-style-name="Standard" style:next-style-name="Standard" style:default-outline-level="2">
      <style:paragraph-properties fo:keep-with-next="always"/>
      <style:text-properties style:font-name="굴림체" style:font-name-complex="Tahoma" fo:font-weight="bold" style:font-weight-asian="bold" fo:font-size="16pt" style:font-size-asian="16pt" fo:hyphenate="false"/>
    </style:style>
    <style:style style:name="제목3" style:display-name="제목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asian="돋움" style:font-name-complex="Tahoma" fo:font-weight="bold" style:font-weight-asian="bold" fo:font-size="12pt" style:font-size-asian="12pt" fo:hyphenate="false"/>
    </style:style>
    <style:style style:name="제목4" style:display-name="제목 4" style:family="paragraph" style:parent-style-name="Standard" style:next-style-name="Standard" style:default-outline-level="4">
      <style:paragraph-properties fo:keep-with-next="always"/>
      <style:text-properties fo:font-weight="bold" style:font-weight-asian="bold" style:font-weight-complex="bold" fo:hyphenate="fals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WW_CharLFO1LVL1" style:family="text">
      <style:text-properties style:font-name="굴림체" style:font-name-asian="굴림체"/>
    </style:style>
    <text:list-style style:name="Outline" style:display-name="Outline">
      <text:list-level-style-number text:level="1" text:style-name="WW_CharLFO1LVL1" style:num-suffix="." style:num-list-format-name="NLF0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)" style:num-list-format-name="NLF0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3" style:num-list-format-name="NLF0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list-level-style-number>
      <text:list-level-style-number text:level="4" style:num-list-format-name="NLF0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list-format-name="NLF0" style:num-format="1" text:display-levels="5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list-format-name="NLF0" style:num-format="1" text:display-levels="6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list-format-name="NLF0" style:num-format="1" text:display-levels="7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list-format-name="NLF0" style:num-format="1" text:display-levels="8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list-format-name="NLF0" style:num-format="1" text:display-levels="9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style:style style:name="Standard" style:display-name="Standard" style:family="paragraph">
      <style:paragraph-properties style:snap-to-layout-grid="false" fo:text-align="justify"/>
      <style:text-properties style:font-name="Consolas" style:font-name-asian="굴림체" style:font-name-complex="Consola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나눔고딕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Lucida Sans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앋뒤0.3간격" style:display-name="앋뒤0.3간격" style:family="paragraph" style:parent-style-name="Standard">
      <style:paragraph-properties fo:margin-top="0.0208in" fo:margin-bottom="0.0208in"/>
      <style:text-properties fo:hyphenate="false"/>
    </style:style>
    <style:style style:name="소스코드" style:display-name="소스코드" style:family="paragraph" style:parent-style-name="Standard">
      <style:paragraph-properties fo:line-height="0.1527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머리글" style:display-name="머리글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목록1" style:display-name="목록1" style:family="paragraph" style:parent-style-name="목록단락" style:list-style-name="WWNum3">
      <style:text-properties style:font-size-complex="10pt" fo:hyphenate="false"/>
    </style:style>
    <style:style style:name="목록단락" style:display-name="목록 단락" style:family="paragraph" style:parent-style-name="Standard">
      <style:text-properties fo:hyphenate="false"/>
    </style:style>
    <style:style style:name="날짜" style:display-name="날짜" style:family="paragraph" style:parent-style-name="Standard" style:next-style-name="Standard">
      <style:text-properties fo:hyphenate="false"/>
    </style:style>
    <style:style style:name="Contents1" style:display-name="Contents 1" style:family="paragraph" style:parent-style-name="Standard" style:next-style-name="Standard" style:auto-update="true"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line-height="0.2006in"/>
      <style:text-properties fo:hyphenate="false"/>
    </style:style>
    <style:style style:name="일반웹" style:display-name="일반 (웹)" style:family="paragraph" style:parent-style-name="Standard">
      <style:paragraph-properties fo:widows="2" fo:orphans="2" fo:text-align="start" fo:margin-top="0.1944in" fo:margin-bottom="0.1944in"/>
      <style:text-properties style:font-name="굴림" style:font-name-asian="굴림" style:font-name-complex="굴림" style:letter-kerning="false" fo:font-size="12pt" style:font-size-asian="12pt" style:font-size-complex="12pt" fo:hyphenate="false"/>
    </style:style>
    <style:style style:name="바탕글" style:display-name="바탕글" style:family="paragraph" style:parent-style-name="Standard">
      <style:paragraph-properties fo:line-height="160%"/>
      <style:text-properties style:font-name="함초롬바탕" style:font-name-asian="함초롬바탕" style:font-name-complex="굴림" fo:color="#000000" style:letter-kerning="false" style:font-size-complex="10pt" fo:hyphenate="false"/>
    </style:style>
    <style:style style:name="xl104사본2" style:display-name="xl104 사본2" style:family="paragraph" style:parent-style-name="Standard">
      <style:paragraph-properties fo:text-align="center" style:vertical-align="middle"/>
      <style:text-properties style:font-name="맑은 고딕" style:font-name-asian="맑은 고딕" style:font-name-complex="굴림" fo:color="#000000" style:letter-kerning="false" fo:font-size="14pt" style:font-size-asian="14pt" style:font-size-complex="14pt" fo:hyphenate="false"/>
    </style:style>
    <style:style style:name="xl67" style:display-name="xl67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68" style:display-name="xl68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69" style:display-name="xl69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72" style:display-name="xl72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73" style:display-name="xl73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75" style:display-name="xl75" style:family="paragraph" style:parent-style-name="Standard">
      <style:paragraph-properties fo:text-align="center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xl74" style:display-name="xl74" style:family="paragraph" style:parent-style-name="Standard">
      <style:paragraph-properties fo:text-align="start" style:vertical-align="middle"/>
      <style:text-properties style:font-name="돋움" style:font-name-asian="돋움" style:font-name-complex="굴림" fo:color="#000000" style:letter-kerning="false" fo:font-size="8pt" style:font-size-asian="8pt" style:font-size-complex="8pt" fo:hyphenate="false"/>
    </style:style>
    <style:style style:name="xl65" style:display-name="xl65" style:family="paragraph" style:parent-style-name="Standard">
      <style:paragraph-properties fo:text-align="center" style:vertical-align="middle"/>
      <style:text-properties style:font-name="맑은 고딕" style:font-name-asian="맑은 고딕" style:font-name-complex="굴림" fo:color="#000000" style:letter-kerning="false" fo:font-size="11pt" style:font-size-asian="11pt" fo:hyphenate="false"/>
    </style:style>
    <style:style style:name="xl71" style:display-name="xl71" style:family="paragraph" style:parent-style-name="Standard">
      <style:paragraph-properties fo:text-align="start" style:vertical-align="middle"/>
      <style:text-properties style:font-name="돋움" style:font-name-asian="돋움" style:font-name-complex="굴림" fo:color="#000000" style:letter-kerning="false" fo:font-size="9pt" style:font-size-asian="9pt" style:font-size-complex="9pt" fo:hyphenate="false"/>
    </style:style>
    <style:style style:name="출력" style:display-name="출력" style:family="paragraph" style:parent-style-name="소스코드" style:auto-update="true">
      <style:paragraph-properties fo:line-height="0.1388in"/>
      <style:text-properties fo:font-size="9pt" style:font-size-asian="9pt" fo:hyphenate="false"/>
    </style:style>
    <style:style style:name="자바스크립트" style:display-name="자바스크립트" style:family="paragraph" style:parent-style-name="Standard">
      <style:paragraph-properties fo:line-height="0.1527in"/>
      <style:text-properties fo:hyphenate="false"/>
    </style:style>
    <style:style style:name="소스코드표" style:display-name="소스코드표" style:family="paragraph" style:parent-style-name="Standard">
      <style:paragraph-properties fo:widows="2" fo:orphans="2" fo:border="0.0069in solid #000000" fo:padding-top="0.0138in" fo:padding-left="0.0555in" fo:padding-bottom="0.0138in" fo:padding-right="0.0555in" style:shadow="none" fo:line-height="0.1527in"/>
      <style:text-properties style:font-name-complex="굴림" style:letter-kerning="false" style:font-size-complex="12pt" fo:hyphenate="false"/>
    </style:style>
    <style:style style:name="코드표" style:display-name="코드표" style:family="paragraph" style:parent-style-name="Standard">
      <style:paragraph-properties fo:widows="2" fo:orphans="2" style:snap-to-layout-grid="true" fo:text-align="start" fo:line-height="0.1527in"/>
      <style:text-properties style:font-name-complex="굴림체" style:font-weight-complex="bold" style:letter-kerning="false" style:font-size-complex="10pt" fo:hyphenate="false"/>
    </style:style>
    <style:style style:name="미리서식이지정된HTML" style:display-name="미리 서식이 지정된 HTML" style:family="paragraph" style:parent-style-name="Standard">
      <style:paragraph-properties fo:widows="2" fo:orphans="2" style:snap-to-layout-grid="true"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굴림체" style:letter-kerning="false" fo:font-size="12pt" style:font-size-asian="12pt" style:font-size-complex="12pt" fo:hyphenate="false"/>
    </style:style>
    <style:style style:name="Contents3" style:display-name="Contents 3" style:family="paragraph" style:parent-style-name="Index">
      <style:text-properties fo:hyphenate="false"/>
    </style:style>
    <style:style style:name="Contents4" style:display-name="Contents 4" style:family="paragraph" style:parent-style-name="Index">
      <style:text-properties fo:hyphenate="false"/>
    </style:style>
    <style:style style:name="Contents5" style:display-name="Contents 5" style:family="paragraph" style:parent-style-name="Index">
      <style:text-properties fo:hyphenate="false"/>
    </style:style>
    <style:style style:name="Contents6" style:display-name="Contents 6" style:family="paragraph" style:parent-style-name="Index">
      <style:text-properties fo:hyphenate="false"/>
    </style:style>
    <style:style style:name="Contents7" style:display-name="Contents 7" style:family="paragraph" style:parent-style-name="Index">
      <style:text-properties fo:hyphenate="false"/>
    </style:style>
    <style:style style:name="Contents8" style:display-name="Contents 8" style:family="paragraph" style:parent-style-name="Index">
      <style:text-properties fo:hyphenate="false"/>
    </style:style>
    <style:style style:name="Contents9" style:display-name="Contents 9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Heading1Char" style:display-name="Heading 1 Char" style:family="text" style:parent-style-name="기본단락글꼴">
      <style:text-properties style:font-name="Arial" style:font-name-asian="굴림" style:font-name-complex="Tahoma" fo:font-weight="bold" style:font-weight-asian="bold" fo:font-size="20pt" style:font-size-asian="20pt" style:font-size-complex="14pt"/>
    </style:style>
    <style:style style:name="Heading2Char" style:display-name="Heading 2 Char" style:family="text" style:parent-style-name="기본단락글꼴">
      <style:text-properties style:font-name="굴림체" style:font-name-asian="굴림체" style:font-name-complex="Tahoma" fo:font-weight="bold" style:font-weight-asian="bold" fo:font-size="16pt" style:font-size-asian="16pt"/>
    </style:style>
    <style:style style:name="Heading3Char" style:display-name="Heading 3 Char" style:family="text" style:parent-style-name="기본단락글꼴">
      <style:text-properties style:font-name="Arial" style:font-name-asian="돋움" style:font-name-complex="Tahoma" fo:font-weight="bold" style:font-weight-asian="bold" fo:font-size="12pt" style:font-size-asian="12pt"/>
    </style:style>
    <style:style style:name="소스코드Char" style:display-name="소스코드 Char" style:family="text" style:parent-style-name="기본단락글꼴">
      <style:text-properties style:font-name-asian="굴림체"/>
    </style:style>
    <style:style style:name="HeaderChar" style:display-name="Header Char" style:family="text" style:parent-style-name="기본단락글꼴">
      <style:text-properties style:font-name="굴림체" style:font-name-asian="굴림체" style:font-name-complex="굴림체"/>
    </style:style>
    <style:style style:name="FooterChar" style:display-name="Footer Char" style:family="text" style:parent-style-name="기본단락글꼴">
      <style:text-properties style:font-name="굴림체" style:font-name-asian="굴림체" style:font-name-complex="굴림체"/>
    </style:style>
    <style:style style:name="목록1Char" style:display-name="목록1 Char" style:family="text" style:parent-style-name="기본단락글꼴">
      <style:text-properties style:font-name="굴림체" style:font-name-asian="굴림체" style:font-name-complex="굴림체" style:font-size-complex="10pt"/>
    </style:style>
    <style:style style:name="Heading4Char" style:display-name="Heading 4 Char" style:family="text" style:parent-style-name="기본단락글꼴">
      <style:text-properties style:font-name="굴림체" style:font-name-asian="굴림체" style:font-name-complex="굴림체" fo:font-weight="bold" style:font-weight-asian="bold" style:font-weight-complex="bold"/>
    </style:style>
    <style:style style:name="Internetlink" style:display-name="Internet link" style:family="text" style:parent-style-name="기본단락글꼴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ateChar" style:display-name="Date Char" style:family="text" style:parent-style-name="기본단락글꼴">
      <style:text-properties style:font-name="굴림체" style:font-name-asian="굴림체" style:font-name-complex="굴림체"/>
    </style:style>
    <style:style style:name="ng-binding" style:display-name="ng-binding" style:family="text" style:parent-style-name="기본단락글꼴"/>
    <style:style style:name="apple-tab-span" style:display-name="apple-tab-span" style:family="text" style:parent-style-name="기본단락글꼴"/>
    <style:style style:name="il" style:display-name="il" style:family="text" style:parent-style-name="기본단락글꼴"/>
    <style:style style:name="im" style:display-name="im" style:family="text" style:parent-style-name="기본단락글꼴"/>
    <style:style style:name="출력Char" style:display-name="출력 Char" style:family="text" style:parent-style-name="소스코드Char">
      <style:text-properties style:font-name-asian="굴림체" fo:font-size="9pt" style:font-size-asian="9pt"/>
    </style:style>
    <style:style style:name="자바스크립트Char" style:display-name="자바스크립트 Char" style:family="text" style:parent-style-name="기본단락글꼴">
      <style:text-properties style:font-name="Consolas" style:font-name-asian="굴림체" style:font-name-complex="Consolas"/>
    </style:style>
    <style:style style:name="소스코드표Char" style:display-name="소스코드표 Char" style:family="text" style:parent-style-name="기본단락글꼴">
      <style:text-properties style:font-name="Consolas" style:font-name-asian="굴림체" style:font-name-complex="굴림" style:letter-kerning="false" style:font-size-complex="12pt"/>
    </style:style>
    <style:style style:name="코드표Char" style:display-name="코드표 Char" style:family="text" style:parent-style-name="기본단락글꼴">
      <style:text-properties style:font-name="Consolas" style:font-name-asian="굴림체" style:font-name-complex="굴림체" style:font-weight-complex="bold" style:letter-kerning="false" style:font-size-complex="10pt"/>
    </style:style>
    <style:style style:name="fontstyle01" style:display-name="fontstyle01" style:family="text" style:parent-style-name="기본단락글꼴">
      <style:text-properties fo:font-weight="normal" style:font-weight-asian="normal" style:font-weight-complex="normal" fo:font-style="normal" style:font-style-asian="normal" style:font-style-complex="normal" fo:color="#000000" fo:font-size="9pt" style:font-size-asian="9pt" style:font-size-complex="9pt"/>
    </style:style>
    <style:style style:name="fontstyle21" style:display-name="fontstyle21" style:family="text" style:parent-style-name="기본단락글꼴">
      <style:text-properties fo:font-weight="normal" style:font-weight-asian="normal" style:font-weight-complex="normal" fo:font-style="normal" style:font-style-asian="normal" style:font-style-complex="normal" fo:color="#000000" fo:font-size="9pt" style:font-size-asian="9pt" style:font-size-complex="9pt"/>
    </style:style>
    <style:style style:name="HTMLPreformattedChar" style:display-name="HTML Preformatted Char" style:family="text" style:parent-style-name="기본단락글꼴">
      <style:text-properties style:font-name="Consolas" style:font-name-asian="굴림체" style:font-name-complex="굴림체" style:letter-kerning="false" fo:font-size="12pt" style:font-size-asian="12pt" style:font-size-complex="12pt"/>
    </style:style>
    <style:style style:name="pl-s" style:display-name="pl-s" style:family="text" style:parent-style-name="기본단락글꼴"/>
    <style:style style:name="pl-pds" style:display-name="pl-pds" style:family="text" style:parent-style-name="기본단락글꼴"/>
    <style:style style:name="value" style:display-name="value" style:family="text" style:parent-style-name="기본단락글꼴"/>
    <style:style style:name="확인되지않은멘션" style:display-name="확인되지 않은 멘션" style:family="text" style:parent-style-name="기본단락글꼴">
      <style:text-properties fo:color="#605E5C" fo:background-color="#E1DFDD"/>
    </style:style>
    <style:style style:name="VisitedInternetLink" style:display-name="Visited Internet Link" style:family="text" style:parent-style-name="기본단락글꼴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제목1Char" style:display-name="제목 1 Char" style:family="text" style:parent-style-name="기본단락글꼴">
      <style:text-properties style:font-name="맑은 고딕" style:font-name-asian="굴림체" style:font-name-complex="Tahoma" fo:font-weight="bold" style:font-weight-asian="bold" fo:font-size="20pt" style:font-size-asian="20pt" style:font-size-complex="14pt"/>
    </style:style>
    <style:style style:name="제목2Char" style:display-name="제목 2 Char" style:family="text" style:parent-style-name="기본단락글꼴">
      <style:text-properties style:font-name="굴림체" style:font-name-asian="굴림체" style:font-name-complex="Tahoma" fo:font-weight="bold" style:font-weight-asian="bold" fo:font-size="16pt" style:font-size-asian="16pt"/>
    </style:style>
    <style:style style:name="제목3Char" style:display-name="제목 3 Char" style:family="text" style:parent-style-name="기본단락글꼴">
      <style:text-properties style:font-name="맑은 고딕" style:font-name-asian="돋움" style:font-name-complex="Tahoma" fo:font-weight="bold" style:font-weight-asian="bold" fo:font-size="12pt" style:font-size-asian="12pt"/>
    </style:style>
    <style:style style:name="머리글Char" style:display-name="머리글 Char" style:family="text" style:parent-style-name="기본단락글꼴">
      <style:text-properties style:font-name="굴림체" style:font-name-asian="굴림체" style:font-name-complex="굴림체"/>
    </style:style>
    <style:style style:name="바닥글Char" style:display-name="바닥글 Char" style:family="text" style:parent-style-name="기본단락글꼴">
      <style:text-properties style:font-name="굴림체" style:font-name-asian="굴림체" style:font-name-complex="굴림체"/>
    </style:style>
    <style:style style:name="날짜Char" style:display-name="날짜 Char" style:family="text" style:parent-style-name="기본단락글꼴">
      <style:text-properties style:font-name="굴림체" style:font-name-asian="굴림체" style:font-name-complex="굴림체"/>
    </style:style>
    <style:style style:name="제목4Char" style:display-name="제목 4 Char" style:family="text" style:parent-style-name="기본단락글꼴">
      <style:text-properties style:font-name="굴림체" style:font-name-asian="굴림체" style:font-name-complex="굴림체" fo:font-weight="bold" style:font-weight-asian="bold" style:font-weight-complex="bold"/>
    </style:style>
    <style:style style:name="ListLabel1" style:display-name="ListLabel 1" style:family="text">
      <style:text-properties style:font-name="굴림체" style:font-name-asian="굴림체" style:font-name-complex="굴림체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굴림체" style:font-name-asian="굴림체" style:font-name-complex="굴림체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굴림체" style:font-name-asian="굴림체" style:font-name-complex="굴림체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IndexLink" style:display-name="Index Link" style:family="text"/>
    <style:style style:name="ListLabel73" style:display-name="ListLabel 73" style:family="text"/>
    <style:style style:name="FootnoteSymbol" style:display-name="Footnote Symbol" style:family="text"/>
    <style:style style:name="EndnoteSymbol" style:display-name="Endnote Symbol" style:family="text"/>
    <text:list-style style:name="NoList" style:display-name="No List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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bullet>
      <text:list-level-style-bullet text:level="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bullet>
      <text:list-level-style-bullet text:level="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bullet>
      <text:list-level-style-bullet text:level="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bullet>
      <text:list-level-style-bullet text:level="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bullet>
      <text:list-level-style-bullet text:level="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bullet>
      <text:list-level-style-bullet text:level="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bullet>
      <text:list-level-style-bullet text:level="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bullet>
      <text:list-level-style-bullet text:level="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bullet>
    </text:list-style>
    <text:list-style style:name="WWNum3" style:display-name="WWNum3">
      <text:list-level-style-number text:level="1" style:num-suffix=".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1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1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1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1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1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5LVL1" style:family="text">
      <style:text-properties style:font-name="굴림체" style:font-name-asian="굴림체"/>
    </style:style>
    <text:list-style style:name="WWNum4" style:display-name="WWNum4">
      <text:list-level-style-number text:level="1" text:style-name="WW_CharLFO5LVL1" style:num-suffix="." style:num-list-format-name="NLF0" style:num-format="1">
        <style:list-level-properties text:space-before="0in" text:min-label-width="0.2951in" text:list-level-position-and-space-mode="label-alignment">
          <style:list-level-label-alignment text:label-followed-by="space" fo:margin-left="0.2951in" fo:text-indent="-0.2951in"/>
        </style:list-level-properties>
      </text:list-level-style-number>
      <text:list-level-style-number text:level="2" style:num-suffix=")" style:num-list-format-name="NLF0" style:num-format="1">
        <style:list-level-properties text:space-before="0in" text:min-label-width="0.3152in" text:list-level-position-and-space-mode="label-alignment">
          <style:list-level-label-alignment text:label-followed-by="space" fo:margin-left="0.3152in" fo:text-indent="-0.3152in"/>
        </style:list-level-properties>
      </text:list-level-style-number>
      <text:list-level-style-number text:level="3" style:num-list-format-name="NLF0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list-level-style-number>
      <text:list-level-style-number text:level="4" style:num-list-format-name="NLF0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list-format-name="NLF0" style:num-format="1" text:display-levels="5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list-format-name="NLF0" style:num-format="1" text:display-levels="6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list-format-name="NLF0" style:num-format="1" text:display-levels="7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list-format-name="NLF0" style:num-format="1" text:display-levels="8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list-format-name="NLF0" style:num-format="1" text:display-levels="9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style:style style:name="WW_CharLFO6LVL1" style:family="text">
      <style:text-properties style:font-name="굴림체" style:font-name-asian="굴림체"/>
    </style:style>
    <text:list-style style:name="WWNum5" style:display-name="WWNum5">
      <text:list-level-style-number text:level="1" text:style-name="WW_CharLFO6LVL1" style:num-suffix="." style:num-list-format-name="NLF0" style:num-format="1">
        <style:list-level-properties text:space-before="0in" text:min-label-width="0.2951in" text:list-level-position-and-space-mode="label-alignment">
          <style:list-level-label-alignment text:label-followed-by="space" fo:margin-left="0.2951in" fo:text-indent="-0.2951in"/>
        </style:list-level-properties>
      </text:list-level-style-number>
      <text:list-level-style-number text:level="2" style:num-suffix=")" style:num-list-format-name="NLF0" style:num-format="1">
        <style:list-level-properties text:space-before="0in" text:min-label-width="0.3152in" text:list-level-position-and-space-mode="label-alignment">
          <style:list-level-label-alignment text:label-followed-by="space" fo:margin-left="0.3152in" fo:text-indent="-0.3152in"/>
        </style:list-level-properties>
      </text:list-level-style-number>
      <text:list-level-style-number text:level="3" style:num-list-format-name="NLF0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list-level-style-number>
      <text:list-level-style-number text:level="4" style:num-list-format-name="NLF0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list-format-name="NLF0" style:num-format="1" text:display-levels="5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list-format-name="NLF0" style:num-format="1" text:display-levels="6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list-format-name="NLF0" style:num-format="1" text:display-levels="7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list-format-name="NLF0" style:num-format="1" text:display-levels="8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list-format-name="NLF0" style:num-format="1" text:display-levels="9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list-format-name="NLF1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list-format-name="NLF1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text:list-style style:name="WWNum7" style:display-name="WWNum7">
      <text:list-level-style-number text:level="1" style:num-list-format-name="NLF2" style:num-format="①, ②, ③, ...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list-format-name="NLF2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list-format-name="NLF2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text:list-style style:name="WWNum8" style:display-name="WWNum8">
      <text:list-level-style-number text:level="1" style:num-suffix="." style:num-list-format-name="NLF3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list-format-name="NLF3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)" style:num-list-format-name="NLF3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)" style:num-list-format-name="NLF3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(" style:num-suffix=")" style:num-list-format-name="NLF3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(" style:num-suffix=")" style:num-list-format-name="NLF3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list-format-name="NLF3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굴림체" style:font-name-asian="굴림체"/>
    </style:style>
    <text:list-style style:name="WWNum1" style:display-name="WWNum1">
      <text:list-level-style-number text:level="1" text:style-name="WW_CharLFO10LVL1" style:num-list-format-name="NLF2" style:num-format="①, ②, ③, ...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list-format-name="NLF2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list-format-name="NLF2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굴림체" style:font-name-asian="굴림체"/>
    </style:style>
    <text:outline-style style:name="WW_OutlineListStyle">
      <text:outline-level-style text:level="1" text:style-name="WW_CharOUTLINELVL1" style:num-suffix="." style:num-list-format-name="NLF4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outline-level-style>
      <text:outline-level-style text:level="2" style:num-suffix=")" style:num-list-format-name="NLF4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outline-level-style>
      <text:outline-level-style text:level="3" style:num-list-format-name="NLF4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outline-level-style>
      <text:outline-level-style text:level="4" style:num-list-format-name="NLF4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)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)</number:text>
      <number:num-list-label text:level="4"/>
      <number:text>%4%)</number:text>
      <number:num-list-label text:level="5"/>
      <number:text>(%5%)</number:text>
      <number:num-list-label text:level="6"/>
      <number:text>(%6%)</number:text>
      <number:num-list-label text:level="7"/>
      <number:text>%7%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2%)</number:text>
      <number:num-list-label text:level="3"/>
      <number:text>%1%.%2%.%3%</number:text>
      <number:num-list-label text:level="4"/>
      <number:text>%1%.%2%.%3%.%4%</number:text>
    </number:num-list-format>
    <style:page-layout style:name="PL0">
      <style:page-layout-properties fo:page-width="8.268in" fo:page-height="11.693in" style:print-orientation="portrait" fo:margin-top="0.5in" fo:margin-left="0.5in" fo:margin-bottom="0.0784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215in"/>
      </style:footer-style>
    </style:page-layout>
    <style:style style:name="P2" style:parent-style-name="Standard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기본단락글꼴" style:family="text">
      <style:text-properties fo:color="#A6A6A6"/>
    </style:style>
    <style:style style:name="T4" style:parent-style-name="기본단락글꼴" style:family="text">
      <style:text-properties fo:color="#A6A6A6"/>
    </style:style>
    <style:style style:name="T5" style:parent-style-name="기본단락글꼴" style:family="text">
      <style:text-properties fo:color="#A6A6A6"/>
    </style:style>
  </office:automatic-styles>
  <office:master-styles>
    <style:master-page style:name="MP0" style:page-layout-name="PL0">
      <style:footer>
        <text:p text:style-name="P2"><text:span text:style-name="T3"><text:page-number text:fixed="false">20</text:page-number></text:span><text:span text:style-name="T4"><text:s/>/<text:s/></text:span><text:span text:style-name="T5"><text:page-count style:num-format="1">20</text:page-count></text:span></text:p>
        <text:p text:style-name="바닥글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eungjin Lee</meta:initial-creator>
    <dc:creator>이창진</dc:creator>
    <meta:creation-date>2026-06-01T15:04:00Z</meta:creation-date>
    <dc:date>2026-06-01T15:05:00Z</dc:date>
    <meta:template xlink:href="Normal.dotm" xlink:type="simple"/>
    <meta:editing-cycles>3</meta:editing-cycles>
    <meta:editing-duration>PT60S</meta:editing-duration>
    <meta:user-defined meta:name="AppVersion">16.0000</meta:user-defined>
    <meta:document-statistic meta:page-count="14" meta:paragraph-count="40" meta:word-count="3001" meta:character-count="20070" meta:row-count="142" meta:non-whitespace-character-count="17109"/>
  </office:meta>
</office:document-meta>
</file>